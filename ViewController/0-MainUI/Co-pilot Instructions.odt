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fo:font-size="15pt" fo:font-weight="bold"/>
    </style:style>
    <style:style style:name="P2" style:family="paragraph" style:parent-style-name="Standard">
      <style:paragraph-properties fo:margin-left="0.1665in" fo:margin-right="0.1665in" fo:margin-top="0.1665in" fo:margin-bottom="0.1665in" loext:contextual-spacing="false" fo:text-indent="0in" style:auto-text-indent="false"/>
      <style:text-properties fo:font-weight="normal"/>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paragraph-properties fo:margin-top="0in" fo:margin-bottom="0in" loext:contextual-spacing="false"/>
    </style:style>
    <style:style style:name="P8" style:family="paragraph" style:parent-style-name="Text_20_body" style:list-style-name="L1">
      <style:paragraph-properties fo:margin-top="0in" fo:margin-bottom="0in" loext:contextual-spacing="false"/>
    </style:style>
    <style:style style:name="P9" style:family="paragraph" style:parent-style-name="Text_20_body" style:list-style-name="L2">
      <style:paragraph-properties fo:margin-top="0in" fo:margin-bottom="0in" loext:contextual-spacing="false"/>
    </style:style>
    <style:style style:name="P10" style:family="paragraph" style:parent-style-name="Text_20_body" style:list-style-name="L3">
      <style:paragraph-properties fo:margin-top="0in" fo:margin-bottom="0in" loext:contextual-spacing="false"/>
    </style:style>
    <style:style style:name="P11" style:family="paragraph" style:parent-style-name="Text_20_body" style:list-style-name="L4">
      <style:paragraph-properties fo:margin-top="0in" fo:margin-bottom="0in" loext:contextual-spacing="false"/>
    </style:style>
    <style:style style:name="P12" style:family="paragraph" style:parent-style-name="Text_20_body" style:list-style-name="L3">
      <style:paragraph-properties fo:margin-top="0in" fo:margin-bottom="0in" loext:contextual-spacing="false" style:writing-mode="lr-tb"/>
    </style:style>
    <style:style style:name="P13" style:family="paragraph" style:parent-style-name="Text_20_body">
      <style:paragraph-properties fo:margin-left="0.1665in" fo:margin-right="0.1665in" fo:margin-top="0.1665in" fo:margin-bottom="0.1665in" loext:contextual-spacing="false" fo:text-indent="0in" style:auto-text-indent="false"/>
      <style:text-properties fo:font-weight="normal"/>
    </style:style>
    <style:style style:name="T1" style:family="text">
      <style:text-properties fo:font-weight="bold"/>
    </style:style>
    <style:style style:name="T2" style:family="text">
      <style:text-properties fo:background-color="#f4f6f7" loext:char-shading-value="0" loext:padding-left="0.0417in" loext:padding-right="0in" loext:padding-top="0.0209in" loext:padding-bottom="0.0209in" loext:border-left="0.06pt solid #f4f6f7" loext:border-right="none" loext:border-top="0.06pt solid #f4f6f7" loext:border-bottom="0.06pt solid #f4f6f7"/>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You can continue using GitHub Copilot's other active features—like <text:span text:style-name="T1">inline code completions and ghost text</text:span>—while using an alternative AI tool specifically to handle your complex chat edits and branch modifications. Because inline completions and chat credits run on separate systems, your standard "tab-to-complete" suggestions will keep working right inside your editor.</text:p>
      <text:p text:style-name="P2">To bridge the gap for chat and multi-file editing, you can layer a secondary tool directly on top of your existing local setup.</text:p>
      <text:h text:style-name="P1" text:outline-level="2">1. Hybrid Setup: Copilot Inline + Continue Extension (Recommended)</text:h>
      <text:p text:style-name="P13">You can run two AI extensions side-by-side in VS Code or JetBrains without any conflicts.</text:p>
      <text:list xml:id="list4046232515" text:style-name="L1">
        <text:list-item>
          <text:p text:style-name="P8"><text:span text:style-name="T1">How it works:</text:span> Keep the official GitHub Copilot extension enabled for your standard inline completions. Then, install the free Continue.dev extension.</text:p>
        </text:list-item>
        <text:list-item>
          <text:p text:style-name="P8"><text:span text:style-name="T1">The workflow:</text:span> Use Copilot for fast typing/completions as usual. When you need chat or codebase editing, use the Continue side panel. You can power Continue by plugging in free API keys from providers like Google Gemini or Groq.</text:p>
        </text:list-item>
        <text:list-item>
          <text:p text:style-name="P3"/>
        </text:list-item>
      </text:list>
      <text:h text:style-name="P1" text:outline-level="2">2. Multi-File Editing: Copilot Inline + Aider CLI</text:h>
      <text:p text:style-name="P13">If you want to modify branches or execute complex codebase tasks, you can use a terminal agent alongside your editor.</text:p>
      <text:list xml:id="list777906296" text:style-name="L2">
        <text:list-item>
          <text:p text:style-name="P9"><text:span text:style-name="T1">How it works:</text:span> Leave your editor untouched so Copilot can assist you with active typing. Open your terminal and run Aider, pointing it at your local Git repository.</text:p>
        </text:list-item>
        <text:list-item>
          <text:p text:style-name="P9"><text:span text:style-name="T1">The workflow:</text:span> Ask Aider to make broad modifications, create new branches, or edit multiple files at once. As Aider updates the local files, your editor will automatically refresh, and Copilot will instantly recognize the new context for inline completions.</text:p>
        </text:list-item>
        <text:list-item>
          <text:p text:style-name="P4"/>
        </text:list-item>
      </text:list>
      <text:h text:style-name="P1" text:outline-level="2">3. Quick Reference: Copilot Inline + Web Browser LLMs</text:h>
      <text:p text:style-name="P13">If you prefer not to install more software, you can leverage your browser while keeping Copilot active in your IDE.</text:p>
      <text:list xml:id="list1153443099" text:style-name="L3">
        <text:list-item>
          <text:p text:style-name="P12"><text:span text:style-name="T1">How it works:</text:span> Copy the specific code blocks or use a tool like <text:span text:style-name="Source_20_Text"><text:span text:style-name="T2">git diff</text:span></text:span> to extract the context you need.</text:p>
        </text:list-item>
        <text:list-item>
          <text:p text:style-name="P10"><text:span text:style-name="T1">The workflow:</text:span> Paste the context into Anthropic Claude or OpenAI ChatGPT to generate the heavy structural modifications. Paste the resulting code back into your file, and use Copilot's inline suggestions to polish, debug, or expand the code on the fly.</text:p>
        </text:list-item>
        <text:list-item>
          <text:p text:style-name="P5"><text:soft-page-break/></text:p>
        </text:list-item>
      </text:list>
      <text:p text:style-name="Horizontal_20_Line"/>
      <text:p text:style-name="P13">To help find the smoothest side-by-side setup for your project, let me know:</text:p>
      <text:list xml:id="list236886954" text:style-name="L4">
        <text:list-item>
          <text:p text:style-name="P11">Which <text:span text:style-name="T1">IDE/Code Editor</text:span> you are currently running Copilot in.</text:p>
        </text:list-item>
        <text:list-item>
          <text:p text:style-name="P11">If you have access to external free AI credits, such as a <text:span text:style-name="T1">Google AI Studio</text:span> key or an <text:span text:style-name="T1">OpenAI API</text:span> key.</text:p>
        </text:list-item>
        <text:list-item>
          <text:p text:style-name="P6"/>
        </text:list-item>
      </text:list>
      <text:p text:style-name="P7"/>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6-06-07T08:22:49.745899043</meta:creation-date>
    <dc:date>2026-06-07T10:04:37.452701091</dc:date>
    <meta:editing-duration>PT1H31M37S</meta:editing-duration>
    <meta:editing-cycles>1</meta:editing-cycles>
    <meta:document-statistic meta:table-count="0" meta:image-count="0" meta:object-count="0" meta:page-count="2" meta:paragraph-count="21" meta:word-count="399" meta:character-count="2383" meta:non-whitespace-character-count="2015"/>
    <meta:generator>LibreOffice/6.4.7.2$Linux_AARCH64 LibreOffice_project/40$Build-2</meta:generator>
  </office:meta>
</office:document-meta>
</file>