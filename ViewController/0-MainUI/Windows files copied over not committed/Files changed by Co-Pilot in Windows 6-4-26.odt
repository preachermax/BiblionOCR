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Understood — I’ll leave verification to you.<text:line-break/><text:line-break/>I changed these files: MyGrounder.py, MyBoxer.py, MyScanner.py, MyReader.py, MyPixler.py, MyPixlerGV.py, MyGlypher.py, Qt5GroundTruthReview.py.<text:line-break/><text:line-break/>If you find any problem in a specific file, tell me which one and I’ll fix or revert i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6-04T08:03:08.178000000</meta:creation-date>
    <dc:date>2026-06-04T22:00:34.881000000</dc:date>
    <meta:editing-duration>PT13H57M34S</meta:editing-duration>
    <meta:editing-cycles>1</meta:editing-cycles>
    <meta:document-statistic meta:table-count="0" meta:image-count="0" meta:object-count="0" meta:page-count="1" meta:paragraph-count="1" meta:word-count="37" meta:character-count="279" meta:non-whitespace-character-count="240"/>
    <meta:generator>LibreOffice/7.4.5.1$Windows_X86_64 LibreOffice_project/9c0871452b3918c1019dde9bfac75448afc4b57f</meta:generator>
  </office:meta>
</office:document-meta>
</file>