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FROMVS1" svg:font-family="FROMVS"/>
    <style:font-face style:name="FROMVS3_01" svg:font-family="FROMVS3_0"/>
    <style:font-face style:name="DejaVu Sans2" svg:font-family="'DejaVu Sans'" style:font-family-generic="swiss"/>
    <style:font-face style:name="FROMVS" svg:font-family="FROMVS" style:font-pitch="variable"/>
    <style:font-face style:name="FROMVS3_0" svg:font-family="FROMVS3_0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184.99pt"/>
    </style:style>
    <style:style style:name="co3" style:family="table-column">
      <style:table-column-properties fo:break-before="auto" style:column-width="71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59pt"/>
    </style:style>
    <style:style style:name="co6" style:family="table-column">
      <style:table-column-properties fo:break-before="auto" style:column-width="52.55pt"/>
    </style:style>
    <style:style style:name="co7" style:family="table-column">
      <style:table-column-properties fo:break-before="auto" style:column-width="54.85pt"/>
    </style:style>
    <style:style style:name="co8" style:family="table-column">
      <style:table-column-properties fo:break-before="auto" style:column-width="71.86pt"/>
    </style:style>
    <style:style style:name="co9" style:family="table-column">
      <style:table-column-properties fo:break-before="auto" style:column-width="220.31pt"/>
    </style:style>
    <style:style style:name="co10" style:family="table-column">
      <style:table-column-properties fo:break-before="auto" style:column-width="45.81pt"/>
    </style:style>
    <style:style style:name="co11" style:family="table-column">
      <style:table-column-properties fo:break-before="auto" style:column-width="240.66pt"/>
    </style:style>
    <style:style style:name="co12" style:family="table-column">
      <style:table-column-properties fo:break-before="auto" style:column-width="229.04pt"/>
    </style:style>
    <style:style style:name="co13" style:family="table-column">
      <style:table-column-properties fo:break-before="auto" style:column-width="189.41pt"/>
    </style:style>
    <style:style style:name="co14" style:family="table-column">
      <style:table-column-properties fo:break-before="auto" style:column-width="228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FROMVS"/>
    </style:style>
    <style:style style:name="ce3" style:family="table-cell" style:parent-style-name="Default">
      <style:text-properties style:font-name="FROMVS" style:font-name-asian="FROMVS1" style:font-name-complex="FROMVS1"/>
    </style:style>
    <style:style style:name="ce1" style:family="table-cell" style:parent-style-name="Default">
      <style:text-properties style:font-name="FROMVS"/>
    </style:style>
    <style:style style:name="ce11" style:family="table-cell" style:parent-style-name="Default">
      <style:text-properties style:font-name="DejaVu Sans1"/>
    </style:style>
    <style:style style:name="ce10" style:family="table-cell" style:parent-style-name="Default">
      <style:text-properties style:font-name="DejaVu Sans2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ext-properties style:font-name="FROMVS3_0"/>
    </style:style>
    <style:style style:name="ce21" style:family="table-cell" style:parent-style-name="Default">
      <style:text-properties style:font-name="FROMVS" style:font-name-asian="FROMVS3_01" style:font-name-complex="FROMVS3_01"/>
    </style:style>
    <style:style style:name="ce22" style:family="table-cell" style:parent-style-name="Default">
      <style:text-properties style:text-outline="false" style:text-line-through-style="none" style:text-line-through-type="none" style:font-name="FROMV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OMVS3_01" style:font-size-asian="10pt" style:language-asian="zh" style:country-asian="CN" style:font-style-asian="normal" style:font-weight-asian="normal" style:font-name-complex="FROMVS3_0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FROMVS1" style:font-name-asian="FROMVS1" style:font-name-complex="FROMVS1"/>
    </style:style>
    <style:style style:name="ce19" style:family="table-cell" style:parent-style-name="Default" style:data-style-name="N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FROMVS3_0" style:font-name-asian="FROMVS3_01" style:font-name-complex="FROMVS3_01"/>
    </style:style>
    <style:style style:name="ce16" style:family="table-cell" style:parent-style-name="Default">
      <style:text-properties style:font-name="FROMVS3_0" style:font-name-asian="FROMVS1" style:font-name-complex="FROMVS1"/>
    </style:style>
    <style:style style:name="ce12" style:family="table-cell" style:parent-style-name="Default">
      <style:text-properties style:font-name="FROMVS3_01" style:font-name-asian="FROMVS3_01" style:font-name-complex="FROMVS3_01"/>
    </style:style>
    <style:style style:name="ce17" style:family="table-cell" style:parent-style-name="Default">
      <style:text-properties style:text-outline="false" style:text-line-through-style="none" style:text-line-through-type="none" style:font-name="FROMVS3_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OMVS3_01" style:font-size-asian="10pt" style:language-asian="zh" style:country-asian="CN" style:font-style-asian="normal" style:font-weight-asian="normal" style:font-name-complex="FROMVS3_0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FROMVS3_01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MVS3_0_PU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xName2_1</text:p>
          </table:table-cell>
          <table:table-cell office:value-type="string" calcext:value-type="string">
            <text:p>Name2_1</text:p>
          </table:table-cell>
          <table:table-cell office:value-type="string" calcext:value-type="string">
            <text:p>Hex2_1</text:p>
          </table:table-cell>
          <table:table-cell table:style-name="ce2" office:value-type="string" calcext:value-type="string">
            <text:p>Glyph2_1</text:p>
          </table:table-cell>
          <table:table-cell office:value-type="string" calcext:value-type="string">
            <text:p>Norm3_0</text:p>
          </table:table-cell>
          <table:table-cell office:value-type="string" calcext:value-type="string">
            <text:p>Glyph3_0</text:p>
          </table:table-cell>
          <table:table-cell office:value-type="string" calcext:value-type="string">
            <text:p>Hex3_0</text:p>
          </table:table-cell>
          <table:table-cell office:value-type="string" calcext:value-type="string">
            <text:p>HexName3_0</text:p>
          </table:table-cell>
          <table:table-cell office:value-type="string" calcext:value-type="string">
            <text:p>Name3_0</text:p>
          </table:table-cell>
          <table:table-cell office:value-type="string" calcext:value-type="string">
            <text:p>SwapCheck</text:p>
          </table:table-cell>
        </table:table-row>
        <table:table-row table:style-name="ro1">
          <table:table-cell office:value-type="string" calcext:value-type="string">
            <text:p>0xE822</text:p>
          </table:table-cell>
          <table:table-cell office:value-type="string" calcext:value-type="string">
            <text:p>omega_perispomeni_nu</text:p>
          </table:table-cell>
          <table:table-cell table:formula="of:=RIGHT([.A2];4)" office:value-type="string" office:string-value="E822" calcext:value-type="string">
            <text:p>E822</text:p>
          </table:table-cell>
          <table:table-cell table:style-name="ce3" table:formula="of:=UNICHAR(HEX2DEC([.C2]))" office:value-type="string" office:string-value="" calcext:value-type="string">
            <text:p></text:p>
          </table:table-cell>
          <table:table-cell table:style-name="ce11" office:value-type="string" calcext:value-type="string">
            <text:p>ῶν</text:p>
          </table:table-cell>
          <table:table-cell table:style-name="ce21" office:value-type="string" calcext:value-type="string">
            <text:p></text:p>
          </table:table-cell>
          <table:table-cell table:formula="of:=DEC2HEX(UNICODE([.F2]))" office:value-type="string" office:string-value="E86F" calcext:value-type="string">
            <text:p>E86F</text:p>
          </table:table-cell>
          <table:table-cell table:formula="of:=CONCATENATE(&quot;0x&quot;;[.G2])" office:value-type="string" office:string-value="0xE86F" calcext:value-type="string">
            <text:p>0xE86F</text:p>
          </table:table-cell>
          <table:table-cell table:formula="of:=VLOOKUP([.H2];[$FROMVS_Names.$A$1:$FROMVS_Names.$B$151];2;0)" office:value-type="string" office:string-value="omega_perispomeni_nu" calcext:value-type="string">
            <text:p>omega_perispomeni_nu</text:p>
          </table:table-cell>
          <table:table-cell table:style-name="ce7" table:formula="of:=IF(EXACT([.C2];[.G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3</text:p>
          </table:table-cell>
          <table:table-cell/>
          <table:table-cell table:formula="of:=RIGHT([.A3];4)" office:value-type="string" office:string-value="E823" calcext:value-type="string">
            <text:p>E823</text:p>
          </table:table-cell>
          <table:table-cell table:style-name="ce3" table:formula="of:=UNICHAR(HEX2DEC([.C3]))" office:value-type="string" office:string-value="" calcext:value-type="string">
            <text:p></text:p>
          </table:table-cell>
          <table:table-cell office:value-type="string" calcext:value-type="string">
            <text:p>ων</text:p>
          </table:table-cell>
          <table:table-cell table:style-name="ce21" office:value-type="string" calcext:value-type="string">
            <text:p></text:p>
          </table:table-cell>
          <table:table-cell table:formula="of:=DEC2HEX(UNICODE([.F3]))" office:value-type="string" office:string-value="E86E" calcext:value-type="string">
            <text:p>E86E</text:p>
          </table:table-cell>
          <table:table-cell table:formula="of:=CONCATENATE(&quot;0x&quot;;[.G3])" office:value-type="string" office:string-value="0xE86E" calcext:value-type="string">
            <text:p>0xE86E</text:p>
          </table:table-cell>
          <table:table-cell table:formula="of:=VLOOKUP([.H3];[$FROMVS_Names.$A$1:$FROMVS_Names.$B$151];2;0)" office:value-type="string" office:string-value="omega_nu_2" calcext:value-type="string">
            <text:p>omega_nu_2</text:p>
          </table:table-cell>
          <table:table-cell table:style-name="ce7" table:formula="of:=IF(EXACT([.C3];[.G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9</text:p>
          </table:table-cell>
          <table:table-cell office:value-type="string" calcext:value-type="string">
            <text:p>omicron_sigma_2</text:p>
          </table:table-cell>
          <table:table-cell table:formula="of:=RIGHT([.A4];4)" office:value-type="string" office:string-value="E839" calcext:value-type="string">
            <text:p>E839</text:p>
          </table:table-cell>
          <table:table-cell table:style-name="ce3" table:formula="of:=UNICHAR(HEX2DEC([.C4]))" office:value-type="string" office:string-value="" calcext:value-type="string">
            <text:p></text:p>
          </table:table-cell>
          <table:table-cell office:value-type="string" calcext:value-type="string">
            <text:p>οσ</text:p>
          </table:table-cell>
          <table:table-cell table:style-name="ce3" office:value-type="string" calcext:value-type="string">
            <text:p></text:p>
          </table:table-cell>
          <table:table-cell table:formula="of:=DEC2HEX(UNICODE([.F4]))" office:value-type="string" office:string-value="E86C" calcext:value-type="string">
            <text:p>E86C</text:p>
          </table:table-cell>
          <table:table-cell table:formula="of:=CONCATENATE(&quot;0x&quot;;[.G4])" office:value-type="string" office:string-value="0xE86C" calcext:value-type="string">
            <text:p>0xE86C</text:p>
          </table:table-cell>
          <table:table-cell table:formula="of:=VLOOKUP([.H4];[$FROMVS_Names.$A$1:$FROMVS_Names.$B$151];2;0)" office:value-type="string" office:string-value="omicron_sigma_2" calcext:value-type="string">
            <text:p>omicron_sigma_2</text:p>
          </table:table-cell>
          <table:table-cell table:style-name="ce7" table:formula="of:=IF(EXACT([.C4];[.G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A</text:p>
          </table:table-cell>
          <table:table-cell office:value-type="string" calcext:value-type="string">
            <text:p>omicron_iota_perispomeni_sigma2</text:p>
          </table:table-cell>
          <table:table-cell table:formula="of:=RIGHT([.A5];4)" office:value-type="string" office:string-value="E83A" calcext:value-type="string">
            <text:p>E83A</text:p>
          </table:table-cell>
          <table:table-cell table:style-name="ce3" table:formula="of:=UNICHAR(HEX2DEC([.C5]))" office:value-type="string" office:string-value="" calcext:value-type="string">
            <text:p></text:p>
          </table:table-cell>
          <table:table-cell office:value-type="string" calcext:value-type="string">
            <text:p>ο<text:span text:style-name="T1">ῖσ</text:span></text:p>
          </table:table-cell>
          <table:table-cell table:style-name="ce3" office:value-type="string" calcext:value-type="string">
            <text:p></text:p>
          </table:table-cell>
          <table:table-cell table:formula="of:=DEC2HEX(UNICODE([.F5]))" office:value-type="string" office:string-value="E86B" calcext:value-type="string">
            <text:p>E86B</text:p>
          </table:table-cell>
          <table:table-cell table:formula="of:=CONCATENATE(&quot;0x&quot;;[.G5])" office:value-type="string" office:string-value="0xE86B" calcext:value-type="string">
            <text:p>0xE86B</text:p>
          </table:table-cell>
          <table:table-cell table:formula="of:=VLOOKUP([.H5];[$FROMVS_Names.$A$1:$FROMVS_Names.$B$151];2;0)" office:value-type="string" office:string-value="omicron_iota_perispomeni_sigma" calcext:value-type="string">
            <text:p>omicron_iota_perispomeni_sigma</text:p>
          </table:table-cell>
          <table:table-cell table:style-name="ce7" table:formula="of:=IF(EXACT([.C5];[.G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5</text:p>
          </table:table-cell>
          <table:table-cell office:value-type="string" calcext:value-type="string">
            <text:p>iota_sigma</text:p>
          </table:table-cell>
          <table:table-cell table:formula="of:=RIGHT([.A6];4)" office:value-type="string" office:string-value="E825" calcext:value-type="string">
            <text:p>E825</text:p>
          </table:table-cell>
          <table:table-cell table:style-name="ce3" table:formula="of:=UNICHAR(HEX2DEC([.C6]))" office:value-type="string" office:string-value="" calcext:value-type="string">
            <text:p></text:p>
          </table:table-cell>
          <table:table-cell office:value-type="string" calcext:value-type="string">
            <text:p>ισ</text:p>
          </table:table-cell>
          <table:table-cell table:style-name="ce21" office:value-type="string" calcext:value-type="string">
            <text:p></text:p>
          </table:table-cell>
          <table:table-cell table:formula="of:=DEC2HEX(UNICODE([.F6]))" office:value-type="string" office:string-value="E86A" calcext:value-type="string">
            <text:p>E86A</text:p>
          </table:table-cell>
          <table:table-cell table:formula="of:=CONCATENATE(&quot;0x&quot;;[.G6])" office:value-type="string" office:string-value="0xE86A" calcext:value-type="string">
            <text:p>0xE86A</text:p>
          </table:table-cell>
          <table:table-cell table:formula="of:=VLOOKUP([.H6];[$FROMVS_Names.$A$1:$FROMVS_Names.$B$151];2;0)" office:value-type="string" office:string-value="iota_sigma" calcext:value-type="string">
            <text:p>iota_sigma</text:p>
          </table:table-cell>
          <table:table-cell table:style-name="ce7" table:formula="of:=IF(EXACT([.C6];[.G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7</text:p>
          </table:table-cell>
          <table:table-cell office:value-type="string" calcext:value-type="string">
            <text:p>iota_perispomeni_nu</text:p>
          </table:table-cell>
          <table:table-cell table:formula="of:=RIGHT([.A7];4)" office:value-type="string" office:string-value="E827" calcext:value-type="string">
            <text:p>E827</text:p>
          </table:table-cell>
          <table:table-cell table:style-name="ce3" table:formula="of:=UNICHAR(HEX2DEC([.C7]))" office:value-type="string" office:string-value="" calcext:value-type="string">
            <text:p></text:p>
          </table:table-cell>
          <table:table-cell table:style-name="ce11" office:value-type="string" calcext:value-type="string">
            <text:p>ῖν</text:p>
          </table:table-cell>
          <table:table-cell table:style-name="ce21" office:value-type="string" calcext:value-type="string">
            <text:p></text:p>
          </table:table-cell>
          <table:table-cell table:formula="of:=DEC2HEX(UNICODE([.F7]))" office:value-type="string" office:string-value="E869" calcext:value-type="string">
            <text:p>E869</text:p>
          </table:table-cell>
          <table:table-cell table:formula="of:=CONCATENATE(&quot;0x&quot;;[.G7])" office:value-type="string" office:string-value="0xE869" calcext:value-type="string">
            <text:p>0xE869</text:p>
          </table:table-cell>
          <table:table-cell table:formula="of:=VLOOKUP([.H7];[$FROMVS_Names.$A$1:$FROMVS_Names.$B$151];2;0)" office:value-type="string" office:string-value="iota_perispomeni_nu" calcext:value-type="string">
            <text:p>iota_perispomeni_nu</text:p>
          </table:table-cell>
          <table:table-cell table:style-name="ce7" table:formula="of:=IF(EXACT([.C7];[.G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4</text:p>
          </table:table-cell>
          <table:table-cell office:value-type="string" calcext:value-type="string">
            <text:p>iota_nu</text:p>
          </table:table-cell>
          <table:table-cell table:formula="of:=RIGHT([.A8];4)" office:value-type="string" office:string-value="E834" calcext:value-type="string">
            <text:p>E834</text:p>
          </table:table-cell>
          <table:table-cell table:style-name="ce3" table:formula="of:=UNICHAR(HEX2DEC([.C8]))" office:value-type="string" office:string-value="" calcext:value-type="string">
            <text:p></text:p>
          </table:table-cell>
          <table:table-cell office:value-type="string" calcext:value-type="string">
            <text:p>ιν</text:p>
          </table:table-cell>
          <table:table-cell table:style-name="ce3" office:value-type="string" calcext:value-type="string">
            <text:p></text:p>
          </table:table-cell>
          <table:table-cell table:formula="of:=DEC2HEX(UNICODE([.F8]))" office:value-type="string" office:string-value="E868" calcext:value-type="string">
            <text:p>E868</text:p>
          </table:table-cell>
          <table:table-cell table:formula="of:=CONCATENATE(&quot;0x&quot;;[.G8])" office:value-type="string" office:string-value="0xE868" calcext:value-type="string">
            <text:p>0xE868</text:p>
          </table:table-cell>
          <table:table-cell table:formula="of:=VLOOKUP([.H8];[$FROMVS_Names.$A$1:$FROMVS_Names.$B$151];2;0)" office:value-type="string" office:string-value="iota_nu" calcext:value-type="string">
            <text:p>iota_nu</text:p>
          </table:table-cell>
          <table:table-cell table:style-name="ce7" table:formula="of:=IF(EXACT([.C8];[.G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D</text:p>
          </table:table-cell>
          <table:table-cell office:value-type="string" calcext:value-type="string">
            <text:p>epsilon_nu_2</text:p>
          </table:table-cell>
          <table:table-cell table:formula="of:=RIGHT([.A9];4)" office:value-type="string" office:string-value="E83D" calcext:value-type="string">
            <text:p>E83D</text:p>
          </table:table-cell>
          <table:table-cell table:style-name="ce3" table:formula="of:=UNICHAR(HEX2DEC([.C9]))" office:value-type="string" office:string-value="" calcext:value-type="string">
            <text:p></text:p>
          </table:table-cell>
          <table:table-cell office:value-type="string" calcext:value-type="string">
            <text:p>εν</text:p>
          </table:table-cell>
          <table:table-cell table:style-name="ce3" office:value-type="string" calcext:value-type="string">
            <text:p></text:p>
          </table:table-cell>
          <table:table-cell table:formula="of:=DEC2HEX(UNICODE([.F9]))" office:value-type="string" office:string-value="E867" calcext:value-type="string">
            <text:p>E867</text:p>
          </table:table-cell>
          <table:table-cell table:formula="of:=CONCATENATE(&quot;0x&quot;;[.G9])" office:value-type="string" office:string-value="0xE867" calcext:value-type="string">
            <text:p>0xE867</text:p>
          </table:table-cell>
          <table:table-cell table:formula="of:=VLOOKUP([.H9];[$FROMVS_Names.$A$1:$FROMVS_Names.$B$151];2;0)" office:value-type="string" office:string-value="epsilon_nu_2" calcext:value-type="string">
            <text:p>epsilon_nu_2</text:p>
          </table:table-cell>
          <table:table-cell table:style-name="ce7" table:formula="of:=IF(EXACT([.C9];[.G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C</text:p>
          </table:table-cell>
          <table:table-cell office:value-type="string" calcext:value-type="string">
            <text:p>epsilon_nu</text:p>
          </table:table-cell>
          <table:table-cell table:formula="of:=RIGHT([.A10];4)" office:value-type="string" office:string-value="E83C" calcext:value-type="string">
            <text:p>E83C</text:p>
          </table:table-cell>
          <table:table-cell table:style-name="ce3" table:formula="of:=UNICHAR(HEX2DEC([.C10]))" office:value-type="string" office:string-value="" calcext:value-type="string">
            <text:p></text:p>
          </table:table-cell>
          <table:table-cell office:value-type="string" calcext:value-type="string">
            <text:p>εν</text:p>
          </table:table-cell>
          <table:table-cell table:style-name="ce3" office:value-type="string" calcext:value-type="string">
            <text:p></text:p>
          </table:table-cell>
          <table:table-cell table:formula="of:=DEC2HEX(UNICODE([.F10]))" office:value-type="string" office:string-value="E866" calcext:value-type="string">
            <text:p>E866</text:p>
          </table:table-cell>
          <table:table-cell table:formula="of:=CONCATENATE(&quot;0x&quot;;[.G10])" office:value-type="string" office:string-value="0xE866" calcext:value-type="string">
            <text:p>0xE866</text:p>
          </table:table-cell>
          <table:table-cell table:formula="of:=VLOOKUP([.H10];[$FROMVS_Names.$A$1:$FROMVS_Names.$B$151];2;0)" office:value-type="string" office:string-value="epsilon_nu" calcext:value-type="string">
            <text:p>epsilon_nu</text:p>
          </table:table-cell>
          <table:table-cell table:style-name="ce7" table:formula="of:=IF(EXACT([.C10];[.G1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B</text:p>
          </table:table-cell>
          <table:table-cell office:value-type="string" calcext:value-type="string">
            <text:p>epsilon_iota_sigma</text:p>
          </table:table-cell>
          <table:table-cell table:formula="of:=RIGHT([.A11];4)" office:value-type="string" office:string-value="E82B" calcext:value-type="string">
            <text:p>E82B</text:p>
          </table:table-cell>
          <table:table-cell table:style-name="ce3" table:formula="of:=UNICHAR(HEX2DEC([.C11]))" office:value-type="string" office:string-value="" calcext:value-type="string">
            <text:p></text:p>
          </table:table-cell>
          <table:table-cell office:value-type="string" calcext:value-type="string">
            <text:p>εισ</text:p>
          </table:table-cell>
          <table:table-cell table:style-name="ce21" office:value-type="string" calcext:value-type="string">
            <text:p></text:p>
          </table:table-cell>
          <table:table-cell table:formula="of:=DEC2HEX(UNICODE([.F11]))" office:value-type="string" office:string-value="E865" calcext:value-type="string">
            <text:p>E865</text:p>
          </table:table-cell>
          <table:table-cell table:formula="of:=CONCATENATE(&quot;0x&quot;;[.G11])" office:value-type="string" office:string-value="0xE865" calcext:value-type="string">
            <text:p>0xE865</text:p>
          </table:table-cell>
          <table:table-cell table:formula="of:=VLOOKUP([.H11];[$FROMVS_Names.$A$1:$FROMVS_Names.$B$151];2;0)" office:value-type="string" office:string-value="epsilon_iota_sigma" calcext:value-type="string">
            <text:p>epsilon_iota_sigma</text:p>
          </table:table-cell>
          <table:table-cell table:style-name="ce7" table:formula="of:=IF(EXACT([.C11];[.G1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5</text:p>
          </table:table-cell>
          <table:table-cell office:value-type="string" calcext:value-type="string">
            <text:p>alpha_perispomeni_sigma</text:p>
          </table:table-cell>
          <table:table-cell table:formula="of:=RIGHT([.A12];4)" office:value-type="string" office:string-value="E835" calcext:value-type="string">
            <text:p>E835</text:p>
          </table:table-cell>
          <table:table-cell table:style-name="ce3" table:formula="of:=UNICHAR(HEX2DEC([.C12]))" office:value-type="string" office:string-value="" calcext:value-type="string">
            <text:p></text:p>
          </table:table-cell>
          <table:table-cell table:style-name="ce11" office:value-type="string" calcext:value-type="string">
            <text:p>ᾶσ</text:p>
          </table:table-cell>
          <table:table-cell table:style-name="ce3" office:value-type="string" calcext:value-type="string">
            <text:p></text:p>
          </table:table-cell>
          <table:table-cell table:formula="of:=DEC2HEX(UNICODE([.F12]))" office:value-type="string" office:string-value="E864" calcext:value-type="string">
            <text:p>E864</text:p>
          </table:table-cell>
          <table:table-cell table:formula="of:=CONCATENATE(&quot;0x&quot;;[.G12])" office:value-type="string" office:string-value="0xE864" calcext:value-type="string">
            <text:p>0xE864</text:p>
          </table:table-cell>
          <table:table-cell table:formula="of:=VLOOKUP([.H12];[$FROMVS_Names.$A$1:$FROMVS_Names.$B$151];2;0)" office:value-type="string" office:string-value="alpha_perispomeni_sigma" calcext:value-type="string">
            <text:p>alpha_perispomeni_sigma</text:p>
          </table:table-cell>
          <table:table-cell table:style-name="ce7" table:formula="of:=IF(EXACT([.C12];[.G1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B</text:p>
          </table:table-cell>
          <table:table-cell office:value-type="string" calcext:value-type="string">
            <text:p>alpha_sigma_2</text:p>
          </table:table-cell>
          <table:table-cell table:formula="of:=RIGHT([.A13];4)" office:value-type="string" office:string-value="E83B" calcext:value-type="string">
            <text:p>E83B</text:p>
          </table:table-cell>
          <table:table-cell table:style-name="ce3" table:formula="of:=UNICHAR(HEX2DEC([.C13]))" office:value-type="string" office:string-value="" calcext:value-type="string">
            <text:p></text:p>
          </table:table-cell>
          <table:table-cell office:value-type="string" calcext:value-type="string">
            <text:p>ασ</text:p>
          </table:table-cell>
          <table:table-cell table:style-name="ce3" office:value-type="string" calcext:value-type="string">
            <text:p></text:p>
          </table:table-cell>
          <table:table-cell table:formula="of:=DEC2HEX(UNICODE([.F13]))" office:value-type="string" office:string-value="E863" calcext:value-type="string">
            <text:p>E863</text:p>
          </table:table-cell>
          <table:table-cell table:formula="of:=CONCATENATE(&quot;0x&quot;;[.G13])" office:value-type="string" office:string-value="0xE863" calcext:value-type="string">
            <text:p>0xE863</text:p>
          </table:table-cell>
          <table:table-cell table:formula="of:=VLOOKUP([.H13];[$FROMVS_Names.$A$1:$FROMVS_Names.$B$151];2;0)" office:value-type="string" office:string-value="alpha_sigma_2" calcext:value-type="string">
            <text:p>alpha_sigma_2</text:p>
          </table:table-cell>
          <table:table-cell table:style-name="ce7" table:formula="of:=IF(EXACT([.C13];[.G1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8</text:p>
          </table:table-cell>
          <table:table-cell office:value-type="string" calcext:value-type="string">
            <text:p>alpha_iota_perispomeni_sigma</text:p>
          </table:table-cell>
          <table:table-cell table:formula="of:=RIGHT([.A14];4)" office:value-type="string" office:string-value="E838" calcext:value-type="string">
            <text:p>E838</text:p>
          </table:table-cell>
          <table:table-cell table:style-name="ce3" table:formula="of:=UNICHAR(HEX2DEC([.C14]))" office:value-type="string" office:string-value="" calcext:value-type="string">
            <text:p></text:p>
          </table:table-cell>
          <table:table-cell table:style-name="ce10" office:value-type="string" calcext:value-type="string">
            <text:p>αῖσ</text:p>
          </table:table-cell>
          <table:table-cell table:style-name="ce3" office:value-type="string" calcext:value-type="string">
            <text:p></text:p>
          </table:table-cell>
          <table:table-cell table:formula="of:=DEC2HEX(UNICODE([.F14]))" office:value-type="string" office:string-value="E862" calcext:value-type="string">
            <text:p>E862</text:p>
          </table:table-cell>
          <table:table-cell table:formula="of:=CONCATENATE(&quot;0x&quot;;[.G14])" office:value-type="string" office:string-value="0xE862" calcext:value-type="string">
            <text:p>0xE862</text:p>
          </table:table-cell>
          <table:table-cell table:formula="of:=VLOOKUP([.H14];[$FROMVS_Names.$A$1:$FROMVS_Names.$B$151];2;0)" office:value-type="string" office:string-value="alpha_iota_perispomeni_sigma" calcext:value-type="string">
            <text:p>alpha_iota_perispomeni_sigma</text:p>
          </table:table-cell>
          <table:table-cell table:style-name="ce7" table:formula="of:=IF(EXACT([.C14];[.G1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7</text:p>
          </table:table-cell>
          <table:table-cell office:value-type="string" calcext:value-type="string">
            <text:p>alpha_nu_2</text:p>
          </table:table-cell>
          <table:table-cell table:formula="of:=RIGHT([.A15];4)" office:value-type="string" office:string-value="E837" calcext:value-type="string">
            <text:p>E837</text:p>
          </table:table-cell>
          <table:table-cell table:style-name="ce3" table:formula="of:=UNICHAR(HEX2DEC([.C15]))" office:value-type="string" office:string-value="" calcext:value-type="string">
            <text:p></text:p>
          </table:table-cell>
          <table:table-cell office:value-type="string" calcext:value-type="string">
            <text:p>αν</text:p>
          </table:table-cell>
          <table:table-cell table:style-name="ce21" office:value-type="string" calcext:value-type="string">
            <text:p></text:p>
          </table:table-cell>
          <table:table-cell table:formula="of:=DEC2HEX(UNICODE([.F15]))" office:value-type="string" office:string-value="E861" calcext:value-type="string">
            <text:p>E861</text:p>
          </table:table-cell>
          <table:table-cell table:formula="of:=CONCATENATE(&quot;0x&quot;;[.G15])" office:value-type="string" office:string-value="0xE861" calcext:value-type="string">
            <text:p>0xE861</text:p>
          </table:table-cell>
          <table:table-cell table:formula="of:=VLOOKUP([.H15];[$FROMVS_Names.$A$1:$FROMVS_Names.$B$151];2;0)" office:value-type="string" office:string-value="alpha_nu_2" calcext:value-type="string">
            <text:p>alpha_nu_2</text:p>
          </table:table-cell>
          <table:table-cell table:style-name="ce7" table:formula="of:=IF(EXACT([.C15];[.G1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4</text:p>
          </table:table-cell>
          <table:table-cell office:value-type="string" calcext:value-type="string">
            <text:p>alpha_nu_1</text:p>
          </table:table-cell>
          <table:table-cell table:formula="of:=RIGHT([.A16];4)" office:value-type="string" office:string-value="E824" calcext:value-type="string">
            <text:p>E824</text:p>
          </table:table-cell>
          <table:table-cell table:style-name="ce3" table:formula="of:=UNICHAR(HEX2DEC([.C16]))" office:value-type="string" office:string-value="" calcext:value-type="string">
            <text:p></text:p>
          </table:table-cell>
          <table:table-cell office:value-type="string" calcext:value-type="string">
            <text:p>αν</text:p>
          </table:table-cell>
          <table:table-cell table:style-name="ce21" office:value-type="string" calcext:value-type="string">
            <text:p></text:p>
          </table:table-cell>
          <table:table-cell table:formula="of:=DEC2HEX(UNICODE([.F16]))" office:value-type="string" office:string-value="E860" calcext:value-type="string">
            <text:p>E860</text:p>
          </table:table-cell>
          <table:table-cell table:formula="of:=CONCATENATE(&quot;0x&quot;;[.G16])" office:value-type="string" office:string-value="0xE860" calcext:value-type="string">
            <text:p>0xE860</text:p>
          </table:table-cell>
          <table:table-cell table:formula="of:=VLOOKUP([.H16];[$FROMVS_Names.$A$1:$FROMVS_Names.$B$151];2;0)" office:value-type="string" office:string-value="alpha_nu" calcext:value-type="string">
            <text:p>alpha_nu</text:p>
          </table:table-cell>
          <table:table-cell table:style-name="ce7" table:formula="of:=IF(EXACT([.C16];[.G1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1</text:p>
          </table:table-cell>
          <table:table-cell office:value-type="string" calcext:value-type="string">
            <text:p>slant_2</text:p>
          </table:table-cell>
          <table:table-cell table:formula="of:=RIGHT([.A17];4)" office:value-type="string" office:string-value="E821" calcext:value-type="string">
            <text:p>E821</text:p>
          </table:table-cell>
          <table:table-cell table:style-name="ce3" table:formula="of:=UNICHAR(HEX2DEC([.C17]))" office:value-type="string" office:string-value="" calcext:value-type="string">
            <text:p></text:p>
          </table:table-cell>
          <table:table-cell/>
          <table:table-cell table:style-name="ce21" office:value-type="string" calcext:value-type="string">
            <text:p></text:p>
          </table:table-cell>
          <table:table-cell table:formula="of:=DEC2HEX(UNICODE([.F17]))" office:value-type="string" office:string-value="E841" calcext:value-type="string">
            <text:p>E841</text:p>
          </table:table-cell>
          <table:table-cell table:formula="of:=CONCATENATE(&quot;0x&quot;;[.G17])" office:value-type="string" office:string-value="0xE841" calcext:value-type="string">
            <text:p>0xE841</text:p>
          </table:table-cell>
          <table:table-cell table:formula="of:=VLOOKUP([.H17];[$FROMVS_Names.$A$1:$FROMVS_Names.$B$151];2;0)" office:value-type="string" office:string-value="slant_2" calcext:value-type="string">
            <text:p>slant_2</text:p>
          </table:table-cell>
          <table:table-cell table:style-name="ce7" table:formula="of:=IF(EXACT([.C17];[.G1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0</text:p>
          </table:table-cell>
          <table:table-cell office:value-type="string" calcext:value-type="string">
            <text:p>slant_1</text:p>
          </table:table-cell>
          <table:table-cell table:formula="of:=RIGHT([.A18];4)" office:value-type="string" office:string-value="E820" calcext:value-type="string">
            <text:p>E820</text:p>
          </table:table-cell>
          <table:table-cell table:style-name="ce3" table:formula="of:=UNICHAR(HEX2DEC([.C18]))" office:value-type="string" office:string-value="" calcext:value-type="string">
            <text:p></text:p>
          </table:table-cell>
          <table:table-cell/>
          <table:table-cell table:style-name="ce21" office:value-type="string" calcext:value-type="string">
            <text:p></text:p>
          </table:table-cell>
          <table:table-cell table:formula="of:=DEC2HEX(UNICODE([.F18]))" office:value-type="string" office:string-value="E840" calcext:value-type="string">
            <text:p>E840</text:p>
          </table:table-cell>
          <table:table-cell table:formula="of:=CONCATENATE(&quot;0x&quot;;[.G18])" office:value-type="string" office:string-value="0xE840" calcext:value-type="string">
            <text:p>0xE840</text:p>
          </table:table-cell>
          <table:table-cell table:formula="of:=VLOOKUP([.H18];[$FROMVS_Names.$A$1:$FROMVS_Names.$B$151];2;0)" office:value-type="string" office:string-value="slant_1" calcext:value-type="string">
            <text:p>slant_1</text:p>
          </table:table-cell>
          <table:table-cell table:style-name="ce7" table:formula="of:=IF(EXACT([.C18];[.G1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0</text:p>
          </table:table-cell>
          <table:table-cell office:value-type="string" calcext:value-type="string">
            <text:p>omega_perispomeni_sigma</text:p>
          </table:table-cell>
          <table:table-cell table:formula="of:=RIGHT([.A19];4)" office:value-type="string" office:string-value="E830" calcext:value-type="string">
            <text:p>E830</text:p>
          </table:table-cell>
          <table:table-cell table:style-name="ce3" table:formula="of:=UNICHAR(HEX2DEC([.C19]))" office:value-type="string" office:string-value="" calcext:value-type="string">
            <text:p></text:p>
          </table:table-cell>
          <table:table-cell office:value-type="string" calcext:value-type="string">
            <text:p><text:span text:style-name="T1">ῶ</text:span>σ</text:p>
          </table:table-cell>
          <table:table-cell table:style-name="ce3" office:value-type="string" calcext:value-type="string">
            <text:p></text:p>
          </table:table-cell>
          <table:table-cell table:formula="of:=DEC2HEX(UNICODE([.F19]))" office:value-type="string" office:string-value="E820" calcext:value-type="string">
            <text:p>E820</text:p>
          </table:table-cell>
          <table:table-cell table:formula="of:=CONCATENATE(&quot;0x&quot;;[.G19])" office:value-type="string" office:string-value="0xE820" calcext:value-type="string">
            <text:p>0xE820</text:p>
          </table:table-cell>
          <table:table-cell table:formula="of:=VLOOKUP([.H19];[$FROMVS_Names.$A$1:$FROMVS_Names.$B$151];2;0)" office:value-type="string" office:string-value="omega_perispomeni_sigma" calcext:value-type="string">
            <text:p>omega_perispomeni_sigma</text:p>
          </table:table-cell>
          <table:table-cell table:style-name="ce7" table:formula="of:=IF(EXACT([.C19];[.G1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10</text:p>
          </table:table-cell>
          <table:table-cell office:value-type="string" calcext:value-type="string">
            <text:p>chi_rho</text:p>
          </table:table-cell>
          <table:table-cell table:formula="of:=RIGHT([.A20];4)" office:value-type="string" office:string-value="E810" calcext:value-type="string">
            <text:p>E810</text:p>
          </table:table-cell>
          <table:table-cell table:style-name="ce3" table:formula="of:=UNICHAR(HEX2DEC([.C20]))" office:value-type="string" office:string-value="" calcext:value-type="string">
            <text:p></text:p>
          </table:table-cell>
          <table:table-cell office:value-type="string" calcext:value-type="string">
            <text:p>χρ</text:p>
          </table:table-cell>
          <table:table-cell table:style-name="ce21" office:value-type="string" calcext:value-type="string">
            <text:p></text:p>
          </table:table-cell>
          <table:table-cell table:formula="of:=DEC2HEX(UNICODE([.F20]))" office:value-type="string" office:string-value="E811" calcext:value-type="string">
            <text:p>E811</text:p>
          </table:table-cell>
          <table:table-cell table:formula="of:=CONCATENATE(&quot;0x&quot;;[.G20])" office:value-type="string" office:string-value="0xE811" calcext:value-type="string">
            <text:p>0xE811</text:p>
          </table:table-cell>
          <table:table-cell table:formula="of:=VLOOKUP([.H20];[$FROMVS_Names.$A$1:$FROMVS_Names.$B$151];2;0)" office:value-type="string" office:string-value="chi_rho" calcext:value-type="string">
            <text:p>chi_rho</text:p>
          </table:table-cell>
          <table:table-cell table:style-name="ce7" table:formula="of:=IF(EXACT([.C20];[.G2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F</text:p>
          </table:table-cell>
          <table:table-cell office:value-type="string" calcext:value-type="string">
            <text:p>chi_psili</text:p>
          </table:table-cell>
          <table:table-cell table:formula="of:=RIGHT([.A21];4)" office:value-type="string" office:string-value="E82F" calcext:value-type="string">
            <text:p>E82F</text:p>
          </table:table-cell>
          <table:table-cell table:style-name="ce3" table:formula="of:=UNICHAR(HEX2DEC([.C21]))" office:value-type="string" office:string-value="" calcext:value-type="string">
            <text:p></text:p>
          </table:table-cell>
          <table:table-cell office:value-type="string" calcext:value-type="string">
            <text:p>χ'</text:p>
          </table:table-cell>
          <table:table-cell table:style-name="ce3" office:value-type="string" calcext:value-type="string">
            <text:p></text:p>
          </table:table-cell>
          <table:table-cell table:formula="of:=DEC2HEX(UNICODE([.F21]))" office:value-type="string" office:string-value="E810" calcext:value-type="string">
            <text:p>E810</text:p>
          </table:table-cell>
          <table:table-cell table:formula="of:=CONCATENATE(&quot;0x&quot;;[.G21])" office:value-type="string" office:string-value="0xE810" calcext:value-type="string">
            <text:p>0xE810</text:p>
          </table:table-cell>
          <table:table-cell table:formula="of:=VLOOKUP([.H21];[$FROMVS_Names.$A$1:$FROMVS_Names.$B$151];2;0)" office:value-type="string" office:string-value="chi_psili" calcext:value-type="string">
            <text:p>chi_psili</text:p>
          </table:table-cell>
          <table:table-cell table:style-name="ce7" table:formula="of:=IF(EXACT([.C21];[.G2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5</text:p>
          </table:table-cell>
          <table:table-cell office:value-type="string" calcext:value-type="string">
            <text:p>upsilon_psili_perispomeni_nu</text:p>
          </table:table-cell>
          <table:table-cell table:formula="of:=RIGHT([.A22];4)" office:value-type="string" office:string-value="E7F5" calcext:value-type="string">
            <text:p>E7F5</text:p>
          </table:table-cell>
          <table:table-cell table:style-name="ce3" table:formula="of:=UNICHAR(HEX2DEC([.C22]))" office:value-type="string" office:string-value="" calcext:value-type="string">
            <text:p></text:p>
          </table:table-cell>
          <table:table-cell office:value-type="string" calcext:value-type="string">
            <text:p>ὖν</text:p>
          </table:table-cell>
          <table:table-cell table:style-name="ce3" office:value-type="string" calcext:value-type="string">
            <text:p></text:p>
          </table:table-cell>
          <table:table-cell table:formula="of:=DEC2HEX(UNICODE([.F22]))" office:value-type="string" office:string-value="E7FC" calcext:value-type="string">
            <text:p>E7FC</text:p>
          </table:table-cell>
          <table:table-cell table:formula="of:=CONCATENATE(&quot;0x&quot;;[.G22])" office:value-type="string" office:string-value="0xE7FC" calcext:value-type="string">
            <text:p>0xE7FC</text:p>
          </table:table-cell>
          <table:table-cell table:style-name="ce19" table:formula="of:=VLOOKUP([.H22];[$FROMVS_Names.$A$1:$FROMVS_Names.$B$151];2;0)" office:value-type="string" office:string-value="upsilon_psili_perispomeni_nu" calcext:value-type="string">
            <text:p>upsilon_psili_perispomeni_nu</text:p>
          </table:table-cell>
          <table:table-cell table:style-name="ce7" table:formula="of:=IF(EXACT([.C22];[.G2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3</text:p>
          </table:table-cell>
          <table:table-cell office:value-type="string" calcext:value-type="string">
            <text:p>upsilon_perispomeni_nu</text:p>
          </table:table-cell>
          <table:table-cell table:formula="of:=RIGHT([.A23];4)" office:value-type="string" office:string-value="E7F3" calcext:value-type="string">
            <text:p>E7F3</text:p>
          </table:table-cell>
          <table:table-cell table:style-name="ce3" table:formula="of:=UNICHAR(HEX2DEC([.C23]))" office:value-type="string" office:string-value="" calcext:value-type="string">
            <text:p></text:p>
          </table:table-cell>
          <table:table-cell office:value-type="string" calcext:value-type="string">
            <text:p>ῦν</text:p>
          </table:table-cell>
          <table:table-cell table:style-name="ce3" office:value-type="string" calcext:value-type="string">
            <text:p></text:p>
          </table:table-cell>
          <table:table-cell table:formula="of:=DEC2HEX(UNICODE([.F23]))" office:value-type="string" office:string-value="E7FB" calcext:value-type="string">
            <text:p>E7FB</text:p>
          </table:table-cell>
          <table:table-cell table:formula="of:=CONCATENATE(&quot;0x&quot;;[.G23])" office:value-type="string" office:string-value="0xE7FB" calcext:value-type="string">
            <text:p>0xE7FB</text:p>
          </table:table-cell>
          <table:table-cell table:style-name="ce19" table:formula="of:=VLOOKUP([.H23];[$FROMVS_Names.$A$1:$FROMVS_Names.$B$151];2;0)" office:value-type="string" office:string-value="upsilon_perispomeni" calcext:value-type="string">
            <text:p>upsilon_perispomeni</text:p>
          </table:table-cell>
          <table:table-cell table:style-name="ce7" table:formula="of:=IF(EXACT([.C23];[.G2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2</text:p>
          </table:table-cell>
          <table:table-cell office:value-type="string" calcext:value-type="string">
            <text:p>upsilon_varia_nu</text:p>
          </table:table-cell>
          <table:table-cell table:formula="of:=RIGHT([.A24];4)" office:value-type="string" office:string-value="E832" calcext:value-type="string">
            <text:p>E832</text:p>
          </table:table-cell>
          <table:table-cell table:style-name="ce3" table:formula="of:=UNICHAR(HEX2DEC([.C24]))" office:value-type="string" office:string-value="" calcext:value-type="string">
            <text:p></text:p>
          </table:table-cell>
          <table:table-cell table:style-name="ce11" office:value-type="string" calcext:value-type="string">
            <text:p>ὺν</text:p>
          </table:table-cell>
          <table:table-cell table:style-name="ce3" office:value-type="string" calcext:value-type="string">
            <text:p></text:p>
          </table:table-cell>
          <table:table-cell table:formula="of:=DEC2HEX(UNICODE([.F24]))" office:value-type="string" office:string-value="E7FA" calcext:value-type="string">
            <text:p>E7FA</text:p>
          </table:table-cell>
          <table:table-cell table:formula="of:=CONCATENATE(&quot;0x&quot;;[.G24])" office:value-type="string" office:string-value="0xE7FA" calcext:value-type="string">
            <text:p>0xE7FA</text:p>
          </table:table-cell>
          <table:table-cell table:style-name="ce19" table:formula="of:=VLOOKUP([.H24];[$FROMVS_Names.$A$1:$FROMVS_Names.$B$151];2;0)" office:value-type="string" office:string-value="upsilon_varia_nu" calcext:value-type="string">
            <text:p>upsilon_varia_nu</text:p>
          </table:table-cell>
          <table:table-cell table:style-name="ce7" table:formula="of:=IF(EXACT([.C24];[.G2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2</text:p>
          </table:table-cell>
          <table:table-cell office:value-type="string" calcext:value-type="string">
            <text:p>upsilon_oxia_nu</text:p>
          </table:table-cell>
          <table:table-cell table:formula="of:=RIGHT([.A25];4)" office:value-type="string" office:string-value="E7F2" calcext:value-type="string">
            <text:p>E7F2</text:p>
          </table:table-cell>
          <table:table-cell table:style-name="ce3" table:formula="of:=UNICHAR(HEX2DEC([.C25]))" office:value-type="string" office:string-value="" calcext:value-type="string">
            <text:p></text:p>
          </table:table-cell>
          <table:table-cell table:style-name="ce11" office:value-type="string" calcext:value-type="string">
            <text:p>ύν</text:p>
          </table:table-cell>
          <table:table-cell table:style-name="ce3" office:value-type="string" calcext:value-type="string">
            <text:p></text:p>
          </table:table-cell>
          <table:table-cell table:formula="of:=DEC2HEX(UNICODE([.F25]))" office:value-type="string" office:string-value="E7F9" calcext:value-type="string">
            <text:p>E7F9</text:p>
          </table:table-cell>
          <table:table-cell table:formula="of:=CONCATENATE(&quot;0x&quot;;[.G25])" office:value-type="string" office:string-value="0xE7F9" calcext:value-type="string">
            <text:p>0xE7F9</text:p>
          </table:table-cell>
          <table:table-cell table:style-name="ce19" table:formula="of:=VLOOKUP([.H25];[$FROMVS_Names.$A$1:$FROMVS_Names.$B$151];2;0)" office:value-type="string" office:string-value="upsilon_oxia_nu" calcext:value-type="string">
            <text:p>upsilon_oxia_nu</text:p>
          </table:table-cell>
          <table:table-cell table:style-name="ce7" table:formula="of:=IF(EXACT([.C25];[.G2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1</text:p>
          </table:table-cell>
          <table:table-cell office:value-type="string" calcext:value-type="string">
            <text:p>upsilon_nu</text:p>
          </table:table-cell>
          <table:table-cell table:formula="of:=RIGHT([.A26];4)" office:value-type="string" office:string-value="E7F1" calcext:value-type="string">
            <text:p>E7F1</text:p>
          </table:table-cell>
          <table:table-cell table:style-name="ce3" table:formula="of:=UNICHAR(HEX2DEC([.C26]))" office:value-type="string" office:string-value="" calcext:value-type="string">
            <text:p></text:p>
          </table:table-cell>
          <table:table-cell office:value-type="string" calcext:value-type="string">
            <text:p>υν</text:p>
          </table:table-cell>
          <table:table-cell table:style-name="ce3" office:value-type="string" calcext:value-type="string">
            <text:p></text:p>
          </table:table-cell>
          <table:table-cell table:formula="of:=DEC2HEX(UNICODE([.F26]))" office:value-type="string" office:string-value="E7F8" calcext:value-type="string">
            <text:p>E7F8</text:p>
          </table:table-cell>
          <table:table-cell table:formula="of:=CONCATENATE(&quot;0x&quot;;[.G26])" office:value-type="string" office:string-value="0xE7F8" calcext:value-type="string">
            <text:p>0xE7F8</text:p>
          </table:table-cell>
          <table:table-cell table:style-name="ce19" table:formula="of:=VLOOKUP([.H26];[$FROMVS_Names.$A$1:$FROMVS_Names.$B$151];2;0)" office:value-type="string" office:string-value="upsilon_nu" calcext:value-type="string">
            <text:p>upsilon_nu</text:p>
          </table:table-cell>
          <table:table-cell table:style-name="ce7" table:formula="of:=IF(EXACT([.C26];[.G2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4</text:p>
          </table:table-cell>
          <table:table-cell office:value-type="string" calcext:value-type="string">
            <text:p>upsilon_perispomeni</text:p>
          </table:table-cell>
          <table:table-cell table:formula="of:=RIGHT([.A27];4)" office:value-type="string" office:string-value="E7F4" calcext:value-type="string">
            <text:p>E7F4</text:p>
          </table:table-cell>
          <table:table-cell table:style-name="ce3" table:formula="of:=UNICHAR(HEX2DEC([.C27]))" office:value-type="string" office:string-value="" calcext:value-type="string">
            <text:p></text:p>
          </table:table-cell>
          <table:table-cell office:value-type="string" calcext:value-type="string">
            <text:p>ῦ</text:p>
          </table:table-cell>
          <table:table-cell table:style-name="ce21" office:value-type="string" calcext:value-type="string">
            <text:p></text:p>
          </table:table-cell>
          <table:table-cell table:formula="of:=DEC2HEX(UNICODE([.F27]))" office:value-type="string" office:string-value="E7F2" calcext:value-type="string">
            <text:p>E7F2</text:p>
          </table:table-cell>
          <table:table-cell table:formula="of:=CONCATENATE(&quot;0x&quot;;[.G27])" office:value-type="string" office:string-value="0xE7F2" calcext:value-type="string">
            <text:p>0xE7F2</text:p>
          </table:table-cell>
          <table:table-cell table:formula="of:=VLOOKUP([.H27];[$FROMVS_Names.$A$1:$FROMVS_Names.$B$151];2;0)" office:value-type="string" office:string-value="upsilon_perispomeni" calcext:value-type="string">
            <text:p>upsilon_perispomeni</text:p>
          </table:table-cell>
          <table:table-cell table:style-name="ce7" table:formula="of:=IF(EXACT([.C27];[.G2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6</text:p>
          </table:table-cell>
          <table:table-cell office:value-type="string" calcext:value-type="string">
            <text:p>upsilon_tonos</text:p>
          </table:table-cell>
          <table:table-cell table:formula="of:=RIGHT([.A28];4)" office:value-type="string" office:string-value="E836" calcext:value-type="string">
            <text:p>E836</text:p>
          </table:table-cell>
          <table:table-cell table:style-name="ce3" table:formula="of:=UNICHAR(HEX2DEC([.C28]))" office:value-type="string" office:string-value="" calcext:value-type="string">
            <text:p></text:p>
          </table:table-cell>
          <table:table-cell table:style-name="ce10" office:value-type="string" calcext:value-type="string">
            <text:p>ύ</text:p>
          </table:table-cell>
          <table:table-cell table:style-name="ce21" office:value-type="string" calcext:value-type="string">
            <text:p></text:p>
          </table:table-cell>
          <table:table-cell table:formula="of:=DEC2HEX(UNICODE([.F28]))" office:value-type="string" office:string-value="E7F1" calcext:value-type="string">
            <text:p>E7F1</text:p>
          </table:table-cell>
          <table:table-cell table:formula="of:=CONCATENATE(&quot;0x&quot;;[.G28])" office:value-type="string" office:string-value="0xE7F1" calcext:value-type="string">
            <text:p>0xE7F1</text:p>
          </table:table-cell>
          <table:table-cell table:formula="of:=VLOOKUP([.H28];[$FROMVS_Names.$A$1:$FROMVS_Names.$B$151];2;0)" office:value-type="string" office:string-value="upsilon_tonos" calcext:value-type="string">
            <text:p>upsilon_tonos</text:p>
          </table:table-cell>
          <table:table-cell table:style-name="ce7" table:formula="of:=IF(EXACT([.C28];[.G2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F0</text:p>
          </table:table-cell>
          <table:table-cell office:value-type="string" calcext:value-type="string">
            <text:p>upsilon_dasia_iota</text:p>
          </table:table-cell>
          <table:table-cell table:formula="of:=RIGHT([.A29];4)" office:value-type="string" office:string-value="E7F0" calcext:value-type="string">
            <text:p>E7F0</text:p>
          </table:table-cell>
          <table:table-cell table:style-name="ce3" table:formula="of:=UNICHAR(HEX2DEC([.C29]))" office:value-type="string" office:string-value="" calcext:value-type="string">
            <text:p></text:p>
          </table:table-cell>
          <table:table-cell table:style-name="ce13" office:value-type="string" calcext:value-type="string">
            <text:p>υἱ</text:p>
          </table:table-cell>
          <table:table-cell office:value-type="string" calcext:value-type="string">
            <text:p></text:p>
          </table:table-cell>
          <table:table-cell table:formula="of:=DEC2HEX(UNICODE([.F29]))" office:value-type="string" office:string-value="E7F0" calcext:value-type="string">
            <text:p>E7F0</text:p>
          </table:table-cell>
          <table:table-cell table:formula="of:=CONCATENATE(&quot;0x&quot;;[.G29])" office:value-type="string" office:string-value="0xE7F0" calcext:value-type="string">
            <text:p>0xE7F0</text:p>
          </table:table-cell>
          <table:table-cell table:formula="of:=VLOOKUP([.H29];[$FROMVS_Names.$A$1:$FROMVS_Names.$B$151];2;0)" office:value-type="string" office:string-value="upsilon_dasia_iota" calcext:value-type="string">
            <text:p>upsilon_dasia_iota</text:p>
          </table:table-cell>
          <table:table-cell table:style-name="ce7" table:formula="of:=IF(EXACT([.C29];[.G2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E7</text:p>
          </table:table-cell>
          <table:table-cell office:value-type="string" calcext:value-type="string">
            <text:p>tau_omega_perispomeni_nu_2</text:p>
          </table:table-cell>
          <table:table-cell table:formula="of:=RIGHT([.A30];4)" office:value-type="string" office:string-value="E7E7" calcext:value-type="string">
            <text:p>E7E7</text:p>
          </table:table-cell>
          <table:table-cell table:style-name="ce3" table:formula="of:=UNICHAR(HEX2DEC([.C30]))" office:value-type="string" office:string-value="" calcext:value-type="string">
            <text:p></text:p>
          </table:table-cell>
          <table:table-cell office:value-type="string" calcext:value-type="string">
            <text:p>τῶν</text:p>
          </table:table-cell>
          <table:table-cell table:style-name="ce21" office:value-type="string" calcext:value-type="string">
            <text:p></text:p>
          </table:table-cell>
          <table:table-cell table:formula="of:=DEC2HEX(UNICODE([.F30]))" office:value-type="string" office:string-value="E7EA" calcext:value-type="string">
            <text:p>E7EA</text:p>
          </table:table-cell>
          <table:table-cell table:formula="of:=CONCATENATE(&quot;0x&quot;;[.G30])" office:value-type="string" office:string-value="0xE7EA" calcext:value-type="string">
            <text:p>0xE7EA</text:p>
          </table:table-cell>
          <table:table-cell table:formula="of:=VLOOKUP([.H30];[$FROMVS_Names.$A$1:$FROMVS_Names.$B$151];2;0)" office:value-type="string" office:string-value="tau_omega_perispomeni_nu_2" calcext:value-type="string">
            <text:p>tau_omega_perispomeni_nu_2</text:p>
          </table:table-cell>
          <table:table-cell table:style-name="ce7" table:formula="of:=IF(EXACT([.C30];[.G3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6</text:p>
          </table:table-cell>
          <table:table-cell office:value-type="string" calcext:value-type="string">
            <text:p>tau_omega_perispomeni_nu_1</text:p>
          </table:table-cell>
          <table:table-cell table:formula="of:=RIGHT([.A31];4)" office:value-type="string" office:string-value="E7E6" calcext:value-type="string">
            <text:p>E7E6</text:p>
          </table:table-cell>
          <table:table-cell table:style-name="ce3" table:formula="of:=UNICHAR(HEX2DEC([.C31]))" office:value-type="string" office:string-value="" calcext:value-type="string">
            <text:p></text:p>
          </table:table-cell>
          <table:table-cell office:value-type="string" calcext:value-type="string">
            <text:p>τῶν</text:p>
          </table:table-cell>
          <table:table-cell table:style-name="ce22" office:value-type="string" calcext:value-type="string">
            <text:p></text:p>
          </table:table-cell>
          <table:table-cell table:formula="of:=DEC2HEX(UNICODE([.F31]))" office:value-type="string" office:string-value="E7E9" calcext:value-type="string">
            <text:p>E7E9</text:p>
          </table:table-cell>
          <table:table-cell table:formula="of:=CONCATENATE(&quot;0x&quot;;[.G31])" office:value-type="string" office:string-value="0xE7E9" calcext:value-type="string">
            <text:p>0xE7E9</text:p>
          </table:table-cell>
          <table:table-cell table:formula="of:=VLOOKUP([.H31];[$FROMVS_Names.$A$1:$FROMVS_Names.$B$151];2;0)" office:value-type="string" office:string-value="tau_omega_perispomeni_nu" calcext:value-type="string">
            <text:p>tau_omega_perispomeni_nu</text:p>
          </table:table-cell>
          <table:table-cell table:style-name="ce7" table:formula="of:=IF(EXACT([.C31];[.G3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5</text:p>
          </table:table-cell>
          <table:table-cell office:value-type="string" calcext:value-type="string">
            <text:p>tau_omega_perispomeni_prosgegrammeni</text:p>
          </table:table-cell>
          <table:table-cell table:formula="of:=RIGHT([.A32];4)" office:value-type="string" office:string-value="E7E5" calcext:value-type="string">
            <text:p>E7E5</text:p>
          </table:table-cell>
          <table:table-cell table:style-name="ce3" table:formula="of:=UNICHAR(HEX2DEC([.C32]))" office:value-type="string" office:string-value="" calcext:value-type="string">
            <text:p></text:p>
          </table:table-cell>
          <table:table-cell office:value-type="string" calcext:value-type="string">
            <text:p>τῷ</text:p>
          </table:table-cell>
          <table:table-cell table:style-name="ce21" office:value-type="string" calcext:value-type="string">
            <text:p></text:p>
          </table:table-cell>
          <table:table-cell table:formula="of:=DEC2HEX(UNICODE([.F32]))" office:value-type="string" office:string-value="E7E8" calcext:value-type="string">
            <text:p>E7E8</text:p>
          </table:table-cell>
          <table:table-cell table:formula="of:=CONCATENATE(&quot;0x&quot;;[.G32])" office:value-type="string" office:string-value="0xE7E8" calcext:value-type="string">
            <text:p>0xE7E8</text:p>
          </table:table-cell>
          <table:table-cell table:formula="of:=VLOOKUP([.H32];[$FROMVS_Names.$A$1:$FROMVS_Names.$B$151];2;0)" office:value-type="string" office:string-value="tau_omega_perispomeni_prosgegrammeni" calcext:value-type="string">
            <text:p>tau_omega_perispomeni_prosgegrammeni</text:p>
          </table:table-cell>
          <table:table-cell table:style-name="ce7" table:formula="of:=IF(EXACT([.C32];[.G3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4</text:p>
          </table:table-cell>
          <table:table-cell office:value-type="string" calcext:value-type="string">
            <text:p>tau_tall_tau</text:p>
          </table:table-cell>
          <table:table-cell table:formula="of:=RIGHT([.A33];4)" office:value-type="string" office:string-value="E7E4" calcext:value-type="string">
            <text:p>E7E4</text:p>
          </table:table-cell>
          <table:table-cell table:style-name="ce3" table:formula="of:=UNICHAR(HEX2DEC([.C33]))" office:value-type="string" office:string-value="" calcext:value-type="string">
            <text:p></text:p>
          </table:table-cell>
          <table:table-cell office:value-type="string" calcext:value-type="string">
            <text:p>ττ</text:p>
          </table:table-cell>
          <table:table-cell office:value-type="string" calcext:value-type="string">
            <text:p></text:p>
          </table:table-cell>
          <table:table-cell table:formula="of:=DEC2HEX(UNICODE([.F33]))" office:value-type="string" office:string-value="E7E7" calcext:value-type="string">
            <text:p>E7E7</text:p>
          </table:table-cell>
          <table:table-cell table:formula="of:=CONCATENATE(&quot;0x&quot;;[.G33])" office:value-type="string" office:string-value="0xE7E7" calcext:value-type="string">
            <text:p>0xE7E7</text:p>
          </table:table-cell>
          <table:table-cell table:formula="of:=VLOOKUP([.H33];[$FROMVS_Names.$A$1:$FROMVS_Names.$B$151];2;0)" office:value-type="string" office:string-value="tau_tall_tau" calcext:value-type="string">
            <text:p>tau_tall_tau</text:p>
          </table:table-cell>
          <table:table-cell table:style-name="ce7" table:formula="of:=IF(EXACT([.C33];[.G3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3</text:p>
          </table:table-cell>
          <table:table-cell office:value-type="string" calcext:value-type="string">
            <text:p>tau_rho_2</text:p>
          </table:table-cell>
          <table:table-cell table:formula="of:=RIGHT([.A34];4)" office:value-type="string" office:string-value="E7E3" calcext:value-type="string">
            <text:p>E7E3</text:p>
          </table:table-cell>
          <table:table-cell table:style-name="ce3" table:formula="of:=UNICHAR(HEX2DEC([.C34]))" office:value-type="string" office:string-value="" calcext:value-type="string">
            <text:p>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</text:p>
          </table:table-cell>
          <table:table-cell table:formula="of:=DEC2HEX(UNICODE([.F34]))" office:value-type="string" office:string-value="E7E6" calcext:value-type="string">
            <text:p>E7E6</text:p>
          </table:table-cell>
          <table:table-cell table:formula="of:=CONCATENATE(&quot;0x&quot;;[.G34])" office:value-type="string" office:string-value="0xE7E6" calcext:value-type="string">
            <text:p>0xE7E6</text:p>
          </table:table-cell>
          <table:table-cell table:formula="of:=VLOOKUP([.H34];[$FROMVS_Names.$A$1:$FROMVS_Names.$B$151];2;0)" office:value-type="string" office:string-value="tau_rho_2" calcext:value-type="string">
            <text:p>tau_rho_2</text:p>
          </table:table-cell>
          <table:table-cell table:style-name="ce7" table:formula="of:=IF(EXACT([.C34];[.G3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2</text:p>
          </table:table-cell>
          <table:table-cell office:value-type="string" calcext:value-type="string">
            <text:p>tau_rho_1</text:p>
          </table:table-cell>
          <table:table-cell table:formula="of:=RIGHT([.A35];4)" office:value-type="string" office:string-value="E7E2" calcext:value-type="string">
            <text:p>E7E2</text:p>
          </table:table-cell>
          <table:table-cell table:style-name="ce3" table:formula="of:=UNICHAR(HEX2DEC([.C35]))" office:value-type="string" office:string-value="" calcext:value-type="string">
            <text:p></text:p>
          </table:table-cell>
          <table:table-cell office:value-type="string" calcext:value-type="string">
            <text:p>τρ</text:p>
          </table:table-cell>
          <table:table-cell table:style-name="ce21" office:value-type="string" calcext:value-type="string">
            <text:p></text:p>
          </table:table-cell>
          <table:table-cell table:formula="of:=DEC2HEX(UNICODE([.F35]))" office:value-type="string" office:string-value="E7E5" calcext:value-type="string">
            <text:p>E7E5</text:p>
          </table:table-cell>
          <table:table-cell table:formula="of:=CONCATENATE(&quot;0x&quot;;[.G35])" office:value-type="string" office:string-value="0xE7E5" calcext:value-type="string">
            <text:p>0xE7E5</text:p>
          </table:table-cell>
          <table:table-cell table:formula="of:=VLOOKUP([.H35];[$FROMVS_Names.$A$1:$FROMVS_Names.$B$151];2;0)" office:value-type="string" office:string-value="tau_rho" calcext:value-type="string">
            <text:p>tau_rho</text:p>
          </table:table-cell>
          <table:table-cell table:style-name="ce7" table:formula="of:=IF(EXACT([.C35];[.G3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1</text:p>
          </table:table-cell>
          <table:table-cell office:value-type="string" calcext:value-type="string">
            <text:p>tau_omicron_upsilon_perispomeni_2</text:p>
          </table:table-cell>
          <table:table-cell table:formula="of:=RIGHT([.A36];4)" office:value-type="string" office:string-value="E7E1" calcext:value-type="string">
            <text:p>E7E1</text:p>
          </table:table-cell>
          <table:table-cell table:style-name="ce3" table:formula="of:=UNICHAR(HEX2DEC([.C36]))" office:value-type="string" office:string-value="" calcext:value-type="string">
            <text:p>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</text:p>
          </table:table-cell>
          <table:table-cell table:formula="of:=DEC2HEX(UNICODE([.F36]))" office:value-type="string" office:string-value="E7E4" calcext:value-type="string">
            <text:p>E7E4</text:p>
          </table:table-cell>
          <table:table-cell table:formula="of:=CONCATENATE(&quot;0x&quot;;[.G36])" office:value-type="string" office:string-value="0xE7E4" calcext:value-type="string">
            <text:p>0xE7E4</text:p>
          </table:table-cell>
          <table:table-cell table:formula="of:=VLOOKUP([.H36];[$FROMVS_Names.$A$1:$FROMVS_Names.$B$151];2;0)" office:value-type="string" office:string-value="tau_omicron_upsilon_perispomeni_2" calcext:value-type="string">
            <text:p>tau_omicron_upsilon_perispomeni_2</text:p>
          </table:table-cell>
          <table:table-cell table:style-name="ce7" table:formula="of:=IF(EXACT([.C36];[.G3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E0</text:p>
          </table:table-cell>
          <table:table-cell office:value-type="string" calcext:value-type="string">
            <text:p>tau_omicron_upsilon_perispomeni_1</text:p>
          </table:table-cell>
          <table:table-cell table:formula="of:=RIGHT([.A37];4)" office:value-type="string" office:string-value="E7E0" calcext:value-type="string">
            <text:p>E7E0</text:p>
          </table:table-cell>
          <table:table-cell table:style-name="ce3" table:formula="of:=UNICHAR(HEX2DEC([.C37]))" office:value-type="string" office:string-value="" calcext:value-type="string">
            <text:p>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</text:p>
          </table:table-cell>
          <table:table-cell table:formula="of:=DEC2HEX(UNICODE([.F37]))" office:value-type="string" office:string-value="E7E3" calcext:value-type="string">
            <text:p>E7E3</text:p>
          </table:table-cell>
          <table:table-cell table:formula="of:=CONCATENATE(&quot;0x&quot;;[.G37])" office:value-type="string" office:string-value="0xE7E3" calcext:value-type="string">
            <text:p>0xE7E3</text:p>
          </table:table-cell>
          <table:table-cell table:formula="of:=VLOOKUP([.H37];[$FROMVS_Names.$A$1:$FROMVS_Names.$B$151];2;0)" office:value-type="string" office:string-value="tau_omicron_upsilon_perispomeni" calcext:value-type="string">
            <text:p>tau_omicron_upsilon_perispomeni</text:p>
          </table:table-cell>
          <table:table-cell table:style-name="ce7" table:formula="of:=IF(EXACT([.C37];[.G3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F</text:p>
          </table:table-cell>
          <table:table-cell office:value-type="string" calcext:value-type="string">
            <text:p>tau_tall_omicron_sigma</text:p>
          </table:table-cell>
          <table:table-cell table:formula="of:=RIGHT([.A38];4)" office:value-type="string" office:string-value="E7DF" calcext:value-type="string">
            <text:p>E7DF</text:p>
          </table:table-cell>
          <table:table-cell table:style-name="ce3" table:formula="of:=UNICHAR(HEX2DEC([.C38]))" office:value-type="string" office:string-value="" calcext:value-type="string">
            <text:p></text:p>
          </table:table-cell>
          <table:table-cell office:value-type="string" calcext:value-type="string">
            <text:p>τοσ</text:p>
          </table:table-cell>
          <table:table-cell office:value-type="string" calcext:value-type="string">
            <text:p></text:p>
          </table:table-cell>
          <table:table-cell table:formula="of:=DEC2HEX(UNICODE([.F38]))" office:value-type="string" office:string-value="E7E2" calcext:value-type="string">
            <text:p>E7E2</text:p>
          </table:table-cell>
          <table:table-cell table:formula="of:=CONCATENATE(&quot;0x&quot;;[.G38])" office:value-type="string" office:string-value="0xE7E2" calcext:value-type="string">
            <text:p>0xE7E2</text:p>
          </table:table-cell>
          <table:table-cell table:formula="of:=VLOOKUP([.H38];[$FROMVS_Names.$A$1:$FROMVS_Names.$B$151];2;0)" office:value-type="string" office:string-value="tau_tall_omicron_sigma" calcext:value-type="string">
            <text:p>tau_tall_omicron_sigma</text:p>
          </table:table-cell>
          <table:table-cell table:style-name="ce7" table:formula="of:=IF(EXACT([.C38];[.G3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E</text:p>
          </table:table-cell>
          <table:table-cell office:value-type="string" calcext:value-type="string">
            <text:p>tau_omicron_varia_nu</text:p>
          </table:table-cell>
          <table:table-cell table:formula="of:=RIGHT([.A39];4)" office:value-type="string" office:string-value="E7DE" calcext:value-type="string">
            <text:p>E7DE</text:p>
          </table:table-cell>
          <table:table-cell table:style-name="ce3" table:formula="of:=UNICHAR(HEX2DEC([.C39]))" office:value-type="string" office:string-value="" calcext:value-type="string">
            <text:p></text:p>
          </table:table-cell>
          <table:table-cell office:value-type="string" calcext:value-type="string">
            <text:p>τὸν</text:p>
          </table:table-cell>
          <table:table-cell office:value-type="string" calcext:value-type="string">
            <text:p></text:p>
          </table:table-cell>
          <table:table-cell table:formula="of:=DEC2HEX(UNICODE([.F39]))" office:value-type="string" office:string-value="E7E1" calcext:value-type="string">
            <text:p>E7E1</text:p>
          </table:table-cell>
          <table:table-cell table:formula="of:=CONCATENATE(&quot;0x&quot;;[.G39])" office:value-type="string" office:string-value="0xE7E1" calcext:value-type="string">
            <text:p>0xE7E1</text:p>
          </table:table-cell>
          <table:table-cell table:formula="of:=VLOOKUP([.H39];[$FROMVS_Names.$A$1:$FROMVS_Names.$B$151];2;0)" office:value-type="string" office:string-value="tau_omicron_varia_nu" calcext:value-type="string">
            <text:p>tau_omicron_varia_nu</text:p>
          </table:table-cell>
          <table:table-cell table:style-name="ce7" table:formula="of:=IF(EXACT([.C39];[.G3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D</text:p>
          </table:table-cell>
          <table:table-cell office:value-type="string" calcext:value-type="string">
            <text:p>tau_omicron_4_varia</text:p>
          </table:table-cell>
          <table:table-cell table:formula="of:=RIGHT([.A40];4)" office:value-type="string" office:string-value="E7DD" calcext:value-type="string">
            <text:p>E7DD</text:p>
          </table:table-cell>
          <table:table-cell table:style-name="ce3" table:formula="of:=UNICHAR(HEX2DEC([.C40]))" office:value-type="string" office:string-value="" calcext:value-type="string">
            <text:p>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</text:p>
          </table:table-cell>
          <table:table-cell table:formula="of:=DEC2HEX(UNICODE([.F40]))" office:value-type="string" office:string-value="E7E0" calcext:value-type="string">
            <text:p>E7E0</text:p>
          </table:table-cell>
          <table:table-cell table:formula="of:=CONCATENATE(&quot;0x&quot;;[.G40])" office:value-type="string" office:string-value="0xE7E0" calcext:value-type="string">
            <text:p>0xE7E0</text:p>
          </table:table-cell>
          <table:table-cell table:formula="of:=VLOOKUP([.H40];[$FROMVS_Names.$A$1:$FROMVS_Names.$B$151];2;0)" office:value-type="string" office:string-value="tau_omicron_varia_4" calcext:value-type="string">
            <text:p>tau_omicron_varia_4</text:p>
          </table:table-cell>
          <table:table-cell table:style-name="ce7" table:formula="of:=IF(EXACT([.C40];[.G4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C</text:p>
          </table:table-cell>
          <table:table-cell office:value-type="string" calcext:value-type="string">
            <text:p>tau_omicron_3_varia</text:p>
          </table:table-cell>
          <table:table-cell table:formula="of:=RIGHT([.A41];4)" office:value-type="string" office:string-value="E7DC" calcext:value-type="string">
            <text:p>E7DC</text:p>
          </table:table-cell>
          <table:table-cell table:style-name="ce3" table:formula="of:=UNICHAR(HEX2DEC([.C41]))" office:value-type="string" office:string-value="" calcext:value-type="string">
            <text:p>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</text:p>
          </table:table-cell>
          <table:table-cell table:formula="of:=DEC2HEX(UNICODE([.F41]))" office:value-type="string" office:string-value="E7DF" calcext:value-type="string">
            <text:p>E7DF</text:p>
          </table:table-cell>
          <table:table-cell table:formula="of:=CONCATENATE(&quot;0x&quot;;[.G41])" office:value-type="string" office:string-value="0xE7DF" calcext:value-type="string">
            <text:p>0xE7DF</text:p>
          </table:table-cell>
          <table:table-cell table:formula="of:=VLOOKUP([.H41];[$FROMVS_Names.$A$1:$FROMVS_Names.$B$151];2;0)" office:value-type="string" office:string-value="tau_omicron_varia_3" calcext:value-type="string">
            <text:p>tau_omicron_varia_3</text:p>
          </table:table-cell>
          <table:table-cell table:style-name="ce7" table:formula="of:=IF(EXACT([.C41];[.G4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B</text:p>
          </table:table-cell>
          <table:table-cell office:value-type="string" calcext:value-type="string">
            <text:p>tau_omicron_2_varia</text:p>
          </table:table-cell>
          <table:table-cell table:formula="of:=RIGHT([.A42];4)" office:value-type="string" office:string-value="E7DB" calcext:value-type="string">
            <text:p>E7DB</text:p>
          </table:table-cell>
          <table:table-cell table:style-name="ce3" table:formula="of:=UNICHAR(HEX2DEC([.C42]))" office:value-type="string" office:string-value="" calcext:value-type="string">
            <text:p>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</text:p>
          </table:table-cell>
          <table:table-cell table:formula="of:=DEC2HEX(UNICODE([.F42]))" office:value-type="string" office:string-value="E7DE" calcext:value-type="string">
            <text:p>E7DE</text:p>
          </table:table-cell>
          <table:table-cell table:formula="of:=CONCATENATE(&quot;0x&quot;;[.G42])" office:value-type="string" office:string-value="0xE7DE" calcext:value-type="string">
            <text:p>0xE7DE</text:p>
          </table:table-cell>
          <table:table-cell table:formula="of:=VLOOKUP([.H42];[$FROMVS_Names.$A$1:$FROMVS_Names.$B$151];2;0)" office:value-type="string" office:string-value="tau_omicron_varia_2" calcext:value-type="string">
            <text:p>tau_omicron_varia_2</text:p>
          </table:table-cell>
          <table:table-cell table:style-name="ce7" table:formula="of:=IF(EXACT([.C42];[.G4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A</text:p>
          </table:table-cell>
          <table:table-cell office:value-type="string" calcext:value-type="string">
            <text:p>tau_omicron_1_varia</text:p>
          </table:table-cell>
          <table:table-cell table:formula="of:=RIGHT([.A43];4)" office:value-type="string" office:string-value="E7DA" calcext:value-type="string">
            <text:p>E7DA</text:p>
          </table:table-cell>
          <table:table-cell table:style-name="ce3" table:formula="of:=UNICHAR(HEX2DEC([.C43]))" office:value-type="string" office:string-value="" calcext:value-type="string">
            <text:p>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</text:p>
          </table:table-cell>
          <table:table-cell table:formula="of:=DEC2HEX(UNICODE([.F43]))" office:value-type="string" office:string-value="E7DD" calcext:value-type="string">
            <text:p>E7DD</text:p>
          </table:table-cell>
          <table:table-cell table:formula="of:=CONCATENATE(&quot;0x&quot;;[.G43])" office:value-type="string" office:string-value="0xE7DD" calcext:value-type="string">
            <text:p>0xE7DD</text:p>
          </table:table-cell>
          <table:table-cell table:formula="of:=VLOOKUP([.H43];[$FROMVS_Names.$A$1:$FROMVS_Names.$B$151];2;0)" office:value-type="string" office:string-value="tau_omicron_varia" calcext:value-type="string">
            <text:p>tau_omicron_varia</text:p>
          </table:table-cell>
          <table:table-cell table:style-name="ce7" table:formula="of:=IF(EXACT([.C43];[.G4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1</text:p>
          </table:table-cell>
          <table:table-cell office:value-type="string" calcext:value-type="string">
            <text:p>tau_omicron_2</text:p>
          </table:table-cell>
          <table:table-cell table:formula="of:=RIGHT([.A44];4)" office:value-type="string" office:string-value="E831" calcext:value-type="string">
            <text:p>E831</text:p>
          </table:table-cell>
          <table:table-cell table:style-name="ce3" table:formula="of:=UNICHAR(HEX2DEC([.C44]))" office:value-type="string" office:string-value="" calcext:value-type="string">
            <text:p></text:p>
          </table:table-cell>
          <table:table-cell office:value-type="string" calcext:value-type="string">
            <text:p>το</text:p>
          </table:table-cell>
          <table:table-cell table:style-name="ce21" office:value-type="string" calcext:value-type="string">
            <text:p></text:p>
          </table:table-cell>
          <table:table-cell table:formula="of:=DEC2HEX(UNICODE([.F44]))" office:value-type="string" office:string-value="E7DC" calcext:value-type="string">
            <text:p>E7DC</text:p>
          </table:table-cell>
          <table:table-cell table:formula="of:=CONCATENATE(&quot;0x&quot;;[.G44])" office:value-type="string" office:string-value="0xE7DC" calcext:value-type="string">
            <text:p>0xE7DC</text:p>
          </table:table-cell>
          <table:table-cell table:formula="of:=VLOOKUP([.H44];[$FROMVS_Names.$A$1:$FROMVS_Names.$B$151];2;0)" office:value-type="string" office:string-value="tau_omicron_2" calcext:value-type="string">
            <text:p>tau_omicron_2</text:p>
          </table:table-cell>
          <table:table-cell table:style-name="ce7" table:formula="of:=IF(EXACT([.C44];[.G4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9</text:p>
          </table:table-cell>
          <table:table-cell office:value-type="string" calcext:value-type="string">
            <text:p>tau_omicron_1</text:p>
          </table:table-cell>
          <table:table-cell table:formula="of:=RIGHT([.A45];4)" office:value-type="string" office:string-value="E7D9" calcext:value-type="string">
            <text:p>E7D9</text:p>
          </table:table-cell>
          <table:table-cell table:style-name="ce3" table:formula="of:=UNICHAR(HEX2DEC([.C45]))" office:value-type="string" office:string-value="" calcext:value-type="string">
            <text:p></text:p>
          </table:table-cell>
          <table:table-cell office:value-type="string" calcext:value-type="string">
            <text:p>το</text:p>
          </table:table-cell>
          <table:table-cell office:value-type="string" calcext:value-type="string">
            <text:p></text:p>
          </table:table-cell>
          <table:table-cell table:formula="of:=DEC2HEX(UNICODE([.F45]))" office:value-type="string" office:string-value="E7DB" calcext:value-type="string">
            <text:p>E7DB</text:p>
          </table:table-cell>
          <table:table-cell table:formula="of:=CONCATENATE(&quot;0x&quot;;[.G45])" office:value-type="string" office:string-value="0xE7DB" calcext:value-type="string">
            <text:p>0xE7DB</text:p>
          </table:table-cell>
          <table:table-cell table:formula="of:=VLOOKUP([.H45];[$FROMVS_Names.$A$1:$FROMVS_Names.$B$151];2;0)" office:value-type="string" office:string-value="tau_omicron" calcext:value-type="string">
            <text:p>tau_omicron</text:p>
          </table:table-cell>
          <table:table-cell table:style-name="ce7" table:formula="of:=IF(EXACT([.C45];[.G4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8</text:p>
          </table:table-cell>
          <table:table-cell office:value-type="string" calcext:value-type="string">
            <text:p>tau_iota</text:p>
          </table:table-cell>
          <table:table-cell table:formula="of:=RIGHT([.A46];4)" office:value-type="string" office:string-value="E7D8" calcext:value-type="string">
            <text:p>E7D8</text:p>
          </table:table-cell>
          <table:table-cell table:style-name="ce3" table:formula="of:=UNICHAR(HEX2DEC([.C46]))" office:value-type="string" office:string-value="" calcext:value-type="string">
            <text:p>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</text:p>
          </table:table-cell>
          <table:table-cell table:formula="of:=DEC2HEX(UNICODE([.F46]))" office:value-type="string" office:string-value="E7DA" calcext:value-type="string">
            <text:p>E7DA</text:p>
          </table:table-cell>
          <table:table-cell table:formula="of:=CONCATENATE(&quot;0x&quot;;[.G46])" office:value-type="string" office:string-value="0xE7DA" calcext:value-type="string">
            <text:p>0xE7DA</text:p>
          </table:table-cell>
          <table:table-cell table:formula="of:=VLOOKUP([.H46];[$FROMVS_Names.$A$1:$FROMVS_Names.$B$151];2;0)" office:value-type="string" office:string-value="tau_iota" calcext:value-type="string">
            <text:p>tau_iota</text:p>
          </table:table-cell>
          <table:table-cell table:style-name="ce7" table:formula="of:=IF(EXACT([.C46];[.G4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7</text:p>
          </table:table-cell>
          <table:table-cell office:value-type="string" calcext:value-type="string">
            <text:p>tau_eta_perispomeni_sigma_2</text:p>
          </table:table-cell>
          <table:table-cell table:formula="of:=RIGHT([.A47];4)" office:value-type="string" office:string-value="E7D7" calcext:value-type="string">
            <text:p>E7D7</text:p>
          </table:table-cell>
          <table:table-cell table:style-name="ce3" table:formula="of:=UNICHAR(HEX2DEC([.C47]))" office:value-type="string" office:string-value="" calcext:value-type="string">
            <text:p>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</text:p>
          </table:table-cell>
          <table:table-cell table:formula="of:=DEC2HEX(UNICODE([.F47]))" office:value-type="string" office:string-value="E7D9" calcext:value-type="string">
            <text:p>E7D9</text:p>
          </table:table-cell>
          <table:table-cell table:formula="of:=CONCATENATE(&quot;0x&quot;;[.G47])" office:value-type="string" office:string-value="0xE7D9" calcext:value-type="string">
            <text:p>0xE7D9</text:p>
          </table:table-cell>
          <table:table-cell table:formula="of:=VLOOKUP([.H47];[$FROMVS_Names.$A$1:$FROMVS_Names.$B$151];2;0)" office:value-type="string" office:string-value="tau_eta_perispomeni_sigma_2" calcext:value-type="string">
            <text:p>tau_eta_perispomeni_sigma_2</text:p>
          </table:table-cell>
          <table:table-cell table:style-name="ce7" table:formula="of:=IF(EXACT([.C47];[.G4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6</text:p>
          </table:table-cell>
          <table:table-cell office:value-type="string" calcext:value-type="string">
            <text:p>tau_eta_perispomeni_sigma_1</text:p>
          </table:table-cell>
          <table:table-cell table:formula="of:=RIGHT([.A48];4)" office:value-type="string" office:string-value="E7D6" calcext:value-type="string">
            <text:p>E7D6</text:p>
          </table:table-cell>
          <table:table-cell table:style-name="ce3" table:formula="of:=UNICHAR(HEX2DEC([.C48]))" office:value-type="string" office:string-value="" calcext:value-type="string">
            <text:p>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</text:p>
          </table:table-cell>
          <table:table-cell table:formula="of:=DEC2HEX(UNICODE([.F48]))" office:value-type="string" office:string-value="E7D8" calcext:value-type="string">
            <text:p>E7D8</text:p>
          </table:table-cell>
          <table:table-cell table:formula="of:=CONCATENATE(&quot;0x&quot;;[.G48])" office:value-type="string" office:string-value="0xE7D8" calcext:value-type="string">
            <text:p>0xE7D8</text:p>
          </table:table-cell>
          <table:table-cell table:formula="of:=VLOOKUP([.H48];[$FROMVS_Names.$A$1:$FROMVS_Names.$B$151];2;0)" office:value-type="string" office:string-value="tau_eta_perispomeni_sigma" calcext:value-type="string">
            <text:p>tau_eta_perispomeni_sigma</text:p>
          </table:table-cell>
          <table:table-cell table:style-name="ce7" table:formula="of:=IF(EXACT([.C48];[.G4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5</text:p>
          </table:table-cell>
          <table:table-cell office:value-type="string" calcext:value-type="string">
            <text:p>tau_eta_nu_varia_2</text:p>
          </table:table-cell>
          <table:table-cell table:formula="of:=RIGHT([.A49];4)" office:value-type="string" office:string-value="E7D5" calcext:value-type="string">
            <text:p>E7D5</text:p>
          </table:table-cell>
          <table:table-cell table:style-name="ce3" table:formula="of:=UNICHAR(HEX2DEC([.C49]))" office:value-type="string" office:string-value="" calcext:value-type="string">
            <text:p>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</text:p>
          </table:table-cell>
          <table:table-cell table:formula="of:=DEC2HEX(UNICODE([.F49]))" office:value-type="string" office:string-value="E7D7" calcext:value-type="string">
            <text:p>E7D7</text:p>
          </table:table-cell>
          <table:table-cell table:formula="of:=CONCATENATE(&quot;0x&quot;;[.G49])" office:value-type="string" office:string-value="0xE7D7" calcext:value-type="string">
            <text:p>0xE7D7</text:p>
          </table:table-cell>
          <table:table-cell table:formula="of:=VLOOKUP([.H49];[$FROMVS_Names.$A$1:$FROMVS_Names.$B$151];2;0)" office:value-type="string" office:string-value="tau_eta_varia2_nu" calcext:value-type="string">
            <text:p>tau_eta_varia2_nu</text:p>
          </table:table-cell>
          <table:table-cell table:style-name="ce7" table:formula="of:=IF(EXACT([.C49];[.G4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4</text:p>
          </table:table-cell>
          <table:table-cell office:value-type="string" calcext:value-type="string">
            <text:p>tau_eta_nu_varia_1</text:p>
          </table:table-cell>
          <table:table-cell table:formula="of:=RIGHT([.A50];4)" office:value-type="string" office:string-value="E7D4" calcext:value-type="string">
            <text:p>E7D4</text:p>
          </table:table-cell>
          <table:table-cell table:style-name="ce3" table:formula="of:=UNICHAR(HEX2DEC([.C50]))" office:value-type="string" office:string-value="" calcext:value-type="string">
            <text:p>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</text:p>
          </table:table-cell>
          <table:table-cell table:formula="of:=DEC2HEX(UNICODE([.F50]))" office:value-type="string" office:string-value="E7D6" calcext:value-type="string">
            <text:p>E7D6</text:p>
          </table:table-cell>
          <table:table-cell table:formula="of:=CONCATENATE(&quot;0x&quot;;[.G50])" office:value-type="string" office:string-value="0xE7D6" calcext:value-type="string">
            <text:p>0xE7D6</text:p>
          </table:table-cell>
          <table:table-cell table:formula="of:=VLOOKUP([.H50];[$FROMVS_Names.$A$1:$FROMVS_Names.$B$151];2;0)" office:value-type="string" office:string-value="tau_eta_varia_nu" calcext:value-type="string">
            <text:p>tau_eta_varia_nu</text:p>
          </table:table-cell>
          <table:table-cell table:style-name="ce7" table:formula="of:=IF(EXACT([.C50];[.G5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3</text:p>
          </table:table-cell>
          <table:table-cell office:value-type="string" calcext:value-type="string">
            <text:p>tau_epsilon</text:p>
          </table:table-cell>
          <table:table-cell table:formula="of:=RIGHT([.A51];4)" office:value-type="string" office:string-value="E7D3" calcext:value-type="string">
            <text:p>E7D3</text:p>
          </table:table-cell>
          <table:table-cell table:style-name="ce3" table:formula="of:=UNICHAR(HEX2DEC([.C51]))" office:value-type="string" office:string-value="" calcext:value-type="string">
            <text:p>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</text:p>
          </table:table-cell>
          <table:table-cell table:formula="of:=DEC2HEX(UNICODE([.F51]))" office:value-type="string" office:string-value="E7D5" calcext:value-type="string">
            <text:p>E7D5</text:p>
          </table:table-cell>
          <table:table-cell table:formula="of:=CONCATENATE(&quot;0x&quot;;[.G51])" office:value-type="string" office:string-value="0xE7D5" calcext:value-type="string">
            <text:p>0xE7D5</text:p>
          </table:table-cell>
          <table:table-cell table:formula="of:=VLOOKUP([.H51];[$FROMVS_Names.$A$1:$FROMVS_Names.$B$151];2;0)" office:value-type="string" office:string-value="tau_epsilon" calcext:value-type="string">
            <text:p>tau_epsilon</text:p>
          </table:table-cell>
          <table:table-cell table:style-name="ce7" table:formula="of:=IF(EXACT([.C51];[.G5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8</text:p>
          </table:table-cell>
          <table:table-cell office:value-type="string" calcext:value-type="string">
            <text:p>tau_alpha_iota_2</text:p>
          </table:table-cell>
          <table:table-cell table:formula="of:=RIGHT([.A52];4)" office:value-type="string" office:string-value="E828" calcext:value-type="string">
            <text:p>E828</text:p>
          </table:table-cell>
          <table:table-cell table:style-name="ce3" table:formula="of:=UNICHAR(HEX2DEC([.C52]))" office:value-type="string" office:string-value="" calcext:value-type="string">
            <text:p></text:p>
          </table:table-cell>
          <table:table-cell office:value-type="string" calcext:value-type="string">
            <text:p>ται</text:p>
          </table:table-cell>
          <table:table-cell table:style-name="ce21" office:value-type="string" calcext:value-type="string">
            <text:p></text:p>
          </table:table-cell>
          <table:table-cell table:formula="of:=DEC2HEX(UNICODE([.F52]))" office:value-type="string" office:string-value="E7D4" calcext:value-type="string">
            <text:p>E7D4</text:p>
          </table:table-cell>
          <table:table-cell table:formula="of:=CONCATENATE(&quot;0x&quot;;[.G52])" office:value-type="string" office:string-value="0xE7D4" calcext:value-type="string">
            <text:p>0xE7D4</text:p>
          </table:table-cell>
          <table:table-cell table:formula="of:=VLOOKUP([.H52];[$FROMVS_Names.$A$1:$FROMVS_Names.$B$151];2;0)" office:value-type="string" office:string-value="tau_alpha_iota_2" calcext:value-type="string">
            <text:p>tau_alpha_iota_2</text:p>
          </table:table-cell>
          <table:table-cell table:style-name="ce7" table:formula="of:=IF(EXACT([.C52];[.G5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2</text:p>
          </table:table-cell>
          <table:table-cell office:value-type="string" calcext:value-type="string">
            <text:p>tau_alpha_iota</text:p>
          </table:table-cell>
          <table:table-cell table:formula="of:=RIGHT([.A53];4)" office:value-type="string" office:string-value="E7D2" calcext:value-type="string">
            <text:p>E7D2</text:p>
          </table:table-cell>
          <table:table-cell table:style-name="ce3" table:formula="of:=UNICHAR(HEX2DEC([.C53]))" office:value-type="string" office:string-value="" calcext:value-type="string">
            <text:p></text:p>
          </table:table-cell>
          <table:table-cell office:value-type="string" calcext:value-type="string">
            <text:p>ται</text:p>
          </table:table-cell>
          <table:table-cell office:value-type="string" calcext:value-type="string">
            <text:p></text:p>
          </table:table-cell>
          <table:table-cell table:formula="of:=DEC2HEX(UNICODE([.F53]))" office:value-type="string" office:string-value="E7D3" calcext:value-type="string">
            <text:p>E7D3</text:p>
          </table:table-cell>
          <table:table-cell table:style-name="ce19" table:formula="of:=CONCATENATE(&quot;0x&quot;;[.G53])" office:value-type="string" office:string-value="0xE7D3" calcext:value-type="string">
            <text:p>0xE7D3</text:p>
          </table:table-cell>
          <table:table-cell table:formula="of:=VLOOKUP([.H53];[$FROMVS_Names.$A$1:$FROMVS_Names.$B$151];2;0)" office:value-type="string" office:string-value="tau_alpha_iota" calcext:value-type="string">
            <text:p>tau_alpha_iota</text:p>
          </table:table-cell>
          <table:table-cell table:style-name="ce7" table:formula="of:=IF(EXACT([.C53];[.G5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1</text:p>
          </table:table-cell>
          <table:table-cell office:value-type="string" calcext:value-type="string">
            <text:p>tau_psili</text:p>
          </table:table-cell>
          <table:table-cell table:formula="of:=RIGHT([.A54];4)" office:value-type="string" office:string-value="E7D1" calcext:value-type="string">
            <text:p>E7D1</text:p>
          </table:table-cell>
          <table:table-cell table:style-name="ce3" table:formula="of:=UNICHAR(HEX2DEC([.C54]))" office:value-type="string" office:string-value="" calcext:value-type="string">
            <text:p></text:p>
          </table:table-cell>
          <table:table-cell office:value-type="string" calcext:value-type="string">
            <text:p>τ᾽</text:p>
          </table:table-cell>
          <table:table-cell office:value-type="string" calcext:value-type="string">
            <text:p></text:p>
          </table:table-cell>
          <table:table-cell table:formula="of:=DEC2HEX(UNICODE([.F54]))" office:value-type="string" office:string-value="E7D2" calcext:value-type="string">
            <text:p>E7D2</text:p>
          </table:table-cell>
          <table:table-cell table:style-name="ce19" table:formula="of:=CONCATENATE(&quot;0x&quot;;[.G54])" office:value-type="string" office:string-value="0xE7D2" calcext:value-type="string">
            <text:p>0xE7D2</text:p>
          </table:table-cell>
          <table:table-cell table:formula="of:=VLOOKUP([.H54];[$FROMVS_Names.$A$1:$FROMVS_Names.$B$151];2;0)" office:value-type="string" office:string-value="tau_psili" calcext:value-type="string">
            <text:p>tau_psili</text:p>
          </table:table-cell>
          <table:table-cell table:style-name="ce7" table:formula="of:=IF(EXACT([.C54];[.G5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E</text:p>
          </table:table-cell>
          <table:table-cell office:value-type="string" calcext:value-type="string">
            <text:p>tau_tall_psili</text:p>
          </table:table-cell>
          <table:table-cell table:formula="of:=RIGHT([.A55];4)" office:value-type="string" office:string-value="E83E" calcext:value-type="string">
            <text:p>E83E</text:p>
          </table:table-cell>
          <table:table-cell table:style-name="ce3" table:formula="of:=UNICHAR(HEX2DEC([.C55]))" office:value-type="string" office:string-value="" calcext:value-type="string">
            <text:p></text:p>
          </table:table-cell>
          <table:table-cell office:value-type="string" calcext:value-type="string">
            <text:p>τ'</text:p>
          </table:table-cell>
          <table:table-cell table:style-name="ce21" office:value-type="string" calcext:value-type="string">
            <text:p></text:p>
          </table:table-cell>
          <table:table-cell table:formula="of:=DEC2HEX(UNICODE([.F55]))" office:value-type="string" office:string-value="E7D1" calcext:value-type="string">
            <text:p>E7D1</text:p>
          </table:table-cell>
          <table:table-cell table:formula="of:=CONCATENATE(&quot;0x&quot;;[.G55])" office:value-type="string" office:string-value="0xE7D1" calcext:value-type="string">
            <text:p>0xE7D1</text:p>
          </table:table-cell>
          <table:table-cell table:formula="of:=VLOOKUP([.H55];[$FROMVS_Names.$A$1:$FROMVS_Names.$B$151];2;0)" office:value-type="string" office:string-value="tau_tall_psili" calcext:value-type="string">
            <text:p>tau_tall_psili</text:p>
          </table:table-cell>
          <table:table-cell table:style-name="ce7" table:formula="of:=IF(EXACT([.C55];[.G5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D0</text:p>
          </table:table-cell>
          <table:table-cell office:value-type="string" calcext:value-type="string">
            <text:p>tau_tall</text:p>
          </table:table-cell>
          <table:table-cell table:formula="of:=RIGHT([.A56];4)" office:value-type="string" office:string-value="E7D0" calcext:value-type="string">
            <text:p>E7D0</text:p>
          </table:table-cell>
          <table:table-cell table:style-name="ce3" table:formula="of:=UNICHAR(HEX2DEC([.C56]))" office:value-type="string" office:string-value="" calcext:value-type="string">
            <text:p>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</text:p>
          </table:table-cell>
          <table:table-cell table:formula="of:=DEC2HEX(UNICODE([.F56]))" office:value-type="string" office:string-value="E7D0" calcext:value-type="string">
            <text:p>E7D0</text:p>
          </table:table-cell>
          <table:table-cell table:style-name="ce19" table:formula="of:=CONCATENATE(&quot;0x&quot;;[.G56])" office:value-type="string" office:string-value="0xE7D0" calcext:value-type="string">
            <text:p>0xE7D0</text:p>
          </table:table-cell>
          <table:table-cell table:formula="of:=VLOOKUP([.H56];[$FROMVS_Names.$A$1:$FROMVS_Names.$B$151];2;0)" office:value-type="string" office:string-value="tau_tall" calcext:value-type="string">
            <text:p>tau_tall</text:p>
          </table:table-cell>
          <table:table-cell table:style-name="ce7" table:formula="of:=IF(EXACT([.C56];[.G5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7</text:p>
          </table:table-cell>
          <table:table-cell office:value-type="string" calcext:value-type="string">
            <text:p>sigma_chi</text:p>
          </table:table-cell>
          <table:table-cell table:formula="of:=RIGHT([.A57];4)" office:value-type="string" office:string-value="E7C7" calcext:value-type="string">
            <text:p>E7C7</text:p>
          </table:table-cell>
          <table:table-cell table:style-name="ce3" table:formula="of:=UNICHAR(HEX2DEC([.C57]))" office:value-type="string" office:string-value="" calcext:value-type="string">
            <text:p></text:p>
          </table:table-cell>
          <table:table-cell office:value-type="string" calcext:value-type="string">
            <text:p>σχ</text:p>
          </table:table-cell>
          <table:table-cell office:value-type="string" calcext:value-type="string">
            <text:p></text:p>
          </table:table-cell>
          <table:table-cell table:style-name="ce19" table:formula="of:=DEC2HEX(UNICODE([.F57]))" office:value-type="string" office:string-value="E7C7" calcext:value-type="string">
            <text:p>E7C7</text:p>
          </table:table-cell>
          <table:table-cell table:style-name="ce19" table:formula="of:=CONCATENATE(&quot;0x&quot;;[.G57])" office:value-type="string" office:string-value="0xE7C7" calcext:value-type="string">
            <text:p>0xE7C7</text:p>
          </table:table-cell>
          <table:table-cell table:formula="of:=VLOOKUP([.H57];[$FROMVS_Names.$A$1:$FROMVS_Names.$B$151];2;0)" office:value-type="string" office:string-value="sigma_chi" calcext:value-type="string">
            <text:p>sigma_chi</text:p>
          </table:table-cell>
          <table:table-cell table:style-name="ce7" table:formula="of:=IF(EXACT([.C57];[.G5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6</text:p>
          </table:table-cell>
          <table:table-cell office:value-type="string" calcext:value-type="string">
            <text:p>sigma_tau_rho</text:p>
          </table:table-cell>
          <table:table-cell table:formula="of:=RIGHT([.A58];4)" office:value-type="string" office:string-value="E7C6" calcext:value-type="string">
            <text:p>E7C6</text:p>
          </table:table-cell>
          <table:table-cell table:style-name="ce3" table:formula="of:=UNICHAR(HEX2DEC([.C58]))" office:value-type="string" office:string-value="" calcext:value-type="string">
            <text:p></text:p>
          </table:table-cell>
          <table:table-cell office:value-type="string" calcext:value-type="string">
            <text:p>στρ</text:p>
          </table:table-cell>
          <table:table-cell office:value-type="string" calcext:value-type="string">
            <text:p></text:p>
          </table:table-cell>
          <table:table-cell table:style-name="ce19" table:formula="of:=DEC2HEX(UNICODE([.F58]))" office:value-type="string" office:string-value="E7C6" calcext:value-type="string">
            <text:p>E7C6</text:p>
          </table:table-cell>
          <table:table-cell table:style-name="ce19" table:formula="of:=CONCATENATE(&quot;0x&quot;;[.G58])" office:value-type="string" office:string-value="0xE7C6" calcext:value-type="string">
            <text:p>0xE7C6</text:p>
          </table:table-cell>
          <table:table-cell table:formula="of:=VLOOKUP([.H58];[$FROMVS_Names.$A$1:$FROMVS_Names.$B$151];2;0)" office:value-type="string" office:string-value="sigma_tau_rho" calcext:value-type="string">
            <text:p>sigma_tau_rho</text:p>
          </table:table-cell>
          <table:table-cell table:style-name="ce7" table:formula="of:=IF(EXACT([.C58];[.G5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5</text:p>
          </table:table-cell>
          <table:table-cell office:value-type="string" calcext:value-type="string">
            <text:p>sigma_tau</text:p>
          </table:table-cell>
          <table:table-cell table:formula="of:=RIGHT([.A59];4)" office:value-type="string" office:string-value="E7C5" calcext:value-type="string">
            <text:p>E7C5</text:p>
          </table:table-cell>
          <table:table-cell table:style-name="ce3" table:formula="of:=UNICHAR(HEX2DEC([.C59]))" office:value-type="string" office:string-value="" calcext:value-type="string">
            <text:p></text:p>
          </table:table-cell>
          <table:table-cell office:value-type="string" calcext:value-type="string">
            <text:p>στ</text:p>
          </table:table-cell>
          <table:table-cell office:value-type="string" calcext:value-type="string">
            <text:p></text:p>
          </table:table-cell>
          <table:table-cell table:style-name="ce19" table:formula="of:=DEC2HEX(UNICODE([.F59]))" office:value-type="string" office:string-value="E7C5" calcext:value-type="string">
            <text:p>E7C5</text:p>
          </table:table-cell>
          <table:table-cell table:formula="of:=CONCATENATE(&quot;0x&quot;;[.G59])" office:value-type="string" office:string-value="0xE7C5" calcext:value-type="string">
            <text:p>0xE7C5</text:p>
          </table:table-cell>
          <table:table-cell table:formula="of:=VLOOKUP([.H59];[$FROMVS_Names.$A$1:$FROMVS_Names.$B$151];2;0)" office:value-type="string" office:string-value="sigma_tau" calcext:value-type="string">
            <text:p>sigma_tau</text:p>
          </table:table-cell>
          <table:table-cell table:style-name="ce7" table:formula="of:=IF(EXACT([.C59];[.G5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4</text:p>
          </table:table-cell>
          <table:table-cell office:value-type="string" calcext:value-type="string">
            <text:p>sigma_sigma</text:p>
          </table:table-cell>
          <table:table-cell table:formula="of:=RIGHT([.A60];4)" office:value-type="string" office:string-value="E7C4" calcext:value-type="string">
            <text:p>E7C4</text:p>
          </table:table-cell>
          <table:table-cell table:style-name="ce3" table:formula="of:=UNICHAR(HEX2DEC([.C60]))" office:value-type="string" office:string-value="" calcext:value-type="string">
            <text:p></text:p>
          </table:table-cell>
          <table:table-cell office:value-type="string" calcext:value-type="string">
            <text:p>σσ</text:p>
          </table:table-cell>
          <table:table-cell office:value-type="string" calcext:value-type="string">
            <text:p></text:p>
          </table:table-cell>
          <table:table-cell table:style-name="ce19" table:formula="of:=DEC2HEX(UNICODE([.F60]))" office:value-type="string" office:string-value="E7C4" calcext:value-type="string">
            <text:p>E7C4</text:p>
          </table:table-cell>
          <table:table-cell table:formula="of:=CONCATENATE(&quot;0x&quot;;[.G60])" office:value-type="string" office:string-value="0xE7C4" calcext:value-type="string">
            <text:p>0xE7C4</text:p>
          </table:table-cell>
          <table:table-cell table:formula="of:=VLOOKUP([.H60];[$FROMVS_Names.$A$1:$FROMVS_Names.$B$151];2;0)" office:value-type="string" office:string-value="sigma_sigma" calcext:value-type="string">
            <text:p>sigma_sigma</text:p>
          </table:table-cell>
          <table:table-cell table:style-name="ce7" table:formula="of:=IF(EXACT([.C60];[.G60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3</text:p>
          </table:table-cell>
          <table:table-cell office:value-type="string" calcext:value-type="string">
            <text:p>sigma_pi</text:p>
          </table:table-cell>
          <table:table-cell table:formula="of:=RIGHT([.A61];4)" office:value-type="string" office:string-value="E7C3" calcext:value-type="string">
            <text:p>E7C3</text:p>
          </table:table-cell>
          <table:table-cell table:style-name="ce3" table:formula="of:=UNICHAR(HEX2DEC([.C61]))" office:value-type="string" office:string-value="" calcext:value-type="string">
            <text:p></text:p>
          </table:table-cell>
          <table:table-cell office:value-type="string" calcext:value-type="string">
            <text:p>σπ</text:p>
          </table:table-cell>
          <table:table-cell office:value-type="string" calcext:value-type="string">
            <text:p></text:p>
          </table:table-cell>
          <table:table-cell table:style-name="ce19" table:formula="of:=DEC2HEX(UNICODE([.F61]))" office:value-type="string" office:string-value="E7C3" calcext:value-type="string">
            <text:p>E7C3</text:p>
          </table:table-cell>
          <table:table-cell table:formula="of:=CONCATENATE(&quot;0x&quot;;[.G61])" office:value-type="string" office:string-value="0xE7C3" calcext:value-type="string">
            <text:p>0xE7C3</text:p>
          </table:table-cell>
          <table:table-cell table:formula="of:=VLOOKUP([.H61];[$FROMVS_Names.$A$1:$FROMVS_Names.$B$151];2;0)" office:value-type="string" office:string-value="sigma_pi" calcext:value-type="string">
            <text:p>sigma_pi</text:p>
          </table:table-cell>
          <table:table-cell table:style-name="ce7" table:formula="of:=IF(EXACT([.C61];[.G61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2</text:p>
          </table:table-cell>
          <table:table-cell office:value-type="string" calcext:value-type="string">
            <text:p>sigma_theta_alpha_iota</text:p>
          </table:table-cell>
          <table:table-cell table:formula="of:=RIGHT([.A62];4)" office:value-type="string" office:string-value="E7C2" calcext:value-type="string">
            <text:p>E7C2</text:p>
          </table:table-cell>
          <table:table-cell table:style-name="ce3" table:formula="of:=UNICHAR(HEX2DEC([.C62]))" office:value-type="string" office:string-value="" calcext:value-type="string">
            <text:p></text:p>
          </table:table-cell>
          <table:table-cell office:value-type="string" calcext:value-type="string">
            <text:p>σθαι</text:p>
          </table:table-cell>
          <table:table-cell office:value-type="string" calcext:value-type="string">
            <text:p></text:p>
          </table:table-cell>
          <table:table-cell table:style-name="ce19" table:formula="of:=DEC2HEX(UNICODE([.F62]))" office:value-type="string" office:string-value="E7C2" calcext:value-type="string">
            <text:p>E7C2</text:p>
          </table:table-cell>
          <table:table-cell table:formula="of:=CONCATENATE(&quot;0x&quot;;[.G62])" office:value-type="string" office:string-value="0xE7C2" calcext:value-type="string">
            <text:p>0xE7C2</text:p>
          </table:table-cell>
          <table:table-cell table:formula="of:=VLOOKUP([.H62];[$FROMVS_Names.$A$1:$FROMVS_Names.$B$151];2;0)" office:value-type="string" office:string-value="sigma_theta_alpha_iota" calcext:value-type="string">
            <text:p>sigma_theta_alpha_iota</text:p>
          </table:table-cell>
          <table:table-cell table:style-name="ce7" table:formula="of:=IF(EXACT([.C62];[.G6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1</text:p>
          </table:table-cell>
          <table:table-cell office:value-type="string" calcext:value-type="string">
            <text:p>sigma_theta</text:p>
          </table:table-cell>
          <table:table-cell table:formula="of:=RIGHT([.A63];4)" office:value-type="string" office:string-value="E7C1" calcext:value-type="string">
            <text:p>E7C1</text:p>
          </table:table-cell>
          <table:table-cell table:style-name="ce3" table:formula="of:=UNICHAR(HEX2DEC([.C63]))" office:value-type="string" office:string-value="" calcext:value-type="string">
            <text:p></text:p>
          </table:table-cell>
          <table:table-cell office:value-type="string" calcext:value-type="string">
            <text:p>σθ</text:p>
          </table:table-cell>
          <table:table-cell office:value-type="string" calcext:value-type="string">
            <text:p></text:p>
          </table:table-cell>
          <table:table-cell table:style-name="ce19" table:formula="of:=DEC2HEX(UNICODE([.F63]))" office:value-type="string" office:string-value="E7C1" calcext:value-type="string">
            <text:p>E7C1</text:p>
          </table:table-cell>
          <table:table-cell table:formula="of:=CONCATENATE(&quot;0x&quot;;[.G63])" office:value-type="string" office:string-value="0xE7C1" calcext:value-type="string">
            <text:p>0xE7C1</text:p>
          </table:table-cell>
          <table:table-cell table:formula="of:=VLOOKUP([.H63];[$FROMVS_Names.$A$1:$FROMVS_Names.$B$151];2;0)" office:value-type="string" office:string-value="sigma_theta" calcext:value-type="string">
            <text:p>sigma_theta</text:p>
          </table:table-cell>
          <table:table-cell table:style-name="ce7" table:formula="of:=IF(EXACT([.C63];[.G6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C0</text:p>
          </table:table-cell>
          <table:table-cell office:value-type="string" calcext:value-type="string">
            <text:p>sigma_1</text:p>
          </table:table-cell>
          <table:table-cell table:formula="of:=RIGHT([.A64];4)" office:value-type="string" office:string-value="E7C0" calcext:value-type="string">
            <text:p>E7C0</text:p>
          </table:table-cell>
          <table:table-cell table:style-name="ce3" table:formula="of:=UNICHAR(HEX2DEC([.C64]))" office:value-type="string" office:string-value="" calcext:value-type="string">
            <text:p>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</text:p>
          </table:table-cell>
          <table:table-cell table:style-name="ce19" table:formula="of:=DEC2HEX(UNICODE([.F64]))" office:value-type="string" office:string-value="E7C0" calcext:value-type="string">
            <text:p>E7C0</text:p>
          </table:table-cell>
          <table:table-cell table:formula="of:=CONCATENATE(&quot;0x&quot;;[.G64])" office:value-type="string" office:string-value="0xE7C0" calcext:value-type="string">
            <text:p>0xE7C0</text:p>
          </table:table-cell>
          <table:table-cell table:formula="of:=VLOOKUP([.H64];[$FROMVS_Names.$A$1:$FROMVS_Names.$B$151];2;0)" office:value-type="string" office:string-value="sigma_2" calcext:value-type="string">
            <text:p>sigma_2</text:p>
          </table:table-cell>
          <table:table-cell table:style-name="ce7" table:formula="of:=IF(EXACT([.C64];[.G6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A6</text:p>
          </table:table-cell>
          <table:table-cell office:value-type="string" calcext:value-type="string">
            <text:p>pi_tau</text:p>
          </table:table-cell>
          <table:table-cell table:formula="of:=RIGHT([.A65];4)" office:value-type="string" office:string-value="E7A6" calcext:value-type="string">
            <text:p>E7A6</text:p>
          </table:table-cell>
          <table:table-cell table:style-name="ce3" table:formula="of:=UNICHAR(HEX2DEC([.C65]))" office:value-type="string" office:string-value="" calcext:value-type="string">
            <text:p></text:p>
          </table:table-cell>
          <table:table-cell office:value-type="string" calcext:value-type="string">
            <text:p>πτ</text:p>
          </table:table-cell>
          <table:table-cell table:style-name="ce21" office:value-type="string" calcext:value-type="string">
            <text:p></text:p>
          </table:table-cell>
          <table:table-cell table:style-name="ce19" table:formula="of:=DEC2HEX(UNICODE([.F65]))" office:value-type="string" office:string-value="E7A8" calcext:value-type="string">
            <text:p>E7A8</text:p>
          </table:table-cell>
          <table:table-cell table:formula="of:=CONCATENATE(&quot;0x&quot;;[.G65])" office:value-type="string" office:string-value="0xE7A8" calcext:value-type="string">
            <text:p>0xE7A8</text:p>
          </table:table-cell>
          <table:table-cell table:formula="of:=VLOOKUP([.H65];[$FROMVS_Names.$A$1:$FROMVS_Names.$B$151];2;0)" office:value-type="string" office:string-value="pi_tau" calcext:value-type="string">
            <text:p>pi_tau</text:p>
          </table:table-cell>
          <table:table-cell table:style-name="ce7" table:formula="of:=IF(EXACT([.C65];[.G6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0</text:p>
          </table:table-cell>
          <table:table-cell office:value-type="string" calcext:value-type="string">
            <text:p>pi_symbol</text:p>
          </table:table-cell>
          <table:table-cell table:formula="of:=RIGHT([.A66];4)" office:value-type="string" office:string-value="E7A0" calcext:value-type="string">
            <text:p>E7A0</text:p>
          </table:table-cell>
          <table:table-cell table:style-name="ce3" table:formula="of:=UNICHAR(HEX2DEC([.C66]))" office:value-type="string" office:string-value="" calcext:value-type="string">
            <text:p>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ϖ</text:p>
          </table:table-cell>
          <table:table-cell table:style-name="ce19" table:formula="of:=DEC2HEX(UNICODE([.F66]))" office:value-type="string" office:string-value="3D6" calcext:value-type="string">
            <text:p>3D6</text:p>
          </table:table-cell>
          <table:table-cell table:formula="of:=CONCATENATE(&quot;0x&quot;;[.G66])" office:value-type="string" office:string-value="0x3D6" calcext:value-type="string">
            <text:p>0x3D6</text:p>
          </table:table-cell>
          <table:table-cell office:value-type="string" calcext:value-type="string">
            <text:p>pi_symbol</text:p>
          </table:table-cell>
          <table:table-cell table:style-name="ce7" table:formula="of:=IF(EXACT([.C66];[.G6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7</text:p>
          </table:table-cell>
          <table:table-cell office:value-type="string" calcext:value-type="string">
            <text:p>Pi_1</text:p>
          </table:table-cell>
          <table:table-cell table:formula="of:=RIGHT([.A67];4)" office:value-type="string" office:string-value="E7A7" calcext:value-type="string">
            <text:p>E7A7</text:p>
          </table:table-cell>
          <table:table-cell table:style-name="ce3" table:formula="of:=UNICHAR(HEX2DEC([.C67]))" office:value-type="string" office:string-value="" calcext:value-type="string">
            <text:p></text:p>
          </table:table-cell>
          <table:table-cell office:value-type="string" calcext:value-type="string">
            <text:p>Π</text:p>
          </table:table-cell>
          <table:table-cell table:style-name="ce21" office:value-type="string" calcext:value-type="string">
            <text:p></text:p>
          </table:table-cell>
          <table:table-cell table:style-name="ce19" table:formula="of:=DEC2HEX(UNICODE([.F67]))" office:value-type="string" office:string-value="E7A0" calcext:value-type="string">
            <text:p>E7A0</text:p>
          </table:table-cell>
          <table:table-cell table:formula="of:=CONCATENATE(&quot;0x&quot;;[.G67])" office:value-type="string" office:string-value="0xE7A0" calcext:value-type="string">
            <text:p>0xE7A0</text:p>
          </table:table-cell>
          <table:table-cell table:formula="of:=VLOOKUP([.H67];[$FROMVS_Names.$A$1:$FROMVS_Names.$B$151];2;0)" office:value-type="string" office:string-value="Pi_2" calcext:value-type="string">
            <text:p>Pi_2</text:p>
          </table:table-cell>
          <table:table-cell table:style-name="ce7" table:formula="of:=IF(EXACT([.C67];[.G6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5</text:p>
          </table:table-cell>
          <table:table-cell office:value-type="string" calcext:value-type="string">
            <text:p>pi_rho</text:p>
          </table:table-cell>
          <table:table-cell table:formula="of:=RIGHT([.A68];4)" office:value-type="string" office:string-value="E7A5" calcext:value-type="string">
            <text:p>E7A5</text:p>
          </table:table-cell>
          <table:table-cell table:style-name="ce3" table:formula="of:=UNICHAR(HEX2DEC([.C68]))" office:value-type="string" office:string-value="" calcext:value-type="string">
            <text:p></text:p>
          </table:table-cell>
          <table:table-cell office:value-type="string" calcext:value-type="string">
            <text:p>πρ</text:p>
          </table:table-cell>
          <table:table-cell office:value-type="string" calcext:value-type="string">
            <text:p></text:p>
          </table:table-cell>
          <table:table-cell table:style-name="ce19" table:formula="of:=DEC2HEX(UNICODE([.F68]))" office:value-type="string" office:string-value="E7A7" calcext:value-type="string">
            <text:p>E7A7</text:p>
          </table:table-cell>
          <table:table-cell table:formula="of:=CONCATENATE(&quot;0x&quot;;[.G68])" office:value-type="string" office:string-value="0xE7A7" calcext:value-type="string">
            <text:p>0xE7A7</text:p>
          </table:table-cell>
          <table:table-cell table:formula="of:=VLOOKUP([.H68];[$FROMVS_Names.$A$1:$FROMVS_Names.$B$151];2;0)" office:value-type="string" office:string-value="pi_rho" calcext:value-type="string">
            <text:p>pi_rho</text:p>
          </table:table-cell>
          <table:table-cell table:style-name="ce7" table:formula="of:=IF(EXACT([.C68];[.G6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4</text:p>
          </table:table-cell>
          <table:table-cell office:value-type="string" calcext:value-type="string">
            <text:p>pi_omicron_varia</text:p>
          </table:table-cell>
          <table:table-cell table:formula="of:=RIGHT([.A69];4)" office:value-type="string" office:string-value="E7A4" calcext:value-type="string">
            <text:p>E7A4</text:p>
          </table:table-cell>
          <table:table-cell table:style-name="ce3" table:formula="of:=UNICHAR(HEX2DEC([.C69]))" office:value-type="string" office:string-value="" calcext:value-type="string">
            <text:p></text:p>
          </table:table-cell>
          <table:table-cell office:value-type="string" calcext:value-type="string">
            <text:p>πὸ</text:p>
          </table:table-cell>
          <table:table-cell office:value-type="string" calcext:value-type="string">
            <text:p></text:p>
          </table:table-cell>
          <table:table-cell table:style-name="ce19" table:formula="of:=DEC2HEX(UNICODE([.F69]))" office:value-type="string" office:string-value="E7A6" calcext:value-type="string">
            <text:p>E7A6</text:p>
          </table:table-cell>
          <table:table-cell table:formula="of:=CONCATENATE(&quot;0x&quot;;[.G69])" office:value-type="string" office:string-value="0xE7A6" calcext:value-type="string">
            <text:p>0xE7A6</text:p>
          </table:table-cell>
          <table:table-cell table:formula="of:=VLOOKUP([.H69];[$FROMVS_Names.$A$1:$FROMVS_Names.$B$151];2;0)" office:value-type="string" office:string-value="pi_omicron_varia" calcext:value-type="string">
            <text:p>pi_omicron_varia</text:p>
          </table:table-cell>
          <table:table-cell table:style-name="ce7" table:formula="of:=IF(EXACT([.C69];[.G6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3</text:p>
          </table:table-cell>
          <table:table-cell office:value-type="string" calcext:value-type="string">
            <text:p>pi_omicron</text:p>
          </table:table-cell>
          <table:table-cell table:formula="of:=RIGHT([.A70];4)" office:value-type="string" office:string-value="E7A3" calcext:value-type="string">
            <text:p>E7A3</text:p>
          </table:table-cell>
          <table:table-cell table:style-name="ce3" table:formula="of:=UNICHAR(HEX2DEC([.C70]))" office:value-type="string" office:string-value="" calcext:value-type="string">
            <text:p></text:p>
          </table:table-cell>
          <table:table-cell office:value-type="string" calcext:value-type="string">
            <text:p>πο</text:p>
          </table:table-cell>
          <table:table-cell office:value-type="string" calcext:value-type="string">
            <text:p></text:p>
          </table:table-cell>
          <table:table-cell table:style-name="ce19" table:formula="of:=DEC2HEX(UNICODE([.F70]))" office:value-type="string" office:string-value="E7A5" calcext:value-type="string">
            <text:p>E7A5</text:p>
          </table:table-cell>
          <table:table-cell table:formula="of:=CONCATENATE(&quot;0x&quot;;[.G70])" office:value-type="string" office:string-value="0xE7A5" calcext:value-type="string">
            <text:p>0xE7A5</text:p>
          </table:table-cell>
          <table:table-cell table:formula="of:=VLOOKUP([.H70];[$FROMVS_Names.$A$1:$FROMVS_Names.$B$151];2;0)" office:value-type="string" office:string-value="pi_omicron" calcext:value-type="string">
            <text:p>pi_omicron</text:p>
          </table:table-cell>
          <table:table-cell table:style-name="ce7" table:formula="of:=IF(EXACT([.C70];[.G7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2</text:p>
          </table:table-cell>
          <table:table-cell office:value-type="string" calcext:value-type="string">
            <text:p>pi_epsilon_rho</text:p>
          </table:table-cell>
          <table:table-cell table:formula="of:=RIGHT([.A71];4)" office:value-type="string" office:string-value="E7A2" calcext:value-type="string">
            <text:p>E7A2</text:p>
          </table:table-cell>
          <table:table-cell table:style-name="ce3" table:formula="of:=UNICHAR(HEX2DEC([.C71]))" office:value-type="string" office:string-value="" calcext:value-type="string">
            <text:p></text:p>
          </table:table-cell>
          <table:table-cell office:value-type="string" calcext:value-type="string">
            <text:p>περ</text:p>
          </table:table-cell>
          <table:table-cell office:value-type="string" calcext:value-type="string">
            <text:p></text:p>
          </table:table-cell>
          <table:table-cell table:style-name="ce19" table:formula="of:=DEC2HEX(UNICODE([.F71]))" office:value-type="string" office:string-value="E7A4" calcext:value-type="string">
            <text:p>E7A4</text:p>
          </table:table-cell>
          <table:table-cell table:formula="of:=CONCATENATE(&quot;0x&quot;;[.G71])" office:value-type="string" office:string-value="0xE7A4" calcext:value-type="string">
            <text:p>0xE7A4</text:p>
          </table:table-cell>
          <table:table-cell table:formula="of:=VLOOKUP([.H71];[$FROMVS_Names.$A$1:$FROMVS_Names.$B$151];2;0)" office:value-type="string" office:string-value="pi_epsilon_rho" calcext:value-type="string">
            <text:p>pi_epsilon_rho</text:p>
          </table:table-cell>
          <table:table-cell table:style-name="ce7" table:formula="of:=IF(EXACT([.C71];[.G7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A1</text:p>
          </table:table-cell>
          <table:table-cell office:value-type="string" calcext:value-type="string">
            <text:p>pi_alpha_rho</text:p>
          </table:table-cell>
          <table:table-cell table:formula="of:=RIGHT([.A72];4)" office:value-type="string" office:string-value="E7A1" calcext:value-type="string">
            <text:p>E7A1</text:p>
          </table:table-cell>
          <table:table-cell table:style-name="ce3" table:formula="of:=UNICHAR(HEX2DEC([.C72]))" office:value-type="string" office:string-value="" calcext:value-type="string">
            <text:p></text:p>
          </table:table-cell>
          <table:table-cell office:value-type="string" calcext:value-type="string">
            <text:p>παρ</text:p>
          </table:table-cell>
          <table:table-cell office:value-type="string" calcext:value-type="string">
            <text:p></text:p>
          </table:table-cell>
          <table:table-cell table:style-name="ce19" table:formula="of:=DEC2HEX(UNICODE([.F72]))" office:value-type="string" office:string-value="E7A3" calcext:value-type="string">
            <text:p>E7A3</text:p>
          </table:table-cell>
          <table:table-cell table:formula="of:=CONCATENATE(&quot;0x&quot;;[.G72])" office:value-type="string" office:string-value="0xE7A3" calcext:value-type="string">
            <text:p>0xE7A3</text:p>
          </table:table-cell>
          <table:table-cell table:formula="of:=VLOOKUP([.H72];[$FROMVS_Names.$A$1:$FROMVS_Names.$B$151];2;0)" office:value-type="string" office:string-value="pi_alpha_rho" calcext:value-type="string">
            <text:p>pi_alpha_rho</text:p>
          </table:table-cell>
          <table:table-cell table:style-name="ce7" table:formula="of:=IF(EXACT([.C72];[.G7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9</text:p>
          </table:table-cell>
          <table:table-cell office:value-type="string" calcext:value-type="string">
            <text:p>pisymbol_psili</text:p>
          </table:table-cell>
          <table:table-cell table:formula="of:=RIGHT([.A73];4)" office:value-type="string" office:string-value="E829" calcext:value-type="string">
            <text:p>E829</text:p>
          </table:table-cell>
          <table:table-cell table:style-name="ce3" table:formula="of:=UNICHAR(HEX2DEC([.C73]))" office:value-type="string" office:string-value="" calcext:value-type="string">
            <text:p></text:p>
          </table:table-cell>
          <table:table-cell office:value-type="string" calcext:value-type="string">
            <text:p><text:span text:style-name="T1">ϖ</text:span>'</text:p>
          </table:table-cell>
          <table:table-cell table:style-name="ce21" office:value-type="string" calcext:value-type="string">
            <text:p></text:p>
          </table:table-cell>
          <table:table-cell table:formula="of:=DEC2HEX(UNICODE([.F73]))" office:value-type="string" office:string-value="E7A2" calcext:value-type="string">
            <text:p>E7A2</text:p>
          </table:table-cell>
          <table:table-cell table:formula="of:=CONCATENATE(&quot;0x&quot;;[.G73])" office:value-type="string" office:string-value="0xE7A2" calcext:value-type="string">
            <text:p>0xE7A2</text:p>
          </table:table-cell>
          <table:table-cell table:formula="of:=VLOOKUP([.H73];[$FROMVS_Names.$A$1:$FROMVS_Names.$B$151];2;0)" office:value-type="string" office:string-value="pisymbol_psili" calcext:value-type="string">
            <text:p>pisymbol_psili</text:p>
          </table:table-cell>
          <table:table-cell table:style-name="ce7" table:formula="of:=IF(EXACT([.C73];[.G7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D</text:p>
          </table:table-cell>
          <table:table-cell office:value-type="string" calcext:value-type="string">
            <text:p>pi_psili</text:p>
          </table:table-cell>
          <table:table-cell table:formula="of:=RIGHT([.A74];4)" office:value-type="string" office:string-value="E82D" calcext:value-type="string">
            <text:p>E82D</text:p>
          </table:table-cell>
          <table:table-cell table:style-name="ce3" table:formula="of:=UNICHAR(HEX2DEC([.C74]))" office:value-type="string" office:string-value="" calcext:value-type="string">
            <text:p></text:p>
          </table:table-cell>
          <table:table-cell office:value-type="string" calcext:value-type="string">
            <text:p>π'</text:p>
          </table:table-cell>
          <table:table-cell table:style-name="ce21" office:value-type="string" calcext:value-type="string">
            <text:p></text:p>
          </table:table-cell>
          <table:table-cell table:formula="of:=DEC2HEX(UNICODE([.F74]))" office:value-type="string" office:string-value="E7A1" calcext:value-type="string">
            <text:p>E7A1</text:p>
          </table:table-cell>
          <table:table-cell table:formula="of:=CONCATENATE(&quot;0x&quot;;[.G74])" office:value-type="string" office:string-value="0xE7A1" calcext:value-type="string">
            <text:p>0xE7A1</text:p>
          </table:table-cell>
          <table:table-cell table:formula="of:=VLOOKUP([.H74];[$FROMVS_Names.$A$1:$FROMVS_Names.$B$151];2;0)" office:value-type="string" office:string-value="pi_psili" calcext:value-type="string">
            <text:p>pi_psili</text:p>
          </table:table-cell>
          <table:table-cell table:style-name="ce7" table:formula="of:=IF(EXACT([.C74];[.G74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6</text:p>
          </table:table-cell>
          <table:table-cell office:value-type="string" calcext:value-type="string">
            <text:p>omicron_sigma</text:p>
          </table:table-cell>
          <table:table-cell table:formula="of:=RIGHT([.A75];4)" office:value-type="string" office:string-value="E796" calcext:value-type="string">
            <text:p>E796</text:p>
          </table:table-cell>
          <table:table-cell table:style-name="ce3" table:formula="of:=UNICHAR(HEX2DEC([.C75]))" office:value-type="string" office:string-value="" calcext:value-type="string">
            <text:p></text:p>
          </table:table-cell>
          <table:table-cell office:value-type="string" calcext:value-type="string">
            <text:p>οσ</text:p>
          </table:table-cell>
          <table:table-cell table:style-name="ce23" office:value-type="string" calcext:value-type="string">
            <text:p></text:p>
          </table:table-cell>
          <table:table-cell table:style-name="ce19" table:formula="of:=DEC2HEX(UNICODE([.F75]))" office:value-type="string" office:string-value="E79D" calcext:value-type="string">
            <text:p>E79D</text:p>
          </table:table-cell>
          <table:table-cell table:formula="of:=CONCATENATE(&quot;0x&quot;;[.G75])" office:value-type="string" office:string-value="0xE79D" calcext:value-type="string">
            <text:p>0xE79D</text:p>
          </table:table-cell>
          <table:table-cell table:style-name="ce19" table:formula="of:=VLOOKUP([.H75];[$FROMVS_Names.$A$1:$FROMVS_Names.$B$151];2;0)" office:value-type="string" office:string-value="omicron_sigma" calcext:value-type="string">
            <text:p>omicron_sigma</text:p>
          </table:table-cell>
          <table:table-cell table:style-name="ce7" table:formula="of:=IF(EXACT([.C75];[.G75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5</text:p>
          </table:table-cell>
          <table:table-cell office:value-type="string" calcext:value-type="string">
            <text:p>omicron_upsilon_persipomeni</text:p>
          </table:table-cell>
          <table:table-cell table:formula="of:=RIGHT([.A76];4)" office:value-type="string" office:string-value="E795" calcext:value-type="string">
            <text:p>E795</text:p>
          </table:table-cell>
          <table:table-cell table:style-name="ce3" table:formula="of:=UNICHAR(HEX2DEC([.C76]))" office:value-type="string" office:string-value="" calcext:value-type="string">
            <text:p></text:p>
          </table:table-cell>
          <table:table-cell office:value-type="string" calcext:value-type="string">
            <text:p>o<text:span text:style-name="T1">ῦ</text:span></text:p>
          </table:table-cell>
          <table:table-cell table:style-name="ce23" office:value-type="string" calcext:value-type="string">
            <text:p></text:p>
          </table:table-cell>
          <table:table-cell table:style-name="ce19" table:formula="of:=DEC2HEX(UNICODE([.F76]))" office:value-type="string" office:string-value="E79C" calcext:value-type="string">
            <text:p>E79C</text:p>
          </table:table-cell>
          <table:table-cell table:formula="of:=CONCATENATE(&quot;0x&quot;;[.G76])" office:value-type="string" office:string-value="0xE79C" calcext:value-type="string">
            <text:p>0xE79C</text:p>
          </table:table-cell>
          <table:table-cell table:style-name="ce19" table:formula="of:=VLOOKUP([.H76];[$FROMVS_Names.$A$1:$FROMVS_Names.$B$151];2;0)" office:value-type="string" office:string-value="omicron_upsilon_persipomeni" calcext:value-type="string">
            <text:p>omicron_upsilon_persipomeni</text:p>
          </table:table-cell>
          <table:table-cell table:style-name="ce7" table:formula="of:=IF(EXACT([.C76];[.G76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4</text:p>
          </table:table-cell>
          <table:table-cell office:value-type="string" calcext:value-type="string">
            <text:p>omicron_upsilon_oxia</text:p>
          </table:table-cell>
          <table:table-cell table:formula="of:=RIGHT([.A77];4)" office:value-type="string" office:string-value="E794" calcext:value-type="string">
            <text:p>E794</text:p>
          </table:table-cell>
          <table:table-cell table:style-name="ce3" table:formula="of:=UNICHAR(HEX2DEC([.C77]))" office:value-type="string" office:string-value="" calcext:value-type="string">
            <text:p></text:p>
          </table:table-cell>
          <table:table-cell office:value-type="string" calcext:value-type="string">
            <text:p>o<text:span text:style-name="T1">ύ</text:span></text:p>
          </table:table-cell>
          <table:table-cell table:style-name="ce23" office:value-type="string" calcext:value-type="string">
            <text:p></text:p>
          </table:table-cell>
          <table:table-cell table:style-name="ce19" table:formula="of:=DEC2HEX(UNICODE([.F77]))" office:value-type="string" office:string-value="E79B" calcext:value-type="string">
            <text:p>E79B</text:p>
          </table:table-cell>
          <table:table-cell table:formula="of:=CONCATENATE(&quot;0x&quot;;[.G77])" office:value-type="string" office:string-value="0xE79B" calcext:value-type="string">
            <text:p>0xE79B</text:p>
          </table:table-cell>
          <table:table-cell table:style-name="ce19" table:formula="of:=VLOOKUP([.H77];[$FROMVS_Names.$A$1:$FROMVS_Names.$B$151];2;0)" office:value-type="string" office:string-value="omicron_upsilon_tonos" calcext:value-type="string">
            <text:p>omicron_upsilon_tonos</text:p>
          </table:table-cell>
          <table:table-cell table:style-name="ce7" table:formula="of:=IF(EXACT([.C77];[.G7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3</text:p>
          </table:table-cell>
          <table:table-cell office:value-type="string" calcext:value-type="string">
            <text:p>omicron_upsilon</text:p>
          </table:table-cell>
          <table:table-cell table:formula="of:=RIGHT([.A78];4)" office:value-type="string" office:string-value="E793" calcext:value-type="string">
            <text:p>E793</text:p>
          </table:table-cell>
          <table:table-cell table:style-name="ce3" table:formula="of:=UNICHAR(HEX2DEC([.C78]))" office:value-type="string" office:string-value="" calcext:value-type="string">
            <text:p></text:p>
          </table:table-cell>
          <table:table-cell office:value-type="string" calcext:value-type="string">
            <text:p>ου</text:p>
          </table:table-cell>
          <table:table-cell table:style-name="ce23" office:value-type="string" calcext:value-type="string">
            <text:p></text:p>
          </table:table-cell>
          <table:table-cell table:style-name="ce19" table:formula="of:=DEC2HEX(UNICODE([.F78]))" office:value-type="string" office:string-value="E79A" calcext:value-type="string">
            <text:p>E79A</text:p>
          </table:table-cell>
          <table:table-cell table:formula="of:=CONCATENATE(&quot;0x&quot;;[.G78])" office:value-type="string" office:string-value="0xE79A" calcext:value-type="string">
            <text:p>0xE79A</text:p>
          </table:table-cell>
          <table:table-cell table:style-name="ce19" table:formula="of:=VLOOKUP([.H78];[$FROMVS_Names.$A$1:$FROMVS_Names.$B$151];2;0)" office:value-type="string" office:string-value="omicron_upsilon" calcext:value-type="string">
            <text:p>omicron_upsilon</text:p>
          </table:table-cell>
          <table:table-cell table:style-name="ce7" table:formula="of:=IF(EXACT([.C78];[.G7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0</text:p>
          </table:table-cell>
          <table:table-cell office:value-type="string" calcext:value-type="string">
            <text:p>omicron_perispomeni</text:p>
          </table:table-cell>
          <table:table-cell table:formula="of:=RIGHT([.A79];4)" office:value-type="string" office:string-value="E790" calcext:value-type="string">
            <text:p>E790</text:p>
          </table:table-cell>
          <table:table-cell table:style-name="ce3" table:formula="of:=UNICHAR(HEX2DEC([.C79]))" office:value-type="string" office:string-value="" calcext:value-type="string">
            <text:p></text:p>
          </table:table-cell>
          <table:table-cell table:style-name="ce14" office:value-type="string" calcext:value-type="string">
            <text:p></text:p>
          </table:table-cell>
          <table:table-cell table:style-name="ce23" office:value-type="string" calcext:value-type="string">
            <text:p></text:p>
          </table:table-cell>
          <table:table-cell table:style-name="ce19" table:formula="of:=DEC2HEX(UNICODE([.F79]))" office:value-type="string" office:string-value="E799" calcext:value-type="string">
            <text:p>E799</text:p>
          </table:table-cell>
          <table:table-cell table:formula="of:=CONCATENATE(&quot;0x&quot;;[.G79])" office:value-type="string" office:string-value="0xE799" calcext:value-type="string">
            <text:p>0xE799</text:p>
          </table:table-cell>
          <table:table-cell table:style-name="ce19" table:formula="of:=VLOOKUP([.H79];[$FROMVS_Names.$A$1:$FROMVS_Names.$B$151];2;0)" office:value-type="string" office:string-value="omicron_perispomeni" calcext:value-type="string">
            <text:p>omicron_perispomeni</text:p>
          </table:table-cell>
          <table:table-cell table:style-name="ce7" table:formula="of:=IF(EXACT([.C79];[.G7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2</text:p>
          </table:table-cell>
          <table:table-cell office:value-type="string" calcext:value-type="string">
            <text:p>omicron_dasia_perispomeni</text:p>
          </table:table-cell>
          <table:table-cell table:formula="of:=RIGHT([.A80];4)" office:value-type="string" office:string-value="E792" calcext:value-type="string">
            <text:p>E792</text:p>
          </table:table-cell>
          <table:table-cell table:style-name="ce3" table:formula="of:=UNICHAR(HEX2DEC([.C80]))" office:value-type="string" office:string-value="" calcext:value-type="string">
            <text:p></text:p>
          </table:table-cell>
          <table:table-cell table:style-name="ce14" office:value-type="string" calcext:value-type="string">
            <text:p></text:p>
          </table:table-cell>
          <table:table-cell table:style-name="ce23" office:value-type="string" calcext:value-type="string">
            <text:p></text:p>
          </table:table-cell>
          <table:table-cell table:style-name="ce19" table:formula="of:=DEC2HEX(UNICODE([.F80]))" office:value-type="string" office:string-value="E798" calcext:value-type="string">
            <text:p>E798</text:p>
          </table:table-cell>
          <table:table-cell table:formula="of:=CONCATENATE(&quot;0x&quot;;[.G80])" office:value-type="string" office:string-value="0xE798" calcext:value-type="string">
            <text:p>0xE798</text:p>
          </table:table-cell>
          <table:table-cell table:style-name="ce19" table:formula="of:=VLOOKUP([.H80];[$FROMVS_Names.$A$1:$FROMVS_Names.$B$151];2;0)" office:value-type="string" office:string-value="omicron_dasia_perispomeni" calcext:value-type="string">
            <text:p>omicron_dasia_perispomeni</text:p>
          </table:table-cell>
          <table:table-cell table:style-name="ce7" table:formula="of:=IF(EXACT([.C80];[.G8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91</text:p>
          </table:table-cell>
          <table:table-cell office:value-type="string" calcext:value-type="string">
            <text:p>omicron_psili_perispomeni</text:p>
          </table:table-cell>
          <table:table-cell table:formula="of:=RIGHT([.A81];4)" office:value-type="string" office:string-value="E791" calcext:value-type="string">
            <text:p>E791</text:p>
          </table:table-cell>
          <table:table-cell table:style-name="ce3" table:formula="of:=UNICHAR(HEX2DEC([.C81]))" office:value-type="string" office:string-value="" calcext:value-type="string">
            <text:p></text:p>
          </table:table-cell>
          <table:table-cell table:style-name="ce14" office:value-type="string" calcext:value-type="string">
            <text:p></text:p>
          </table:table-cell>
          <table:table-cell table:style-name="ce23" office:value-type="string" calcext:value-type="string">
            <text:p></text:p>
          </table:table-cell>
          <table:table-cell table:style-name="ce19" table:formula="of:=DEC2HEX(UNICODE([.F81]))" office:value-type="string" office:string-value="E797" calcext:value-type="string">
            <text:p>E797</text:p>
          </table:table-cell>
          <table:table-cell table:formula="of:=CONCATENATE(&quot;0x&quot;;[.G81])" office:value-type="string" office:string-value="0xE797" calcext:value-type="string">
            <text:p>0xE797</text:p>
          </table:table-cell>
          <table:table-cell table:style-name="ce19" table:formula="of:=VLOOKUP([.H81];[$FROMVS_Names.$A$1:$FROMVS_Names.$B$151];2;0)" office:value-type="string" office:string-value="omicron_psili_perispomeni" calcext:value-type="string">
            <text:p>omicron_psili_perispomeni</text:p>
          </table:table-cell>
          <table:table-cell table:style-name="ce7" table:formula="of:=IF(EXACT([.C81];[.G8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80</text:p>
          </table:table-cell>
          <table:table-cell office:value-type="string" calcext:value-type="string">
            <text:p>xi_1</text:p>
          </table:table-cell>
          <table:table-cell office:value-type="string" calcext:value-type="string">
            <text:p>E780</text:p>
          </table:table-cell>
          <table:table-cell table:style-name="ce3" table:formula="of:=UNICHAR(HEX2DEC([.C82]))" office:value-type="string" office:string-value="" calcext:value-type="string">
            <text:p></text:p>
          </table:table-cell>
          <table:table-cell office:value-type="string" calcext:value-type="string">
            <text:p>ξ</text:p>
          </table:table-cell>
          <table:table-cell table:style-name="ce21" office:value-type="string" calcext:value-type="string">
            <text:p></text:p>
          </table:table-cell>
          <table:table-cell table:style-name="ce19" table:formula="of:=DEC2HEX(UNICODE([.F82]))" office:value-type="string" office:string-value="E780" calcext:value-type="string">
            <text:p>E780</text:p>
          </table:table-cell>
          <table:table-cell table:formula="of:=CONCATENATE(&quot;0x&quot;;[.G82])" office:value-type="string" office:string-value="0xE780" calcext:value-type="string">
            <text:p>0xE780</text:p>
          </table:table-cell>
          <table:table-cell table:formula="of:=VLOOKUP([.H82];[$FROMVS_Names.$A$1:$FROMVS_Names.$B$151];2;0)" office:value-type="string" office:string-value="xi_2" calcext:value-type="string">
            <text:p>xi_2</text:p>
          </table:table-cell>
          <table:table-cell table:style-name="ce7" table:formula="of:=IF(EXACT([.C82];[.G8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70</text:p>
          </table:table-cell>
          <table:table-cell office:value-type="string" calcext:value-type="string">
            <text:p>nu_final</text:p>
          </table:table-cell>
          <table:table-cell table:formula="of:=RIGHT([.A83];4)" office:value-type="string" office:string-value="E770" calcext:value-type="string">
            <text:p>E770</text:p>
          </table:table-cell>
          <table:table-cell table:style-name="ce3" table:formula="of:=UNICHAR(HEX2DEC([.C83]))" office:value-type="string" office:string-value="" calcext:value-type="string">
            <text:p></text:p>
          </table:table-cell>
          <table:table-cell office:value-type="string" calcext:value-type="string">
            <text:p>ν</text:p>
          </table:table-cell>
          <table:table-cell table:style-name="ce21" office:value-type="string" calcext:value-type="string">
            <text:p></text:p>
          </table:table-cell>
          <table:table-cell table:style-name="ce19" table:formula="of:=DEC2HEX(UNICODE([.F83]))" office:value-type="string" office:string-value="E770" calcext:value-type="string">
            <text:p>E770</text:p>
          </table:table-cell>
          <table:table-cell table:formula="of:=CONCATENATE(&quot;0x&quot;;[.G83])" office:value-type="string" office:string-value="0xE770" calcext:value-type="string">
            <text:p>0xE770</text:p>
          </table:table-cell>
          <table:table-cell table:formula="of:=VLOOKUP([.H83];[$FROMVS_Names.$A$1:$FROMVS_Names.$B$151];2;0)" office:value-type="string" office:string-value="nu_final" calcext:value-type="string">
            <text:p>nu_final</text:p>
          </table:table-cell>
          <table:table-cell table:style-name="ce7" table:formula="of:=IF(EXACT([.C83];[.G8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5</text:p>
          </table:table-cell>
          <table:table-cell office:value-type="string" calcext:value-type="string">
            <text:p>mu_epsilon_nu_1_oxia</text:p>
          </table:table-cell>
          <table:table-cell table:formula="of:=RIGHT([.A84];4)" office:value-type="string" office:string-value="E765" calcext:value-type="string">
            <text:p>E765</text:p>
          </table:table-cell>
          <table:table-cell table:style-name="ce3" table:formula="of:=UNICHAR(HEX2DEC([.C84]))" office:value-type="string" office:string-value="" calcext:value-type="string">
            <text:p></text:p>
          </table:table-cell>
          <table:table-cell office:value-type="string" calcext:value-type="string">
            <text:p>μ<text:span text:style-name="T1">έ</text:span>ν</text:p>
          </table:table-cell>
          <table:table-cell office:value-type="string" calcext:value-type="string">
            <text:p></text:p>
          </table:table-cell>
          <table:table-cell table:style-name="ce19" table:formula="of:=DEC2HEX(UNICODE([.F84]))" office:value-type="string" office:string-value="E765" calcext:value-type="string">
            <text:p>E765</text:p>
          </table:table-cell>
          <table:table-cell table:formula="of:=CONCATENATE(&quot;0x&quot;;[.G84])" office:value-type="string" office:string-value="0xE765" calcext:value-type="string">
            <text:p>0xE765</text:p>
          </table:table-cell>
          <table:table-cell table:formula="of:=VLOOKUP([.H84];[$FROMVS_Names.$A$1:$FROMVS_Names.$B$151];2;0)" office:value-type="string" office:string-value="mu_epsilon_tonos_nu" calcext:value-type="string">
            <text:p>mu_epsilon_tonos_nu</text:p>
          </table:table-cell>
          <table:table-cell table:style-name="ce7" table:formula="of:=IF(EXACT([.C84];[.G8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4</text:p>
          </table:table-cell>
          <table:table-cell office:value-type="string" calcext:value-type="string">
            <text:p>mu_epsilon_nu_3_varia</text:p>
          </table:table-cell>
          <table:table-cell table:formula="of:=RIGHT([.A85];4)" office:value-type="string" office:string-value="E764" calcext:value-type="string">
            <text:p>E764</text:p>
          </table:table-cell>
          <table:table-cell table:style-name="ce3" table:formula="of:=UNICHAR(HEX2DEC([.C85]))" office:value-type="string" office:string-value="" calcext:value-type="string">
            <text:p></text:p>
          </table:table-cell>
          <table:table-cell office:value-type="string" calcext:value-type="string">
            <text:p>μὲν</text:p>
          </table:table-cell>
          <table:table-cell office:value-type="string" calcext:value-type="string">
            <text:p></text:p>
          </table:table-cell>
          <table:table-cell table:style-name="ce19" table:formula="of:=DEC2HEX(UNICODE([.F85]))" office:value-type="string" office:string-value="E764" calcext:value-type="string">
            <text:p>E764</text:p>
          </table:table-cell>
          <table:table-cell table:formula="of:=CONCATENATE(&quot;0x&quot;;[.G85])" office:value-type="string" office:string-value="0xE764" calcext:value-type="string">
            <text:p>0xE764</text:p>
          </table:table-cell>
          <table:table-cell table:formula="of:=VLOOKUP([.H85];[$FROMVS_Names.$A$1:$FROMVS_Names.$B$151];2;0)" office:value-type="string" office:string-value="mu_epsilon_varia_2_nu" calcext:value-type="string">
            <text:p>mu_epsilon_varia_2_nu</text:p>
          </table:table-cell>
          <table:table-cell table:style-name="ce7" table:formula="of:=IF(EXACT([.C85];[.G8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3</text:p>
          </table:table-cell>
          <table:table-cell office:value-type="string" calcext:value-type="string">
            <text:p>mu_epsilon_nu_4_varia</text:p>
          </table:table-cell>
          <table:table-cell table:formula="of:=RIGHT([.A86];4)" office:value-type="string" office:string-value="E763" calcext:value-type="string">
            <text:p>E763</text:p>
          </table:table-cell>
          <table:table-cell table:style-name="ce3" table:formula="of:=UNICHAR(HEX2DEC([.C86]))" office:value-type="string" office:string-value="" calcext:value-type="string">
            <text:p></text:p>
          </table:table-cell>
          <table:table-cell office:value-type="string" calcext:value-type="string">
            <text:p>μὲν</text:p>
          </table:table-cell>
          <table:table-cell office:value-type="string" calcext:value-type="string">
            <text:p></text:p>
          </table:table-cell>
          <table:table-cell table:style-name="ce19" table:formula="of:=DEC2HEX(UNICODE([.F86]))" office:value-type="string" office:string-value="E763" calcext:value-type="string">
            <text:p>E763</text:p>
          </table:table-cell>
          <table:table-cell table:formula="of:=CONCATENATE(&quot;0x&quot;;[.G86])" office:value-type="string" office:string-value="0xE763" calcext:value-type="string">
            <text:p>0xE763</text:p>
          </table:table-cell>
          <table:table-cell table:formula="of:=VLOOKUP([.H86];[$FROMVS_Names.$A$1:$FROMVS_Names.$B$151];2;0)" office:value-type="string" office:string-value="mu_epsilon_varia_nu" calcext:value-type="string">
            <text:p>mu_epsilon_varia_nu</text:p>
          </table:table-cell>
          <table:table-cell table:style-name="ce7" table:formula="of:=IF(EXACT([.C86];[.G8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2</text:p>
          </table:table-cell>
          <table:table-cell office:value-type="string" calcext:value-type="string">
            <text:p>mu_epsilon_nu_3</text:p>
          </table:table-cell>
          <table:table-cell table:formula="of:=RIGHT([.A87];4)" office:value-type="string" office:string-value="E762" calcext:value-type="string">
            <text:p>E762</text:p>
          </table:table-cell>
          <table:table-cell table:style-name="ce3" table:formula="of:=UNICHAR(HEX2DEC([.C87]))" office:value-type="string" office:string-value="" calcext:value-type="string">
            <text:p></text:p>
          </table:table-cell>
          <table:table-cell office:value-type="string" calcext:value-type="string">
            <text:p>μεν</text:p>
          </table:table-cell>
          <table:table-cell office:value-type="string" calcext:value-type="string">
            <text:p></text:p>
          </table:table-cell>
          <table:table-cell table:style-name="ce19" table:formula="of:=DEC2HEX(UNICODE([.F87]))" office:value-type="string" office:string-value="E762" calcext:value-type="string">
            <text:p>E762</text:p>
          </table:table-cell>
          <table:table-cell table:formula="of:=CONCATENATE(&quot;0x&quot;;[.G87])" office:value-type="string" office:string-value="0xE762" calcext:value-type="string">
            <text:p>0xE762</text:p>
          </table:table-cell>
          <table:table-cell table:formula="of:=VLOOKUP([.H87];[$FROMVS_Names.$A$1:$FROMVS_Names.$B$151];2;0)" office:value-type="string" office:string-value="mu_epsilon_nu_3" calcext:value-type="string">
            <text:p>mu_epsilon_nu_3</text:p>
          </table:table-cell>
          <table:table-cell table:style-name="ce7" table:formula="of:=IF(EXACT([.C87];[.G8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1</text:p>
          </table:table-cell>
          <table:table-cell office:value-type="string" calcext:value-type="string">
            <text:p>mu_epsilon_nu_2</text:p>
          </table:table-cell>
          <table:table-cell table:formula="of:=RIGHT([.A88];4)" office:value-type="string" office:string-value="E761" calcext:value-type="string">
            <text:p>E761</text:p>
          </table:table-cell>
          <table:table-cell table:style-name="ce3" table:formula="of:=UNICHAR(HEX2DEC([.C88]))" office:value-type="string" office:string-value="" calcext:value-type="string">
            <text:p></text:p>
          </table:table-cell>
          <table:table-cell office:value-type="string" calcext:value-type="string">
            <text:p>μεν</text:p>
          </table:table-cell>
          <table:table-cell office:value-type="string" calcext:value-type="string">
            <text:p></text:p>
          </table:table-cell>
          <table:table-cell table:style-name="ce19" table:formula="of:=DEC2HEX(UNICODE([.F88]))" office:value-type="string" office:string-value="E761" calcext:value-type="string">
            <text:p>E761</text:p>
          </table:table-cell>
          <table:table-cell table:formula="of:=CONCATENATE(&quot;0x&quot;;[.G88])" office:value-type="string" office:string-value="0xE761" calcext:value-type="string">
            <text:p>0xE761</text:p>
          </table:table-cell>
          <table:table-cell table:formula="of:=VLOOKUP([.H88];[$FROMVS_Names.$A$1:$FROMVS_Names.$B$151];2;0)" office:value-type="string" office:string-value="mu_epsilon_nu_2" calcext:value-type="string">
            <text:p>mu_epsilon_nu_2</text:p>
          </table:table-cell>
          <table:table-cell table:style-name="ce7" table:formula="of:=IF(EXACT([.C88];[.G8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60</text:p>
          </table:table-cell>
          <table:table-cell office:value-type="string" calcext:value-type="string">
            <text:p>mu_epsilon_nu_1</text:p>
          </table:table-cell>
          <table:table-cell table:formula="of:=RIGHT([.A89];4)" office:value-type="string" office:string-value="E760" calcext:value-type="string">
            <text:p>E760</text:p>
          </table:table-cell>
          <table:table-cell table:style-name="ce3" table:formula="of:=UNICHAR(HEX2DEC([.C89]))" office:value-type="string" office:string-value="" calcext:value-type="string">
            <text:p></text:p>
          </table:table-cell>
          <table:table-cell office:value-type="string" calcext:value-type="string">
            <text:p>μεν</text:p>
          </table:table-cell>
          <table:table-cell office:value-type="string" calcext:value-type="string">
            <text:p></text:p>
          </table:table-cell>
          <table:table-cell table:style-name="ce19" table:formula="of:=DEC2HEX(UNICODE([.F89]))" office:value-type="string" office:string-value="E760" calcext:value-type="string">
            <text:p>E760</text:p>
          </table:table-cell>
          <table:table-cell table:formula="of:=CONCATENATE(&quot;0x&quot;;[.G89])" office:value-type="string" office:string-value="0xE760" calcext:value-type="string">
            <text:p>0xE760</text:p>
          </table:table-cell>
          <table:table-cell table:formula="of:=VLOOKUP([.H89];[$FROMVS_Names.$A$1:$FROMVS_Names.$B$151];2;0)" office:value-type="string" office:string-value="mu_epsilon_nu" calcext:value-type="string">
            <text:p>mu_epsilon_nu</text:p>
          </table:table-cell>
          <table:table-cell table:style-name="ce7" table:formula="of:=IF(EXACT([.C89];[.G8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50</text:p>
          </table:table-cell>
          <table:table-cell office:value-type="string" calcext:value-type="string">
            <text:p>lambda_lambda</text:p>
          </table:table-cell>
          <table:table-cell table:formula="of:=RIGHT([.A90];4)" office:value-type="string" office:string-value="E750" calcext:value-type="string">
            <text:p>E750</text:p>
          </table:table-cell>
          <table:table-cell table:style-name="ce3" table:formula="of:=UNICHAR(HEX2DEC([.C90]))" office:value-type="string" office:string-value="" calcext:value-type="string">
            <text:p></text:p>
          </table:table-cell>
          <table:table-cell office:value-type="string" calcext:value-type="string">
            <text:p>λλ</text:p>
          </table:table-cell>
          <table:table-cell table:style-name="ce21" office:value-type="string" calcext:value-type="string">
            <text:p></text:p>
          </table:table-cell>
          <table:table-cell table:style-name="ce19" table:formula="of:=DEC2HEX(UNICODE([.F90]))" office:value-type="string" office:string-value="E751" calcext:value-type="string">
            <text:p>E751</text:p>
          </table:table-cell>
          <table:table-cell table:formula="of:=CONCATENATE(&quot;0x&quot;;[.G90])" office:value-type="string" office:string-value="0xE751" calcext:value-type="string">
            <text:p>0xE751</text:p>
          </table:table-cell>
          <table:table-cell table:formula="of:=VLOOKUP([.H90];[$FROMVS_Names.$A$1:$FROMVS_Names.$B$151];2;0)" office:value-type="string" office:string-value="lambda_lambda" calcext:value-type="string">
            <text:p>lambda_lambda</text:p>
          </table:table-cell>
          <table:table-cell table:style-name="ce7" table:formula="of:=IF(EXACT([.C90];[.G9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C</text:p>
          </table:table-cell>
          <table:table-cell office:value-type="string" calcext:value-type="string">
            <text:p>lambda_psili</text:p>
          </table:table-cell>
          <table:table-cell table:formula="of:=RIGHT([.A91];4)" office:value-type="string" office:string-value="E82C" calcext:value-type="string">
            <text:p>E82C</text:p>
          </table:table-cell>
          <table:table-cell table:style-name="ce3" table:formula="of:=UNICHAR(HEX2DEC([.C91]))" office:value-type="string" office:string-value="" calcext:value-type="string">
            <text:p></text:p>
          </table:table-cell>
          <table:table-cell office:value-type="string" calcext:value-type="string">
            <text:p>λ'</text:p>
          </table:table-cell>
          <table:table-cell table:style-name="ce21" office:value-type="string" calcext:value-type="string">
            <text:p></text:p>
          </table:table-cell>
          <table:table-cell table:formula="of:=DEC2HEX(UNICODE([.F91]))" office:value-type="string" office:string-value="E750" calcext:value-type="string">
            <text:p>E750</text:p>
          </table:table-cell>
          <table:table-cell table:formula="of:=CONCATENATE(&quot;0x&quot;;[.G91])" office:value-type="string" office:string-value="0xE750" calcext:value-type="string">
            <text:p>0xE750</text:p>
          </table:table-cell>
          <table:table-cell table:formula="of:=VLOOKUP([.H91];[$FROMVS_Names.$A$1:$FROMVS_Names.$B$151];2;0)" office:value-type="string" office:string-value="lambda_psili" calcext:value-type="string">
            <text:p>lambda_psili</text:p>
          </table:table-cell>
          <table:table-cell table:style-name="ce7" table:formula="of:=IF(EXACT([.C91];[.G9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44</text:p>
          </table:table-cell>
          <table:table-cell office:value-type="string" calcext:value-type="string">
            <text:p>kappa_alpha_tau_alpha</text:p>
          </table:table-cell>
          <table:table-cell table:formula="of:=RIGHT([.A92];4)" office:value-type="string" office:string-value="E744" calcext:value-type="string">
            <text:p>E744</text:p>
          </table:table-cell>
          <table:table-cell table:style-name="ce3" table:formula="of:=UNICHAR(HEX2DEC([.C92]))" office:value-type="string" office:string-value="" calcext:value-type="string">
            <text:p></text:p>
          </table:table-cell>
          <table:table-cell office:value-type="string" calcext:value-type="string">
            <text:p>κατα</text:p>
          </table:table-cell>
          <table:table-cell office:value-type="string" calcext:value-type="string">
            <text:p></text:p>
          </table:table-cell>
          <table:table-cell table:style-name="ce19" table:formula="of:=DEC2HEX(UNICODE([.F92]))" office:value-type="string" office:string-value="E744" calcext:value-type="string">
            <text:p>E744</text:p>
          </table:table-cell>
          <table:table-cell table:formula="of:=CONCATENATE(&quot;0x&quot;;[.G92])" office:value-type="string" office:string-value="0xE744" calcext:value-type="string">
            <text:p>0xE744</text:p>
          </table:table-cell>
          <table:table-cell table:formula="of:=VLOOKUP([.H92];[$FROMVS_Names.$A$1:$FROMVS_Names.$B$151];2;0)" office:value-type="string" office:string-value="kappa_alpha_tau_alpha" calcext:value-type="string">
            <text:p>kappa_alpha_tau_alpha</text:p>
          </table:table-cell>
          <table:table-cell table:style-name="ce7" table:formula="of:=IF(EXACT([.C92];[.G9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43</text:p>
          </table:table-cell>
          <table:table-cell office:value-type="string" calcext:value-type="string">
            <text:p>kappa_alpha_iota_4_varia</text:p>
          </table:table-cell>
          <table:table-cell table:formula="of:=RIGHT([.A93];4)" office:value-type="string" office:string-value="E743" calcext:value-type="string">
            <text:p>E743</text:p>
          </table:table-cell>
          <table:table-cell table:style-name="ce3" table:formula="of:=UNICHAR(HEX2DEC([.C93]))" office:value-type="string" office:string-value="" calcext:value-type="string">
            <text:p></text:p>
          </table:table-cell>
          <table:table-cell office:value-type="string" calcext:value-type="string">
            <text:p>καὶ</text:p>
          </table:table-cell>
          <table:table-cell office:value-type="string" calcext:value-type="string">
            <text:p></text:p>
          </table:table-cell>
          <table:table-cell table:formula="of:=DEC2HEX(UNICODE([.F93]))" office:value-type="string" office:string-value="E743" calcext:value-type="string">
            <text:p>E743</text:p>
          </table:table-cell>
          <table:table-cell table:formula="of:=CONCATENATE(&quot;0x&quot;;[.G93])" office:value-type="string" office:string-value="0xE743" calcext:value-type="string">
            <text:p>0xE743</text:p>
          </table:table-cell>
          <table:table-cell table:formula="of:=VLOOKUP([.H93];[$FROMVS_Names.$A$1:$FROMVS_Names.$B$151];2;0)" office:value-type="string" office:string-value="kappa_alpha_iota_5_varia" calcext:value-type="string">
            <text:p>kappa_alpha_iota_5_varia</text:p>
          </table:table-cell>
          <table:table-cell table:style-name="ce7" table:formula="of:=IF(EXACT([.C93];[.G9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42</text:p>
          </table:table-cell>
          <table:table-cell office:value-type="string" calcext:value-type="string">
            <text:p>kappa_alpha_iota_3_varia</text:p>
          </table:table-cell>
          <table:table-cell table:formula="of:=RIGHT([.A94];4)" office:value-type="string" office:string-value="E742" calcext:value-type="string">
            <text:p>E742</text:p>
          </table:table-cell>
          <table:table-cell table:style-name="ce3" table:formula="of:=UNICHAR(HEX2DEC([.C94]))" office:value-type="string" office:string-value="" calcext:value-type="string">
            <text:p></text:p>
          </table:table-cell>
          <table:table-cell office:value-type="string" calcext:value-type="string">
            <text:p>καὶ</text:p>
          </table:table-cell>
          <table:table-cell office:value-type="string" calcext:value-type="string">
            <text:p></text:p>
          </table:table-cell>
          <table:table-cell table:formula="of:=DEC2HEX(UNICODE([.F94]))" office:value-type="string" office:string-value="E742" calcext:value-type="string">
            <text:p>E742</text:p>
          </table:table-cell>
          <table:table-cell table:formula="of:=CONCATENATE(&quot;0x&quot;;[.G94])" office:value-type="string" office:string-value="0xE742" calcext:value-type="string">
            <text:p>0xE742</text:p>
          </table:table-cell>
          <table:table-cell table:formula="of:=VLOOKUP([.H94];[$FROMVS_Names.$A$1:$FROMVS_Names.$B$151];2;0)" office:value-type="string" office:string-value="kappa_alpha_iota_4_varia" calcext:value-type="string">
            <text:p>kappa_alpha_iota_4_varia</text:p>
          </table:table-cell>
          <table:table-cell table:style-name="ce7" table:formula="of:=IF(EXACT([.C94];[.G9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41</text:p>
          </table:table-cell>
          <table:table-cell office:value-type="string" calcext:value-type="string">
            <text:p>kappa_alpha_iota_2_varia</text:p>
          </table:table-cell>
          <table:table-cell table:formula="of:=RIGHT([.A95];4)" office:value-type="string" office:string-value="E741" calcext:value-type="string">
            <text:p>E741</text:p>
          </table:table-cell>
          <table:table-cell table:style-name="ce3" table:formula="of:=UNICHAR(HEX2DEC([.C95]))" office:value-type="string" office:string-value="" calcext:value-type="string">
            <text:p></text:p>
          </table:table-cell>
          <table:table-cell office:value-type="string" calcext:value-type="string">
            <text:p>καὶ</text:p>
          </table:table-cell>
          <table:table-cell office:value-type="string" calcext:value-type="string">
            <text:p></text:p>
          </table:table-cell>
          <table:table-cell table:formula="of:=DEC2HEX(UNICODE([.F95]))" office:value-type="string" office:string-value="E741" calcext:value-type="string">
            <text:p>E741</text:p>
          </table:table-cell>
          <table:table-cell table:formula="of:=CONCATENATE(&quot;0x&quot;;[.G95])" office:value-type="string" office:string-value="0xE741" calcext:value-type="string">
            <text:p>0xE741</text:p>
          </table:table-cell>
          <table:table-cell table:formula="of:=VLOOKUP([.H95];[$FROMVS_Names.$A$1:$FROMVS_Names.$B$151];2;0)" office:value-type="string" office:string-value="kappa_alpha_iota_3_varia" calcext:value-type="string">
            <text:p>kappa_alpha_iota_3_varia</text:p>
          </table:table-cell>
          <table:table-cell table:style-name="ce7" table:formula="of:=IF(EXACT([.C95];[.G9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40</text:p>
          </table:table-cell>
          <table:table-cell office:value-type="string" calcext:value-type="string">
            <text:p>kappa_alpha_iota_1_varia</text:p>
          </table:table-cell>
          <table:table-cell table:formula="of:=RIGHT([.A96];4)" office:value-type="string" office:string-value="E740" calcext:value-type="string">
            <text:p>E740</text:p>
          </table:table-cell>
          <table:table-cell table:style-name="ce3" table:formula="of:=UNICHAR(HEX2DEC([.C96]))" office:value-type="string" office:string-value="" calcext:value-type="string">
            <text:p></text:p>
          </table:table-cell>
          <table:table-cell office:value-type="string" calcext:value-type="string">
            <text:p>καὶ</text:p>
          </table:table-cell>
          <table:table-cell office:value-type="string" calcext:value-type="string">
            <text:p></text:p>
          </table:table-cell>
          <table:table-cell table:formula="of:=DEC2HEX(UNICODE([.F96]))" office:value-type="string" office:string-value="E740" calcext:value-type="string">
            <text:p>E740</text:p>
          </table:table-cell>
          <table:table-cell table:formula="of:=CONCATENATE(&quot;0x&quot;;[.G96])" office:value-type="string" office:string-value="0xE740" calcext:value-type="string">
            <text:p>0xE740</text:p>
          </table:table-cell>
          <table:table-cell table:formula="of:=VLOOKUP([.H96];[$FROMVS_Names.$A$1:$FROMVS_Names.$B$151];2;0)" office:value-type="string" office:string-value="kappa_alpha_iota_2_varia" calcext:value-type="string">
            <text:p>kappa_alpha_iota_2_varia</text:p>
          </table:table-cell>
          <table:table-cell table:style-name="ce7" table:formula="of:=IF(EXACT([.C96];[.G9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22</text:p>
          </table:table-cell>
          <table:table-cell office:value-type="string" calcext:value-type="string">
            <text:p>phi_iota_oxia</text:p>
          </table:table-cell>
          <table:table-cell table:formula="of:=RIGHT([.A97];4)" office:value-type="string" office:string-value="E722" calcext:value-type="string">
            <text:p>E722</text:p>
          </table:table-cell>
          <table:table-cell table:style-name="ce3" table:formula="of:=UNICHAR(HEX2DEC([.C97]))" office:value-type="string" office:string-value="" calcext:value-type="string">
            <text:p></text:p>
          </table:table-cell>
          <table:table-cell office:value-type="string" calcext:value-type="string">
            <text:p>φ<text:span text:style-name="T1">ί</text:span></text:p>
          </table:table-cell>
          <table:table-cell table:style-name="ce21" office:value-type="string" calcext:value-type="string">
            <text:p></text:p>
          </table:table-cell>
          <table:table-cell table:formula="of:=DEC2HEX(UNICODE([.F97]))" office:value-type="string" office:string-value="E723" calcext:value-type="string">
            <text:p>E723</text:p>
          </table:table-cell>
          <table:table-cell table:formula="of:=CONCATENATE(&quot;0x&quot;;[.G97])" office:value-type="string" office:string-value="0xE723" calcext:value-type="string">
            <text:p>0xE723</text:p>
          </table:table-cell>
          <table:table-cell table:formula="of:=VLOOKUP([.H97];[$FROMVS_Names.$A$1:$FROMVS_Names.$B$151];2;0)" office:value-type="string" office:string-value="phi_iota_tonos" calcext:value-type="string">
            <text:p>phi_iota_tonos</text:p>
          </table:table-cell>
          <table:table-cell table:style-name="ce7" table:formula="of:=IF(EXACT([.C97];[.G97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21</text:p>
          </table:table-cell>
          <table:table-cell office:value-type="string" calcext:value-type="string">
            <text:p>phi_iota</text:p>
          </table:table-cell>
          <table:table-cell table:formula="of:=RIGHT([.A98];4)" office:value-type="string" office:string-value="E721" calcext:value-type="string">
            <text:p>E721</text:p>
          </table:table-cell>
          <table:table-cell table:style-name="ce3" table:formula="of:=UNICHAR(HEX2DEC([.C98]))" office:value-type="string" office:string-value="" calcext:value-type="string">
            <text:p></text:p>
          </table:table-cell>
          <table:table-cell office:value-type="string" calcext:value-type="string">
            <text:p>φι</text:p>
          </table:table-cell>
          <table:table-cell table:style-name="ce21" office:value-type="string" calcext:value-type="string">
            <text:p></text:p>
          </table:table-cell>
          <table:table-cell table:formula="of:=DEC2HEX(UNICODE([.F98]))" office:value-type="string" office:string-value="E722" calcext:value-type="string">
            <text:p>E722</text:p>
          </table:table-cell>
          <table:table-cell table:formula="of:=CONCATENATE(&quot;0x&quot;;[.G98])" office:value-type="string" office:string-value="0xE722" calcext:value-type="string">
            <text:p>0xE722</text:p>
          </table:table-cell>
          <table:table-cell table:formula="of:=VLOOKUP([.H98];[$FROMVS_Names.$A$1:$FROMVS_Names.$B$151];2;0)" office:value-type="string" office:string-value="phi_iota" calcext:value-type="string">
            <text:p>phi_iota</text:p>
          </table:table-cell>
          <table:table-cell table:style-name="ce7" table:formula="of:=IF(EXACT([.C98];[.G98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E</text:p>
          </table:table-cell>
          <table:table-cell office:value-type="string" calcext:value-type="string">
            <text:p>phi_psili</text:p>
          </table:table-cell>
          <table:table-cell table:formula="of:=RIGHT([.A99];4)" office:value-type="string" office:string-value="E82E" calcext:value-type="string">
            <text:p>E82E</text:p>
          </table:table-cell>
          <table:table-cell table:style-name="ce3" table:formula="of:=UNICHAR(HEX2DEC([.C99]))" office:value-type="string" office:string-value="" calcext:value-type="string">
            <text:p></text:p>
          </table:table-cell>
          <table:table-cell office:value-type="string" calcext:value-type="string">
            <text:p>φ'</text:p>
          </table:table-cell>
          <table:table-cell table:style-name="ce3" office:value-type="string" calcext:value-type="string">
            <text:p></text:p>
          </table:table-cell>
          <table:table-cell table:formula="of:=DEC2HEX(UNICODE([.F99]))" office:value-type="string" office:string-value="E721" calcext:value-type="string">
            <text:p>E721</text:p>
          </table:table-cell>
          <table:table-cell table:formula="of:=CONCATENATE(&quot;0x&quot;;[.G99])" office:value-type="string" office:string-value="0xE721" calcext:value-type="string">
            <text:p>0xE721</text:p>
          </table:table-cell>
          <table:table-cell table:formula="of:=VLOOKUP([.H99];[$FROMVS_Names.$A$1:$FROMVS_Names.$B$151];2;0)" office:value-type="string" office:string-value="phi_psili" calcext:value-type="string">
            <text:p>phi_psili</text:p>
          </table:table-cell>
          <table:table-cell table:style-name="ce7" table:formula="of:=IF(EXACT([.C99];[.G9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15</text:p>
          </table:table-cell>
          <table:table-cell office:value-type="string" calcext:value-type="string">
            <text:p>eta_nu_perispomeni</text:p>
          </table:table-cell>
          <table:table-cell table:formula="of:=RIGHT([.A100];4)" office:value-type="string" office:string-value="E715" calcext:value-type="string">
            <text:p>E715</text:p>
          </table:table-cell>
          <table:table-cell table:style-name="ce3" table:formula="of:=UNICHAR(HEX2DEC([.C100]))" office:value-type="string" office:string-value="" calcext:value-type="string">
            <text:p></text:p>
          </table:table-cell>
          <table:table-cell office:value-type="string" calcext:value-type="string">
            <text:p>ῆν</text:p>
          </table:table-cell>
          <table:table-cell table:style-name="ce21" office:value-type="string" calcext:value-type="string">
            <text:p></text:p>
          </table:table-cell>
          <table:table-cell table:formula="of:=DEC2HEX(UNICODE([.F100]))" office:value-type="string" office:string-value="E716" calcext:value-type="string">
            <text:p>E716</text:p>
          </table:table-cell>
          <table:table-cell table:formula="of:=CONCATENATE(&quot;0x&quot;;[.G100])" office:value-type="string" office:string-value="0xE716" calcext:value-type="string">
            <text:p>0xE716</text:p>
          </table:table-cell>
          <table:table-cell table:formula="of:=VLOOKUP([.H100];[$FROMVS_Names.$A$1:$FROMVS_Names.$B$151];2;0)" office:value-type="string" office:string-value="eta_perispomeni_nu" calcext:value-type="string">
            <text:p>eta_perispomeni_nu</text:p>
          </table:table-cell>
          <table:table-cell table:style-name="ce7" table:formula="of:=IF(EXACT([.C100];[.G10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16</text:p>
          </table:table-cell>
          <table:table-cell office:value-type="string" calcext:value-type="string">
            <text:p>eta_nu_varia_2</text:p>
          </table:table-cell>
          <table:table-cell table:formula="of:=RIGHT([.A101];4)" office:value-type="string" office:string-value="E716" calcext:value-type="string">
            <text:p>E716</text:p>
          </table:table-cell>
          <table:table-cell table:style-name="ce3" table:formula="of:=UNICHAR(HEX2DEC([.C101]))" office:value-type="string" office:string-value="" calcext:value-type="string">
            <text:p></text:p>
          </table:table-cell>
          <table:table-cell office:value-type="string" calcext:value-type="string">
            <text:p>ὴν</text:p>
          </table:table-cell>
          <table:table-cell office:value-type="string" calcext:value-type="string">
            <text:p></text:p>
          </table:table-cell>
          <table:table-cell table:formula="of:=DEC2HEX(UNICODE([.F101]))" office:value-type="string" office:string-value="E715" calcext:value-type="string">
            <text:p>E715</text:p>
          </table:table-cell>
          <table:table-cell table:formula="of:=CONCATENATE(&quot;0x&quot;;[.G101])" office:value-type="string" office:string-value="0xE715" calcext:value-type="string">
            <text:p>0xE715</text:p>
          </table:table-cell>
          <table:table-cell table:formula="of:=VLOOKUP([.H101];[$FROMVS_Names.$A$1:$FROMVS_Names.$B$151];2;0)" office:value-type="string" office:string-value="eta_varia_2_nu" calcext:value-type="string">
            <text:p>eta_varia_2_nu</text:p>
          </table:table-cell>
          <table:table-cell table:style-name="ce7" table:formula="of:=IF(EXACT([.C101];[.G10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714</text:p>
          </table:table-cell>
          <table:table-cell office:value-type="string" calcext:value-type="string">
            <text:p>eta_nu_varia</text:p>
          </table:table-cell>
          <table:table-cell table:formula="of:=RIGHT([.A102];4)" office:value-type="string" office:string-value="E714" calcext:value-type="string">
            <text:p>E714</text:p>
          </table:table-cell>
          <table:table-cell table:style-name="ce3" table:formula="of:=UNICHAR(HEX2DEC([.C102]))" office:value-type="string" office:string-value="" calcext:value-type="string">
            <text:p></text:p>
          </table:table-cell>
          <table:table-cell office:value-type="string" calcext:value-type="string">
            <text:p>ὴν</text:p>
          </table:table-cell>
          <table:table-cell office:value-type="string" calcext:value-type="string">
            <text:p></text:p>
          </table:table-cell>
          <table:table-cell table:formula="of:=DEC2HEX(UNICODE([.F102]))" office:value-type="string" office:string-value="E714" calcext:value-type="string">
            <text:p>E714</text:p>
          </table:table-cell>
          <table:table-cell table:formula="of:=CONCATENATE(&quot;0x&quot;;[.G102])" office:value-type="string" office:string-value="0xE714" calcext:value-type="string">
            <text:p>0xE714</text:p>
          </table:table-cell>
          <table:table-cell table:formula="of:=VLOOKUP([.H102];[$FROMVS_Names.$A$1:$FROMVS_Names.$B$151];2;0)" office:value-type="string" office:string-value="eta_varia_nu" calcext:value-type="string">
            <text:p>eta_varia_nu</text:p>
          </table:table-cell>
          <table:table-cell table:style-name="ce7" table:formula="of:=IF(EXACT([.C102];[.G10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13</text:p>
          </table:table-cell>
          <table:table-cell office:value-type="string" calcext:value-type="string">
            <text:p>eta_nu_oxia</text:p>
          </table:table-cell>
          <table:table-cell table:formula="of:=RIGHT([.A103];4)" office:value-type="string" office:string-value="E713" calcext:value-type="string">
            <text:p>E713</text:p>
          </table:table-cell>
          <table:table-cell table:style-name="ce3" table:formula="of:=UNICHAR(HEX2DEC([.C103]))" office:value-type="string" office:string-value="" calcext:value-type="string">
            <text:p></text:p>
          </table:table-cell>
          <table:table-cell office:value-type="string" calcext:value-type="string">
            <text:p><text:span text:style-name="T1">ή</text:span>ν</text:p>
          </table:table-cell>
          <table:table-cell office:value-type="string" calcext:value-type="string">
            <text:p></text:p>
          </table:table-cell>
          <table:table-cell table:formula="of:=DEC2HEX(UNICODE([.F103]))" office:value-type="string" office:string-value="E713" calcext:value-type="string">
            <text:p>E713</text:p>
          </table:table-cell>
          <table:table-cell table:formula="of:=CONCATENATE(&quot;0x&quot;;[.G103])" office:value-type="string" office:string-value="0xE713" calcext:value-type="string">
            <text:p>0xE713</text:p>
          </table:table-cell>
          <table:table-cell table:formula="of:=VLOOKUP([.H103];[$FROMVS_Names.$A$1:$FROMVS_Names.$B$151];2;0)" office:value-type="string" office:string-value="eta_tonos_nu" calcext:value-type="string">
            <text:p>eta_tonos_nu</text:p>
          </table:table-cell>
          <table:table-cell table:style-name="ce7" table:formula="of:=IF(EXACT([.C103];[.G10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12</text:p>
          </table:table-cell>
          <table:table-cell office:value-type="string" calcext:value-type="string">
            <text:p>eta_nu</text:p>
          </table:table-cell>
          <table:table-cell table:formula="of:=RIGHT([.A104];4)" office:value-type="string" office:string-value="E712" calcext:value-type="string">
            <text:p>E712</text:p>
          </table:table-cell>
          <table:table-cell table:style-name="ce3" table:formula="of:=UNICHAR(HEX2DEC([.C104]))" office:value-type="string" office:string-value="" calcext:value-type="string">
            <text:p></text:p>
          </table:table-cell>
          <table:table-cell office:value-type="string" calcext:value-type="string">
            <text:p>ην</text:p>
          </table:table-cell>
          <table:table-cell office:value-type="string" calcext:value-type="string">
            <text:p></text:p>
          </table:table-cell>
          <table:table-cell table:formula="of:=DEC2HEX(UNICODE([.F104]))" office:value-type="string" office:string-value="E712" calcext:value-type="string">
            <text:p>E712</text:p>
          </table:table-cell>
          <table:table-cell table:formula="of:=CONCATENATE(&quot;0x&quot;;[.G104])" office:value-type="string" office:string-value="0xE712" calcext:value-type="string">
            <text:p>0xE712</text:p>
          </table:table-cell>
          <table:table-cell table:formula="of:=VLOOKUP([.H104];[$FROMVS_Names.$A$1:$FROMVS_Names.$B$151];2;0)" office:value-type="string" office:string-value="eta_nu" calcext:value-type="string">
            <text:p>eta_nu</text:p>
          </table:table-cell>
          <table:table-cell table:style-name="ce7" table:formula="of:=IF(EXACT([.C104];[.G10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11</text:p>
          </table:table-cell>
          <table:table-cell office:value-type="string" calcext:value-type="string">
            <text:p>eta_1_perispomeni</text:p>
          </table:table-cell>
          <table:table-cell table:formula="of:=RIGHT([.A105];4)" office:value-type="string" office:string-value="E711" calcext:value-type="string">
            <text:p>E711</text:p>
          </table:table-cell>
          <table:table-cell table:style-name="ce3" table:formula="of:=UNICHAR(HEX2DEC([.C105]))" office:value-type="string" office:string-value="" calcext:value-type="string">
            <text:p>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</text:p>
          </table:table-cell>
          <table:table-cell table:formula="of:=DEC2HEX(UNICODE([.F105]))" office:value-type="string" office:string-value="E711" calcext:value-type="string">
            <text:p>E711</text:p>
          </table:table-cell>
          <table:table-cell table:formula="of:=CONCATENATE(&quot;0x&quot;;[.G105])" office:value-type="string" office:string-value="0xE711" calcext:value-type="string">
            <text:p>0xE711</text:p>
          </table:table-cell>
          <table:table-cell table:formula="of:=VLOOKUP([.H105];[$FROMVS_Names.$A$1:$FROMVS_Names.$B$151];2;0)" office:value-type="string" office:string-value="eta_2_perispomeni" calcext:value-type="string">
            <text:p>eta_2_perispomeni</text:p>
          </table:table-cell>
          <table:table-cell table:style-name="ce7" table:formula="of:=IF(EXACT([.C105];[.G10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10</text:p>
          </table:table-cell>
          <table:table-cell office:value-type="string" calcext:value-type="string">
            <text:p>eta_1</text:p>
          </table:table-cell>
          <table:table-cell table:formula="of:=RIGHT([.A106];4)" office:value-type="string" office:string-value="E710" calcext:value-type="string">
            <text:p>E710</text:p>
          </table:table-cell>
          <table:table-cell table:style-name="ce3" table:formula="of:=UNICHAR(HEX2DEC([.C106]))" office:value-type="string" office:string-value="" calcext:value-type="string">
            <text:p>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</text:p>
          </table:table-cell>
          <table:table-cell table:formula="of:=DEC2HEX(UNICODE([.F106]))" office:value-type="string" office:string-value="E710" calcext:value-type="string">
            <text:p>E710</text:p>
          </table:table-cell>
          <table:table-cell table:formula="of:=CONCATENATE(&quot;0x&quot;;[.G106])" office:value-type="string" office:string-value="0xE710" calcext:value-type="string">
            <text:p>0xE710</text:p>
          </table:table-cell>
          <table:table-cell table:formula="of:=VLOOKUP([.H106];[$FROMVS_Names.$A$1:$FROMVS_Names.$B$151];2;0)" office:value-type="string" office:string-value="eta_2" calcext:value-type="string">
            <text:p>eta_2</text:p>
          </table:table-cell>
          <table:table-cell table:style-name="ce7" table:formula="of:=IF(EXACT([.C106];[.G10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01</text:p>
          </table:table-cell>
          <table:table-cell office:value-type="string" calcext:value-type="string">
            <text:p>zeta_2</text:p>
          </table:table-cell>
          <table:table-cell table:formula="of:=RIGHT([.A107];4)" office:value-type="string" office:string-value="E701" calcext:value-type="string">
            <text:p>E701</text:p>
          </table:table-cell>
          <table:table-cell table:style-name="ce3" table:formula="of:=UNICHAR(HEX2DEC([.C107]))" office:value-type="string" office:string-value="" calcext:value-type="string">
            <text:p></text:p>
          </table:table-cell>
          <table:table-cell office:value-type="string" calcext:value-type="string">
            <text:p>ζ</text:p>
          </table:table-cell>
          <table:table-cell table:style-name="ce21" office:value-type="string" calcext:value-type="string">
            <text:p></text:p>
          </table:table-cell>
          <table:table-cell table:formula="of:=DEC2HEX(UNICODE([.F107]))" office:value-type="string" office:string-value="E701" calcext:value-type="string">
            <text:p>E701</text:p>
          </table:table-cell>
          <table:table-cell table:formula="of:=CONCATENATE(&quot;0x&quot;;[.G107])" office:value-type="string" office:string-value="0xE701" calcext:value-type="string">
            <text:p>0xE701</text:p>
          </table:table-cell>
          <table:table-cell table:formula="of:=VLOOKUP([.H107];[$FROMVS_Names.$A$1:$FROMVS_Names.$B$151];2;0)" office:value-type="string" office:string-value="zeta_3" calcext:value-type="string">
            <text:p>zeta_3</text:p>
          </table:table-cell>
          <table:table-cell table:style-name="ce7" table:formula="of:=IF(EXACT([.C107];[.G10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00</text:p>
          </table:table-cell>
          <table:table-cell office:value-type="string" calcext:value-type="string">
            <text:p>zeta_1</text:p>
          </table:table-cell>
          <table:table-cell table:formula="of:=RIGHT([.A108];4)" office:value-type="string" office:string-value="E700" calcext:value-type="string">
            <text:p>E700</text:p>
          </table:table-cell>
          <table:table-cell table:style-name="ce3" table:formula="of:=UNICHAR(HEX2DEC([.C108]))" office:value-type="string" office:string-value="" calcext:value-type="string">
            <text:p></text:p>
          </table:table-cell>
          <table:table-cell office:value-type="string" calcext:value-type="string">
            <text:p>ζ</text:p>
          </table:table-cell>
          <table:table-cell table:style-name="ce21" office:value-type="string" calcext:value-type="string">
            <text:p></text:p>
          </table:table-cell>
          <table:table-cell table:formula="of:=DEC2HEX(UNICODE([.F108]))" office:value-type="string" office:string-value="E700" calcext:value-type="string">
            <text:p>E700</text:p>
          </table:table-cell>
          <table:table-cell table:formula="of:=CONCATENATE(&quot;0x&quot;;[.G108])" office:value-type="string" office:string-value="0xE700" calcext:value-type="string">
            <text:p>0xE700</text:p>
          </table:table-cell>
          <table:table-cell table:formula="of:=VLOOKUP([.H108];[$FROMVS_Names.$A$1:$FROMVS_Names.$B$151];2;0)" office:value-type="string" office:string-value="zeta_2" calcext:value-type="string">
            <text:p>zeta_2</text:p>
          </table:table-cell>
          <table:table-cell table:style-name="ce7" table:formula="of:=IF(EXACT([.C108];[.G10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82A</text:p>
          </table:table-cell>
          <table:table-cell office:value-type="string" calcext:value-type="string">
            <text:p>epsilon_upsilon2</text:p>
          </table:table-cell>
          <table:table-cell table:formula="of:=RIGHT([.A109];4)" office:value-type="string" office:string-value="E82A" calcext:value-type="string">
            <text:p>E82A</text:p>
          </table:table-cell>
          <table:table-cell table:style-name="ce3" table:formula="of:=UNICHAR(HEX2DEC([.C109]))" office:value-type="string" office:string-value="" calcext:value-type="string">
            <text:p></text:p>
          </table:table-cell>
          <table:table-cell office:value-type="string" calcext:value-type="string">
            <text:p>ευ</text:p>
          </table:table-cell>
          <table:table-cell table:style-name="ce21" office:value-type="string" calcext:value-type="string">
            <text:p></text:p>
          </table:table-cell>
          <table:table-cell table:formula="of:=DEC2HEX(UNICODE([.F109]))" office:value-type="string" office:string-value="E6FF" calcext:value-type="string">
            <text:p>E6FF</text:p>
          </table:table-cell>
          <table:table-cell table:formula="of:=CONCATENATE(&quot;0x&quot;;[.G109])" office:value-type="string" office:string-value="0xE6FF" calcext:value-type="string">
            <text:p>0xE6FF</text:p>
          </table:table-cell>
          <table:table-cell table:formula="of:=VLOOKUP([.H109];[$FROMVS_Names.$A$1:$FROMVS_Names.$B$151];2;0)" office:value-type="string" office:string-value="epsilon_upsilon_2" calcext:value-type="string">
            <text:p>epsilon_upsilon_2</text:p>
          </table:table-cell>
          <table:table-cell table:style-name="ce7" table:formula="of:=IF(EXACT([.C109];[.G10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6FE</text:p>
          </table:table-cell>
          <table:table-cell office:value-type="string" calcext:value-type="string">
            <text:p>epsilon_upsilon</text:p>
          </table:table-cell>
          <table:table-cell table:formula="of:=RIGHT([.A110];4)" office:value-type="string" office:string-value="E6FE" calcext:value-type="string">
            <text:p>E6FE</text:p>
          </table:table-cell>
          <table:table-cell table:style-name="ce3" table:formula="of:=UNICHAR(HEX2DEC([.C110]))" office:value-type="string" office:string-value="" calcext:value-type="string">
            <text:p></text:p>
          </table:table-cell>
          <table:table-cell office:value-type="string" calcext:value-type="string">
            <text:p>ευ</text:p>
          </table:table-cell>
          <table:table-cell office:value-type="string" calcext:value-type="string">
            <text:p></text:p>
          </table:table-cell>
          <table:table-cell table:formula="of:=DEC2HEX(UNICODE([.F110]))" office:value-type="string" office:string-value="E6FE" calcext:value-type="string">
            <text:p>E6FE</text:p>
          </table:table-cell>
          <table:table-cell table:formula="of:=CONCATENATE(&quot;0x&quot;;[.G110])" office:value-type="string" office:string-value="0xE6FE" calcext:value-type="string">
            <text:p>0xE6FE</text:p>
          </table:table-cell>
          <table:table-cell table:formula="of:=VLOOKUP([.H110];[$FROMVS_Names.$A$1:$FROMVS_Names.$B$151];2;0)" office:value-type="string" office:string-value="epsilon_upsilon" calcext:value-type="string">
            <text:p>epsilon_upsilon</text:p>
          </table:table-cell>
          <table:table-cell table:style-name="ce7" table:formula="of:=IF(EXACT([.C110];[.G110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D</text:p>
          </table:table-cell>
          <table:table-cell office:value-type="string" calcext:value-type="string">
            <text:p>epsilon_psili_stigma_iota_varia</text:p>
          </table:table-cell>
          <table:table-cell table:formula="of:=RIGHT([.A111];4)" office:value-type="string" office:string-value="E6FD" calcext:value-type="string">
            <text:p>E6FD</text:p>
          </table:table-cell>
          <table:table-cell table:style-name="ce3" table:formula="of:=UNICHAR(HEX2DEC([.C111]))" office:value-type="string" office:string-value="" calcext:value-type="string">
            <text:p></text:p>
          </table:table-cell>
          <table:table-cell office:value-type="string" calcext:value-type="string">
            <text:p>ἐστὶ</text:p>
          </table:table-cell>
          <table:table-cell office:value-type="string" calcext:value-type="string">
            <text:p></text:p>
          </table:table-cell>
          <table:table-cell table:formula="of:=DEC2HEX(UNICODE([.F111]))" office:value-type="string" office:string-value="E6FD" calcext:value-type="string">
            <text:p>E6FD</text:p>
          </table:table-cell>
          <table:table-cell table:formula="of:=CONCATENATE(&quot;0x&quot;;[.G111])" office:value-type="string" office:string-value="0xE6FD" calcext:value-type="string">
            <text:p>0xE6FD</text:p>
          </table:table-cell>
          <table:table-cell table:formula="of:=VLOOKUP([.H111];[$FROMVS_Names.$A$1:$FROMVS_Names.$B$151];2;0)" office:value-type="string" office:string-value="epsilon_psili_stigma_iota_varia" calcext:value-type="string">
            <text:p>epsilon_psili_stigma_iota_varia</text:p>
          </table:table-cell>
          <table:table-cell table:style-name="ce7" table:formula="of:=IF(EXACT([.C111];[.G111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C</text:p>
          </table:table-cell>
          <table:table-cell office:value-type="string" calcext:value-type="string">
            <text:p>epsilon_psili_stigma_iota</text:p>
          </table:table-cell>
          <table:table-cell table:formula="of:=RIGHT([.A112];4)" office:value-type="string" office:string-value="E6FC" calcext:value-type="string">
            <text:p>E6FC</text:p>
          </table:table-cell>
          <table:table-cell table:style-name="ce3" table:formula="of:=UNICHAR(HEX2DEC([.C112]))" office:value-type="string" office:string-value="" calcext:value-type="string">
            <text:p></text:p>
          </table:table-cell>
          <table:table-cell office:value-type="string" calcext:value-type="string">
            <text:p>ἐστι</text:p>
          </table:table-cell>
          <table:table-cell office:value-type="string" calcext:value-type="string">
            <text:p></text:p>
          </table:table-cell>
          <table:table-cell table:formula="of:=DEC2HEX(UNICODE([.F112]))" office:value-type="string" office:string-value="E6FC" calcext:value-type="string">
            <text:p>E6FC</text:p>
          </table:table-cell>
          <table:table-cell table:formula="of:=CONCATENATE(&quot;0x&quot;;[.G112])" office:value-type="string" office:string-value="0xE6FC" calcext:value-type="string">
            <text:p>0xE6FC</text:p>
          </table:table-cell>
          <table:table-cell table:formula="of:=VLOOKUP([.H112];[$FROMVS_Names.$A$1:$FROMVS_Names.$B$151];2;0)" office:value-type="string" office:string-value="epsilon_psili_stigma_iota" calcext:value-type="string">
            <text:p>epsilon_psili_stigma_iota</text:p>
          </table:table-cell>
          <table:table-cell table:style-name="ce7" table:formula="of:=IF(EXACT([.C112];[.G11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B</text:p>
          </table:table-cell>
          <table:table-cell office:value-type="string" calcext:value-type="string">
            <text:p>epsilon_stigma_iota</text:p>
          </table:table-cell>
          <table:table-cell table:formula="of:=RIGHT([.A113];4)" office:value-type="string" office:string-value="E6FB" calcext:value-type="string">
            <text:p>E6FB</text:p>
          </table:table-cell>
          <table:table-cell table:style-name="ce3" table:formula="of:=UNICHAR(HEX2DEC([.C113]))" office:value-type="string" office:string-value="" calcext:value-type="string">
            <text:p></text:p>
          </table:table-cell>
          <table:table-cell office:value-type="string" calcext:value-type="string">
            <text:p>εστι</text:p>
          </table:table-cell>
          <table:table-cell office:value-type="string" calcext:value-type="string">
            <text:p></text:p>
          </table:table-cell>
          <table:table-cell table:formula="of:=DEC2HEX(UNICODE([.F113]))" office:value-type="string" office:string-value="E6FB" calcext:value-type="string">
            <text:p>E6FB</text:p>
          </table:table-cell>
          <table:table-cell table:formula="of:=CONCATENATE(&quot;0x&quot;;[.G113])" office:value-type="string" office:string-value="0xE6FB" calcext:value-type="string">
            <text:p>0xE6FB</text:p>
          </table:table-cell>
          <table:table-cell table:formula="of:=VLOOKUP([.H113];[$FROMVS_Names.$A$1:$FROMVS_Names.$B$151];2;0)" office:value-type="string" office:string-value="epsilon_stigma_iota" calcext:value-type="string">
            <text:p>epsilon_stigma_iota</text:p>
          </table:table-cell>
          <table:table-cell table:style-name="ce7" table:formula="of:=IF(EXACT([.C113];[.G11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A</text:p>
          </table:table-cell>
          <table:table-cell office:value-type="string" calcext:value-type="string">
            <text:p>epsilon_rho_2</text:p>
          </table:table-cell>
          <table:table-cell table:formula="of:=RIGHT([.A114];4)" office:value-type="string" office:string-value="E6FA" calcext:value-type="string">
            <text:p>E6FA</text:p>
          </table:table-cell>
          <table:table-cell table:style-name="ce3" table:formula="of:=UNICHAR(HEX2DEC([.C114]))" office:value-type="string" office:string-value="" calcext:value-type="string">
            <text:p></text:p>
          </table:table-cell>
          <table:table-cell office:value-type="string" calcext:value-type="string">
            <text:p>ερ</text:p>
          </table:table-cell>
          <table:table-cell office:value-type="string" calcext:value-type="string">
            <text:p></text:p>
          </table:table-cell>
          <table:table-cell table:formula="of:=DEC2HEX(UNICODE([.F114]))" office:value-type="string" office:string-value="E6FA" calcext:value-type="string">
            <text:p>E6FA</text:p>
          </table:table-cell>
          <table:table-cell table:formula="of:=CONCATENATE(&quot;0x&quot;;[.G114])" office:value-type="string" office:string-value="0xE6FA" calcext:value-type="string">
            <text:p>0xE6FA</text:p>
          </table:table-cell>
          <table:table-cell table:formula="of:=VLOOKUP([.H114];[$FROMVS_Names.$A$1:$FROMVS_Names.$B$151];2;0)" office:value-type="string" office:string-value="epsilon_rho_2" calcext:value-type="string">
            <text:p>epsilon_rho_2</text:p>
          </table:table-cell>
          <table:table-cell table:style-name="ce7" table:formula="of:=IF(EXACT([.C114];[.G11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9</text:p>
          </table:table-cell>
          <table:table-cell office:value-type="string" calcext:value-type="string">
            <text:p>epsilon_rho_1</text:p>
          </table:table-cell>
          <table:table-cell table:formula="of:=RIGHT([.A115];4)" office:value-type="string" office:string-value="E6F9" calcext:value-type="string">
            <text:p>E6F9</text:p>
          </table:table-cell>
          <table:table-cell table:style-name="ce3" table:formula="of:=UNICHAR(HEX2DEC([.C115]))" office:value-type="string" office:string-value="" calcext:value-type="string">
            <text:p></text:p>
          </table:table-cell>
          <table:table-cell office:value-type="string" calcext:value-type="string">
            <text:p>ερ</text:p>
          </table:table-cell>
          <table:table-cell office:value-type="string" calcext:value-type="string">
            <text:p></text:p>
          </table:table-cell>
          <table:table-cell table:formula="of:=DEC2HEX(UNICODE([.F115]))" office:value-type="string" office:string-value="E6F9" calcext:value-type="string">
            <text:p>E6F9</text:p>
          </table:table-cell>
          <table:table-cell table:formula="of:=CONCATENATE(&quot;0x&quot;;[.G115])" office:value-type="string" office:string-value="0xE6F9" calcext:value-type="string">
            <text:p>0xE6F9</text:p>
          </table:table-cell>
          <table:table-cell table:formula="of:=VLOOKUP([.H115];[$FROMVS_Names.$A$1:$FROMVS_Names.$B$151];2;0)" office:value-type="string" office:string-value="epsilon_rho" calcext:value-type="string">
            <text:p>epsilon_rho</text:p>
          </table:table-cell>
          <table:table-cell table:style-name="ce7" table:formula="of:=IF(EXACT([.C115];[.G11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8</text:p>
          </table:table-cell>
          <table:table-cell office:value-type="string" calcext:value-type="string">
            <text:p>epsilon_psili_xi</text:p>
          </table:table-cell>
          <table:table-cell table:formula="of:=RIGHT([.A116];4)" office:value-type="string" office:string-value="E6F8" calcext:value-type="string">
            <text:p>E6F8</text:p>
          </table:table-cell>
          <table:table-cell table:style-name="ce3" table:formula="of:=UNICHAR(HEX2DEC([.C116]))" office:value-type="string" office:string-value="" calcext:value-type="string">
            <text:p></text:p>
          </table:table-cell>
          <table:table-cell office:value-type="string" calcext:value-type="string">
            <text:p>ἐξ</text:p>
          </table:table-cell>
          <table:table-cell office:value-type="string" calcext:value-type="string">
            <text:p></text:p>
          </table:table-cell>
          <table:table-cell table:formula="of:=DEC2HEX(UNICODE([.F116]))" office:value-type="string" office:string-value="E6F8" calcext:value-type="string">
            <text:p>E6F8</text:p>
          </table:table-cell>
          <table:table-cell table:formula="of:=CONCATENATE(&quot;0x&quot;;[.G116])" office:value-type="string" office:string-value="0xE6F8" calcext:value-type="string">
            <text:p>0xE6F8</text:p>
          </table:table-cell>
          <table:table-cell table:formula="of:=VLOOKUP([.H116];[$FROMVS_Names.$A$1:$FROMVS_Names.$B$151];2;0)" office:value-type="string" office:string-value="epsilon_psili_xi" calcext:value-type="string">
            <text:p>epsilon_psili_xi</text:p>
          </table:table-cell>
          <table:table-cell table:style-name="ce7" table:formula="of:=IF(EXACT([.C116];[.G11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7</text:p>
          </table:table-cell>
          <table:table-cell office:value-type="string" calcext:value-type="string">
            <text:p>epsilon_psili_nu</text:p>
          </table:table-cell>
          <table:table-cell table:formula="of:=RIGHT([.A117];4)" office:value-type="string" office:string-value="E6F7" calcext:value-type="string">
            <text:p>E6F7</text:p>
          </table:table-cell>
          <table:table-cell table:style-name="ce3" table:formula="of:=UNICHAR(HEX2DEC([.C117]))" office:value-type="string" office:string-value="" calcext:value-type="string">
            <text:p></text:p>
          </table:table-cell>
          <table:table-cell office:value-type="string" calcext:value-type="string">
            <text:p>ἐν</text:p>
          </table:table-cell>
          <table:table-cell office:value-type="string" calcext:value-type="string">
            <text:p></text:p>
          </table:table-cell>
          <table:table-cell table:formula="of:=DEC2HEX(UNICODE([.F117]))" office:value-type="string" office:string-value="E6F7" calcext:value-type="string">
            <text:p>E6F7</text:p>
          </table:table-cell>
          <table:table-cell table:formula="of:=CONCATENATE(&quot;0x&quot;;[.G117])" office:value-type="string" office:string-value="0xE6F7" calcext:value-type="string">
            <text:p>0xE6F7</text:p>
          </table:table-cell>
          <table:table-cell table:formula="of:=VLOOKUP([.H117];[$FROMVS_Names.$A$1:$FROMVS_Names.$B$151];2;0)" office:value-type="string" office:string-value="epsilon_psili_nu" calcext:value-type="string">
            <text:p>epsilon_psili_nu</text:p>
          </table:table-cell>
          <table:table-cell table:style-name="ce7" table:formula="of:=IF(EXACT([.C117];[.G11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6</text:p>
          </table:table-cell>
          <table:table-cell office:value-type="string" calcext:value-type="string">
            <text:p>epsilon_iota_1_perispomeni_prosgegrammeni</text:p>
          </table:table-cell>
          <table:table-cell table:formula="of:=RIGHT([.A118];4)" office:value-type="string" office:string-value="E6F6" calcext:value-type="string">
            <text:p>E6F6</text:p>
          </table:table-cell>
          <table:table-cell table:style-name="ce3" table:formula="of:=UNICHAR(HEX2DEC([.C118]))" office:value-type="string" office:string-value="" calcext:value-type="string">
            <text:p></text:p>
          </table:table-cell>
          <table:table-cell office:value-type="string" calcext:value-type="string">
            <text:p>εῖ</text:p>
          </table:table-cell>
          <table:table-cell office:value-type="string" calcext:value-type="string">
            <text:p></text:p>
          </table:table-cell>
          <table:table-cell table:formula="of:=DEC2HEX(UNICODE([.F118]))" office:value-type="string" office:string-value="E6F6" calcext:value-type="string">
            <text:p>E6F6</text:p>
          </table:table-cell>
          <table:table-cell table:formula="of:=CONCATENATE(&quot;0x&quot;;[.G118])" office:value-type="string" office:string-value="0xE6F6" calcext:value-type="string">
            <text:p>0xE6F6</text:p>
          </table:table-cell>
          <table:table-cell table:formula="of:=VLOOKUP([.H118];[$FROMVS_Names.$A$1:$FROMVS_Names.$B$151];2;0)" office:value-type="string" office:string-value="epsilon_iota_perispomeni_prosgegrammeni" calcext:value-type="string">
            <text:p>epsilon_iota_perispomeni_prosgegrammeni</text:p>
          </table:table-cell>
          <table:table-cell table:style-name="ce7" table:formula="of:=IF(EXACT([.C118];[.G11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5</text:p>
          </table:table-cell>
          <table:table-cell office:value-type="string" calcext:value-type="string">
            <text:p>epsion_iota_2_perispomeni</text:p>
          </table:table-cell>
          <table:table-cell table:formula="of:=RIGHT([.A119];4)" office:value-type="string" office:string-value="E6F5" calcext:value-type="string">
            <text:p>E6F5</text:p>
          </table:table-cell>
          <table:table-cell table:style-name="ce3" table:formula="of:=UNICHAR(HEX2DEC([.C119]))" office:value-type="string" office:string-value="" calcext:value-type="string">
            <text:p></text:p>
          </table:table-cell>
          <table:table-cell office:value-type="string" calcext:value-type="string">
            <text:p>εῖ</text:p>
          </table:table-cell>
          <table:table-cell office:value-type="string" calcext:value-type="string">
            <text:p></text:p>
          </table:table-cell>
          <table:table-cell table:formula="of:=DEC2HEX(UNICODE([.F119]))" office:value-type="string" office:string-value="E6F5" calcext:value-type="string">
            <text:p>E6F5</text:p>
          </table:table-cell>
          <table:table-cell table:formula="of:=CONCATENATE(&quot;0x&quot;;[.G119])" office:value-type="string" office:string-value="0xE6F5" calcext:value-type="string">
            <text:p>0xE6F5</text:p>
          </table:table-cell>
          <table:table-cell table:formula="of:=VLOOKUP([.H119];[$FROMVS_Names.$A$1:$FROMVS_Names.$B$151];2;0)" office:value-type="string" office:string-value="epsion_iota_2_perispomeni" calcext:value-type="string">
            <text:p>epsion_iota_2_perispomeni</text:p>
          </table:table-cell>
          <table:table-cell table:style-name="ce7" table:formula="of:=IF(EXACT([.C119];[.G11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4</text:p>
          </table:table-cell>
          <table:table-cell office:value-type="string" calcext:value-type="string">
            <text:p>epsilon_iota_1_perispomeni</text:p>
          </table:table-cell>
          <table:table-cell table:formula="of:=RIGHT([.A120];4)" office:value-type="string" office:string-value="E6F4" calcext:value-type="string">
            <text:p>E6F4</text:p>
          </table:table-cell>
          <table:table-cell table:style-name="ce3" table:formula="of:=UNICHAR(HEX2DEC([.C120]))" office:value-type="string" office:string-value="" calcext:value-type="string">
            <text:p></text:p>
          </table:table-cell>
          <table:table-cell office:value-type="string" calcext:value-type="string">
            <text:p>εῖ</text:p>
          </table:table-cell>
          <table:table-cell office:value-type="string" calcext:value-type="string">
            <text:p></text:p>
          </table:table-cell>
          <table:table-cell table:formula="of:=DEC2HEX(UNICODE([.F120]))" office:value-type="string" office:string-value="E6F4" calcext:value-type="string">
            <text:p>E6F4</text:p>
          </table:table-cell>
          <table:table-cell table:formula="of:=CONCATENATE(&quot;0x&quot;;[.G120])" office:value-type="string" office:string-value="0xE6F4" calcext:value-type="string">
            <text:p>0xE6F4</text:p>
          </table:table-cell>
          <table:table-cell table:formula="of:=VLOOKUP([.H120];[$FROMVS_Names.$A$1:$FROMVS_Names.$B$151];2;0)" office:value-type="string" office:string-value="epsilon_iota_perispomeni" calcext:value-type="string">
            <text:p>epsilon_iota_perispomeni</text:p>
          </table:table-cell>
          <table:table-cell table:style-name="ce7" table:formula="of:=IF(EXACT([.C120];[.G120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3</text:p>
          </table:table-cell>
          <table:table-cell office:value-type="string" calcext:value-type="string">
            <text:p>epsilon_iota_2</text:p>
          </table:table-cell>
          <table:table-cell table:formula="of:=RIGHT([.A121];4)" office:value-type="string" office:string-value="E6F3" calcext:value-type="string">
            <text:p>E6F3</text:p>
          </table:table-cell>
          <table:table-cell table:style-name="ce3" table:formula="of:=UNICHAR(HEX2DEC([.C121]))" office:value-type="string" office:string-value="" calcext:value-type="string">
            <text:p></text:p>
          </table:table-cell>
          <table:table-cell office:value-type="string" calcext:value-type="string">
            <text:p>ει</text:p>
          </table:table-cell>
          <table:table-cell office:value-type="string" calcext:value-type="string">
            <text:p></text:p>
          </table:table-cell>
          <table:table-cell table:formula="of:=DEC2HEX(UNICODE([.F121]))" office:value-type="string" office:string-value="E6F3" calcext:value-type="string">
            <text:p>E6F3</text:p>
          </table:table-cell>
          <table:table-cell table:formula="of:=CONCATENATE(&quot;0x&quot;;[.G121])" office:value-type="string" office:string-value="0xE6F3" calcext:value-type="string">
            <text:p>0xE6F3</text:p>
          </table:table-cell>
          <table:table-cell table:formula="of:=VLOOKUP([.H121];[$FROMVS_Names.$A$1:$FROMVS_Names.$B$151];2;0)" office:value-type="string" office:string-value="epsilon_iota_2" calcext:value-type="string">
            <text:p>epsilon_iota_2</text:p>
          </table:table-cell>
          <table:table-cell table:style-name="ce7" table:formula="of:=IF(EXACT([.C121];[.G121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2</text:p>
          </table:table-cell>
          <table:table-cell office:value-type="string" calcext:value-type="string">
            <text:p>epsilon_iota_1</text:p>
          </table:table-cell>
          <table:table-cell table:formula="of:=RIGHT([.A122];4)" office:value-type="string" office:string-value="E6F2" calcext:value-type="string">
            <text:p>E6F2</text:p>
          </table:table-cell>
          <table:table-cell table:style-name="ce3" table:formula="of:=UNICHAR(HEX2DEC([.C122]))" office:value-type="string" office:string-value="" calcext:value-type="string">
            <text:p></text:p>
          </table:table-cell>
          <table:table-cell office:value-type="string" calcext:value-type="string">
            <text:p>ει</text:p>
          </table:table-cell>
          <table:table-cell office:value-type="string" calcext:value-type="string">
            <text:p></text:p>
          </table:table-cell>
          <table:table-cell table:formula="of:=DEC2HEX(UNICODE([.F122]))" office:value-type="string" office:string-value="E6F2" calcext:value-type="string">
            <text:p>E6F2</text:p>
          </table:table-cell>
          <table:table-cell table:formula="of:=CONCATENATE(&quot;0x&quot;;[.G122])" office:value-type="string" office:string-value="0xE6F2" calcext:value-type="string">
            <text:p>0xE6F2</text:p>
          </table:table-cell>
          <table:table-cell table:formula="of:=VLOOKUP([.H122];[$FROMVS_Names.$A$1:$FROMVS_Names.$B$151];2;0)" office:value-type="string" office:string-value="epsilon_iota" calcext:value-type="string">
            <text:p>epsilon_iota</text:p>
          </table:table-cell>
          <table:table-cell table:style-name="ce7" table:formula="of:=IF(EXACT([.C122];[.G12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1</text:p>
          </table:table-cell>
          <table:table-cell office:value-type="string" calcext:value-type="string">
            <text:p>epsilon_dasia_perispomeni</text:p>
          </table:table-cell>
          <table:table-cell table:formula="of:=RIGHT([.A123];4)" office:value-type="string" office:string-value="E6F1" calcext:value-type="string">
            <text:p>E6F1</text:p>
          </table:table-cell>
          <table:table-cell table:style-name="ce3" table:formula="of:=UNICHAR(HEX2DEC([.C123]))" office:value-type="string" office:string-value="" calcext:value-type="string">
            <text:p></text:p>
          </table:table-cell>
          <table:table-cell table:style-name="ce14" office:value-type="string" calcext:value-type="string">
            <text:p></text:p>
          </table:table-cell>
          <table:table-cell office:value-type="string" calcext:value-type="string">
            <text:p></text:p>
          </table:table-cell>
          <table:table-cell table:formula="of:=DEC2HEX(UNICODE([.F123]))" office:value-type="string" office:string-value="E6F1" calcext:value-type="string">
            <text:p>E6F1</text:p>
          </table:table-cell>
          <table:table-cell table:formula="of:=CONCATENATE(&quot;0x&quot;;[.G123])" office:value-type="string" office:string-value="0xE6F1" calcext:value-type="string">
            <text:p>0xE6F1</text:p>
          </table:table-cell>
          <table:table-cell table:formula="of:=VLOOKUP([.H123];[$FROMVS_Names.$A$1:$FROMVS_Names.$B$151];2;0)" office:value-type="string" office:string-value="epsilon_dasia_perispomeni" calcext:value-type="string">
            <text:p>epsilon_dasia_perispomeni</text:p>
          </table:table-cell>
          <table:table-cell table:style-name="ce7" table:formula="of:=IF(EXACT([.C123];[.G12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F0</text:p>
          </table:table-cell>
          <table:table-cell office:value-type="string" calcext:value-type="string">
            <text:p>epsilon_psili_perispomeni</text:p>
          </table:table-cell>
          <table:table-cell table:formula="of:=RIGHT([.A124];4)" office:value-type="string" office:string-value="E6F0" calcext:value-type="string">
            <text:p>E6F0</text:p>
          </table:table-cell>
          <table:table-cell table:style-name="ce3" table:formula="of:=UNICHAR(HEX2DEC([.C124]))" office:value-type="string" office:string-value="" calcext:value-type="string">
            <text:p></text:p>
          </table:table-cell>
          <table:table-cell table:style-name="ce14" office:value-type="string" calcext:value-type="string">
            <text:p></text:p>
          </table:table-cell>
          <table:table-cell office:value-type="string" calcext:value-type="string">
            <text:p></text:p>
          </table:table-cell>
          <table:table-cell table:formula="of:=DEC2HEX(UNICODE([.F124]))" office:value-type="string" office:string-value="E6F0" calcext:value-type="string">
            <text:p>E6F0</text:p>
          </table:table-cell>
          <table:table-cell table:formula="of:=CONCATENATE(&quot;0x&quot;;[.G124])" office:value-type="string" office:string-value="0xE6F0" calcext:value-type="string">
            <text:p>0xE6F0</text:p>
          </table:table-cell>
          <table:table-cell table:formula="of:=VLOOKUP([.H124];[$FROMVS_Names.$A$1:$FROMVS_Names.$B$151];2;0)" office:value-type="string" office:string-value="epsilon_psili_perispomeni" calcext:value-type="string">
            <text:p>epsilon_psili_perispomeni</text:p>
          </table:table-cell>
          <table:table-cell table:style-name="ce7" table:formula="of:=IF(EXACT([.C124];[.G12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E3</text:p>
          </table:table-cell>
          <table:table-cell office:value-type="string" calcext:value-type="string">
            <text:p>delta_epsilon_varia_2</text:p>
          </table:table-cell>
          <table:table-cell table:formula="of:=RIGHT([.A125];4)" office:value-type="string" office:string-value="E6E3" calcext:value-type="string">
            <text:p>E6E3</text:p>
          </table:table-cell>
          <table:table-cell table:style-name="ce3" table:formula="of:=UNICHAR(HEX2DEC([.C125]))" office:value-type="string" office:string-value="" calcext:value-type="string">
            <text:p></text:p>
          </table:table-cell>
          <table:table-cell office:value-type="string" calcext:value-type="string">
            <text:p>δὲ</text:p>
          </table:table-cell>
          <table:table-cell office:value-type="string" calcext:value-type="string">
            <text:p></text:p>
          </table:table-cell>
          <table:table-cell table:formula="of:=DEC2HEX(UNICODE([.F125]))" office:value-type="string" office:string-value="E6E3" calcext:value-type="string">
            <text:p>E6E3</text:p>
          </table:table-cell>
          <table:table-cell table:formula="of:=CONCATENATE(&quot;0x&quot;;[.G125])" office:value-type="string" office:string-value="0xE6E3" calcext:value-type="string">
            <text:p>0xE6E3</text:p>
          </table:table-cell>
          <table:table-cell table:formula="of:=VLOOKUP([.H125];[$FROMVS_Names.$A$1:$FROMVS_Names.$B$151];2;0)" office:value-type="string" office:string-value="delta_epsilon_varia_2" calcext:value-type="string">
            <text:p>delta_epsilon_varia_2</text:p>
          </table:table-cell>
          <table:table-cell table:style-name="ce7" table:formula="of:=IF(EXACT([.C125];[.G12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E2</text:p>
          </table:table-cell>
          <table:table-cell office:value-type="string" calcext:value-type="string">
            <text:p>delta_epsilon_varia_1</text:p>
          </table:table-cell>
          <table:table-cell table:formula="of:=RIGHT([.A126];4)" office:value-type="string" office:string-value="E6E2" calcext:value-type="string">
            <text:p>E6E2</text:p>
          </table:table-cell>
          <table:table-cell table:style-name="ce3" table:formula="of:=UNICHAR(HEX2DEC([.C126]))" office:value-type="string" office:string-value="" calcext:value-type="string">
            <text:p></text:p>
          </table:table-cell>
          <table:table-cell office:value-type="string" calcext:value-type="string">
            <text:p>δὲ</text:p>
          </table:table-cell>
          <table:table-cell office:value-type="string" calcext:value-type="string">
            <text:p></text:p>
          </table:table-cell>
          <table:table-cell table:formula="of:=DEC2HEX(UNICODE([.F126]))" office:value-type="string" office:string-value="E6E2" calcext:value-type="string">
            <text:p>E6E2</text:p>
          </table:table-cell>
          <table:table-cell table:formula="of:=CONCATENATE(&quot;0x&quot;;[.G126])" office:value-type="string" office:string-value="0xE6E2" calcext:value-type="string">
            <text:p>0xE6E2</text:p>
          </table:table-cell>
          <table:table-cell table:formula="of:=VLOOKUP([.H126];[$FROMVS_Names.$A$1:$FROMVS_Names.$B$151];2;0)" office:value-type="string" office:string-value="delta_epsilon_varia" calcext:value-type="string">
            <text:p>delta_epsilon_varia</text:p>
          </table:table-cell>
          <table:table-cell table:style-name="ce7" table:formula="of:=IF(EXACT([.C126];[.G12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E1</text:p>
          </table:table-cell>
          <table:table-cell office:value-type="string" calcext:value-type="string">
            <text:p>delta_epsilon</text:p>
          </table:table-cell>
          <table:table-cell table:formula="of:=RIGHT([.A127];4)" office:value-type="string" office:string-value="E6E1" calcext:value-type="string">
            <text:p>E6E1</text:p>
          </table:table-cell>
          <table:table-cell table:style-name="ce3" table:formula="of:=UNICHAR(HEX2DEC([.C127]))" office:value-type="string" office:string-value="" calcext:value-type="string">
            <text:p></text:p>
          </table:table-cell>
          <table:table-cell office:value-type="string" calcext:value-type="string">
            <text:p>δε</text:p>
          </table:table-cell>
          <table:table-cell office:value-type="string" calcext:value-type="string">
            <text:p></text:p>
          </table:table-cell>
          <table:table-cell table:formula="of:=DEC2HEX(UNICODE([.F127]))" office:value-type="string" office:string-value="E6E1" calcext:value-type="string">
            <text:p>E6E1</text:p>
          </table:table-cell>
          <table:table-cell table:formula="of:=CONCATENATE(&quot;0x&quot;;[.G127])" office:value-type="string" office:string-value="0xE6E1" calcext:value-type="string">
            <text:p>0xE6E1</text:p>
          </table:table-cell>
          <table:table-cell table:formula="of:=VLOOKUP([.H127];[$FROMVS_Names.$A$1:$FROMVS_Names.$B$151];2;0)" office:value-type="string" office:string-value="delta_epsilon" calcext:value-type="string">
            <text:p>delta_epsilon</text:p>
          </table:table-cell>
          <table:table-cell table:style-name="ce7" table:formula="of:=IF(EXACT([.C127];[.G12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E0</text:p>
          </table:table-cell>
          <table:table-cell office:value-type="string" calcext:value-type="string">
            <text:p>delta_curly</text:p>
          </table:table-cell>
          <table:table-cell table:formula="of:=RIGHT([.A128];4)" office:value-type="string" office:string-value="E6E0" calcext:value-type="string">
            <text:p>E6E0</text:p>
          </table:table-cell>
          <table:table-cell table:style-name="ce3" table:formula="of:=UNICHAR(HEX2DEC([.C128]))" office:value-type="string" office:string-value="" calcext:value-type="string">
            <text:p>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</text:p>
          </table:table-cell>
          <table:table-cell table:formula="of:=DEC2HEX(UNICODE([.F128]))" office:value-type="string" office:string-value="E6E0" calcext:value-type="string">
            <text:p>E6E0</text:p>
          </table:table-cell>
          <table:table-cell table:formula="of:=CONCATENATE(&quot;0x&quot;;[.G128])" office:value-type="string" office:string-value="0xE6E0" calcext:value-type="string">
            <text:p>0xE6E0</text:p>
          </table:table-cell>
          <table:table-cell table:formula="of:=VLOOKUP([.H128];[$FROMVS_Names.$A$1:$FROMVS_Names.$B$151];2;0)" office:value-type="string" office:string-value="delta_curly" calcext:value-type="string">
            <text:p>delta_curly</text:p>
          </table:table-cell>
          <table:table-cell table:style-name="ce7" table:formula="of:=IF(EXACT([.C128];[.G12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A</text:p>
          </table:table-cell>
          <table:table-cell office:value-type="string" calcext:value-type="string">
            <text:p>gamma_rho</text:p>
          </table:table-cell>
          <table:table-cell table:formula="of:=RIGHT([.A129];4)" office:value-type="string" office:string-value="E6DA" calcext:value-type="string">
            <text:p>E6DA</text:p>
          </table:table-cell>
          <table:table-cell table:style-name="ce3" table:formula="of:=UNICHAR(HEX2DEC([.C129]))" office:value-type="string" office:string-value="" calcext:value-type="string">
            <text:p></text:p>
          </table:table-cell>
          <table:table-cell office:value-type="string" calcext:value-type="string">
            <text:p>γρ</text:p>
          </table:table-cell>
          <table:table-cell table:style-name="ce21" office:value-type="string" calcext:value-type="string">
            <text:p></text:p>
          </table:table-cell>
          <table:table-cell table:formula="of:=DEC2HEX(UNICODE([.F129]))" office:value-type="string" office:string-value="E6DB" calcext:value-type="string">
            <text:p>E6DB</text:p>
          </table:table-cell>
          <table:table-cell table:formula="of:=CONCATENATE(&quot;0x&quot;;[.G129])" office:value-type="string" office:string-value="0xE6DB" calcext:value-type="string">
            <text:p>0xE6DB</text:p>
          </table:table-cell>
          <table:table-cell table:formula="of:=VLOOKUP([.H129];[$FROMVS_Names.$A$1:$FROMVS_Names.$B$151];2;0)" office:value-type="string" office:string-value="gamma_rho" calcext:value-type="string">
            <text:p>gamma_rho</text:p>
          </table:table-cell>
          <table:table-cell table:style-name="ce7" table:formula="of:=IF(EXACT([.C129];[.G129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26</text:p>
          </table:table-cell>
          <table:table-cell office:value-type="string" calcext:value-type="string">
            <text:p>gamma_omicron_2</text:p>
          </table:table-cell>
          <table:table-cell table:formula="of:=RIGHT([.A130];4)" office:value-type="string" office:string-value="E826" calcext:value-type="string">
            <text:p>E826</text:p>
          </table:table-cell>
          <table:table-cell table:style-name="ce3" table:formula="of:=UNICHAR(HEX2DEC([.C130]))" office:value-type="string" office:string-value="" calcext:value-type="string">
            <text:p></text:p>
          </table:table-cell>
          <table:table-cell office:value-type="string" calcext:value-type="string">
            <text:p>γο</text:p>
          </table:table-cell>
          <table:table-cell table:style-name="ce21" office:value-type="string" calcext:value-type="string">
            <text:p></text:p>
          </table:table-cell>
          <table:table-cell table:formula="of:=DEC2HEX(UNICODE([.F130]))" office:value-type="string" office:string-value="E6DA" calcext:value-type="string">
            <text:p>E6DA</text:p>
          </table:table-cell>
          <table:table-cell table:formula="of:=CONCATENATE(&quot;0x&quot;;[.G130])" office:value-type="string" office:string-value="0xE6DA" calcext:value-type="string">
            <text:p>0xE6DA</text:p>
          </table:table-cell>
          <table:table-cell table:formula="of:=VLOOKUP([.H130];[$FROMVS_Names.$A$1:$FROMVS_Names.$B$151];2;0)" office:value-type="string" office:string-value="gamma_omicron_2" calcext:value-type="string">
            <text:p>gamma_omicron_2</text:p>
          </table:table-cell>
          <table:table-cell table:style-name="ce7" table:formula="of:=IF(EXACT([.C130];[.G130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6D9</text:p>
          </table:table-cell>
          <table:table-cell office:value-type="string" calcext:value-type="string">
            <text:p>gamma_omicron</text:p>
          </table:table-cell>
          <table:table-cell table:formula="of:=RIGHT([.A131];4)" office:value-type="string" office:string-value="E6D9" calcext:value-type="string">
            <text:p>E6D9</text:p>
          </table:table-cell>
          <table:table-cell table:style-name="ce3" table:formula="of:=UNICHAR(HEX2DEC([.C131]))" office:value-type="string" office:string-value="" calcext:value-type="string">
            <text:p></text:p>
          </table:table-cell>
          <table:table-cell office:value-type="string" calcext:value-type="string">
            <text:p>γο</text:p>
          </table:table-cell>
          <table:table-cell office:value-type="string" calcext:value-type="string">
            <text:p></text:p>
          </table:table-cell>
          <table:table-cell table:formula="of:=DEC2HEX(UNICODE([.F131]))" office:value-type="string" office:string-value="E6D9" calcext:value-type="string">
            <text:p>E6D9</text:p>
          </table:table-cell>
          <table:table-cell table:formula="of:=CONCATENATE(&quot;0x&quot;;[.G131])" office:value-type="string" office:string-value="0xE6D9" calcext:value-type="string">
            <text:p>0xE6D9</text:p>
          </table:table-cell>
          <table:table-cell table:formula="of:=VLOOKUP([.H131];[$FROMVS_Names.$A$1:$FROMVS_Names.$B$151];2;0)" office:value-type="string" office:string-value="gamma_omicron" calcext:value-type="string">
            <text:p>gamma_omicron</text:p>
          </table:table-cell>
          <table:table-cell table:style-name="ce7" table:formula="of:=IF(EXACT([.C131];[.G131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8</text:p>
          </table:table-cell>
          <table:table-cell office:value-type="string" calcext:value-type="string">
            <text:p>gamma_epsilon_nu_oxia</text:p>
          </table:table-cell>
          <table:table-cell table:formula="of:=RIGHT([.A132];4)" office:value-type="string" office:string-value="E6D8" calcext:value-type="string">
            <text:p>E6D8</text:p>
          </table:table-cell>
          <table:table-cell table:style-name="ce3" table:formula="of:=UNICHAR(HEX2DEC([.C132]))" office:value-type="string" office:string-value="" calcext:value-type="string">
            <text:p></text:p>
          </table:table-cell>
          <table:table-cell office:value-type="string" calcext:value-type="string">
            <text:p>γέν</text:p>
          </table:table-cell>
          <table:table-cell office:value-type="string" calcext:value-type="string">
            <text:p></text:p>
          </table:table-cell>
          <table:table-cell table:formula="of:=DEC2HEX(UNICODE([.F132]))" office:value-type="string" office:string-value="E6D8" calcext:value-type="string">
            <text:p>E6D8</text:p>
          </table:table-cell>
          <table:table-cell table:formula="of:=CONCATENATE(&quot;0x&quot;;[.G132])" office:value-type="string" office:string-value="0xE6D8" calcext:value-type="string">
            <text:p>0xE6D8</text:p>
          </table:table-cell>
          <table:table-cell table:formula="of:=VLOOKUP([.H132];[$FROMVS_Names.$A$1:$FROMVS_Names.$B$151];2;0)" office:value-type="string" office:string-value="gamma_epsilon_nu_oxia" calcext:value-type="string">
            <text:p>gamma_epsilon_nu_oxia</text:p>
          </table:table-cell>
          <table:table-cell table:style-name="ce7" table:formula="of:=IF(EXACT([.C132];[.G132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7</text:p>
          </table:table-cell>
          <table:table-cell office:value-type="string" calcext:value-type="string">
            <text:p>gamma_gamma</text:p>
          </table:table-cell>
          <table:table-cell table:formula="of:=RIGHT([.A133];4)" office:value-type="string" office:string-value="E6D7" calcext:value-type="string">
            <text:p>E6D7</text:p>
          </table:table-cell>
          <table:table-cell table:style-name="ce3" table:formula="of:=UNICHAR(HEX2DEC([.C133]))" office:value-type="string" office:string-value="" calcext:value-type="string">
            <text:p></text:p>
          </table:table-cell>
          <table:table-cell office:value-type="string" calcext:value-type="string">
            <text:p>γγ</text:p>
          </table:table-cell>
          <table:table-cell office:value-type="string" calcext:value-type="string">
            <text:p></text:p>
          </table:table-cell>
          <table:table-cell table:formula="of:=DEC2HEX(UNICODE([.F133]))" office:value-type="string" office:string-value="E6D7" calcext:value-type="string">
            <text:p>E6D7</text:p>
          </table:table-cell>
          <table:table-cell table:formula="of:=CONCATENATE(&quot;0x&quot;;[.G133])" office:value-type="string" office:string-value="0xE6D7" calcext:value-type="string">
            <text:p>0xE6D7</text:p>
          </table:table-cell>
          <table:table-cell table:formula="of:=VLOOKUP([.H133];[$FROMVS_Names.$A$1:$FROMVS_Names.$B$151];2;0)" office:value-type="string" office:string-value="gamma_gamma" calcext:value-type="string">
            <text:p>gamma_gamma</text:p>
          </table:table-cell>
          <table:table-cell table:style-name="ce7" table:formula="of:=IF(EXACT([.C133];[.G133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6</text:p>
          </table:table-cell>
          <table:table-cell office:value-type="string" calcext:value-type="string">
            <text:p>gamma_alpha_varia_rho_5</text:p>
          </table:table-cell>
          <table:table-cell table:formula="of:=RIGHT([.A134];4)" office:value-type="string" office:string-value="E6D6" calcext:value-type="string">
            <text:p>E6D6</text:p>
          </table:table-cell>
          <table:table-cell table:style-name="ce3" table:formula="of:=UNICHAR(HEX2DEC([.C134]))" office:value-type="string" office:string-value="" calcext:value-type="string">
            <text:p></text:p>
          </table:table-cell>
          <table:table-cell office:value-type="string" calcext:value-type="string">
            <text:p>γὰρ</text:p>
          </table:table-cell>
          <table:table-cell office:value-type="string" calcext:value-type="string">
            <text:p></text:p>
          </table:table-cell>
          <table:table-cell table:formula="of:=DEC2HEX(UNICODE([.F134]))" office:value-type="string" office:string-value="E6D6" calcext:value-type="string">
            <text:p>E6D6</text:p>
          </table:table-cell>
          <table:table-cell table:formula="of:=CONCATENATE(&quot;0x&quot;;[.G134])" office:value-type="string" office:string-value="0xE6D6" calcext:value-type="string">
            <text:p>0xE6D6</text:p>
          </table:table-cell>
          <table:table-cell table:formula="of:=VLOOKUP([.H134];[$FROMVS_Names.$A$1:$FROMVS_Names.$B$151];2;0)" office:value-type="string" office:string-value="gamma_alpha_varia_rho_5" calcext:value-type="string">
            <text:p>gamma_alpha_varia_rho_5</text:p>
          </table:table-cell>
          <table:table-cell table:style-name="ce7" table:formula="of:=IF(EXACT([.C134];[.G13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5</text:p>
          </table:table-cell>
          <table:table-cell office:value-type="string" calcext:value-type="string">
            <text:p>gamma_alpha_varia_rho_4</text:p>
          </table:table-cell>
          <table:table-cell table:formula="of:=RIGHT([.A135];4)" office:value-type="string" office:string-value="E6D5" calcext:value-type="string">
            <text:p>E6D5</text:p>
          </table:table-cell>
          <table:table-cell table:style-name="ce3" table:formula="of:=UNICHAR(HEX2DEC([.C135]))" office:value-type="string" office:string-value="" calcext:value-type="string">
            <text:p></text:p>
          </table:table-cell>
          <table:table-cell office:value-type="string" calcext:value-type="string">
            <text:p>γὰρ</text:p>
          </table:table-cell>
          <table:table-cell office:value-type="string" calcext:value-type="string">
            <text:p></text:p>
          </table:table-cell>
          <table:table-cell table:formula="of:=DEC2HEX(UNICODE([.F135]))" office:value-type="string" office:string-value="E6D5" calcext:value-type="string">
            <text:p>E6D5</text:p>
          </table:table-cell>
          <table:table-cell table:formula="of:=CONCATENATE(&quot;0x&quot;;[.G135])" office:value-type="string" office:string-value="0xE6D5" calcext:value-type="string">
            <text:p>0xE6D5</text:p>
          </table:table-cell>
          <table:table-cell table:formula="of:=VLOOKUP([.H135];[$FROMVS_Names.$A$1:$FROMVS_Names.$B$151];2;0)" office:value-type="string" office:string-value="gamma_alpha_varia_rho_4" calcext:value-type="string">
            <text:p>gamma_alpha_varia_rho_4</text:p>
          </table:table-cell>
          <table:table-cell table:style-name="ce7" table:formula="of:=IF(EXACT([.C135];[.G13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4</text:p>
          </table:table-cell>
          <table:table-cell office:value-type="string" calcext:value-type="string">
            <text:p>gamma_alpha_varia_rho_3</text:p>
          </table:table-cell>
          <table:table-cell table:formula="of:=RIGHT([.A136];4)" office:value-type="string" office:string-value="E6D4" calcext:value-type="string">
            <text:p>E6D4</text:p>
          </table:table-cell>
          <table:table-cell table:style-name="ce3" table:formula="of:=UNICHAR(HEX2DEC([.C136]))" office:value-type="string" office:string-value="" calcext:value-type="string">
            <text:p></text:p>
          </table:table-cell>
          <table:table-cell office:value-type="string" calcext:value-type="string">
            <text:p>γὰρ</text:p>
          </table:table-cell>
          <table:table-cell office:value-type="string" calcext:value-type="string">
            <text:p></text:p>
          </table:table-cell>
          <table:table-cell table:formula="of:=DEC2HEX(UNICODE([.F136]))" office:value-type="string" office:string-value="E6D4" calcext:value-type="string">
            <text:p>E6D4</text:p>
          </table:table-cell>
          <table:table-cell table:formula="of:=CONCATENATE(&quot;0x&quot;;[.G136])" office:value-type="string" office:string-value="0xE6D4" calcext:value-type="string">
            <text:p>0xE6D4</text:p>
          </table:table-cell>
          <table:table-cell table:formula="of:=VLOOKUP([.H136];[$FROMVS_Names.$A$1:$FROMVS_Names.$B$151];2;0)" office:value-type="string" office:string-value="gamma_alpha_varia_rho_3" calcext:value-type="string">
            <text:p>gamma_alpha_varia_rho_3</text:p>
          </table:table-cell>
          <table:table-cell table:style-name="ce7" table:formula="of:=IF(EXACT([.C136];[.G13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3</text:p>
          </table:table-cell>
          <table:table-cell office:value-type="string" calcext:value-type="string">
            <text:p>gamma_alpha_varia_rho_2</text:p>
          </table:table-cell>
          <table:table-cell table:formula="of:=RIGHT([.A137];4)" office:value-type="string" office:string-value="E6D3" calcext:value-type="string">
            <text:p>E6D3</text:p>
          </table:table-cell>
          <table:table-cell table:style-name="ce3" table:formula="of:=UNICHAR(HEX2DEC([.C137]))" office:value-type="string" office:string-value="" calcext:value-type="string">
            <text:p></text:p>
          </table:table-cell>
          <table:table-cell office:value-type="string" calcext:value-type="string">
            <text:p>γὰρ</text:p>
          </table:table-cell>
          <table:table-cell office:value-type="string" calcext:value-type="string">
            <text:p></text:p>
          </table:table-cell>
          <table:table-cell table:formula="of:=DEC2HEX(UNICODE([.F137]))" office:value-type="string" office:string-value="E6D3" calcext:value-type="string">
            <text:p>E6D3</text:p>
          </table:table-cell>
          <table:table-cell table:formula="of:=CONCATENATE(&quot;0x&quot;;[.G137])" office:value-type="string" office:string-value="0xE6D3" calcext:value-type="string">
            <text:p>0xE6D3</text:p>
          </table:table-cell>
          <table:table-cell table:formula="of:=VLOOKUP([.H137];[$FROMVS_Names.$A$1:$FROMVS_Names.$B$151];2;0)" office:value-type="string" office:string-value="gamma_alpha_varia_rho_2" calcext:value-type="string">
            <text:p>gamma_alpha_varia_rho_2</text:p>
          </table:table-cell>
          <table:table-cell table:style-name="ce7" table:formula="of:=IF(EXACT([.C137];[.G13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2</text:p>
          </table:table-cell>
          <table:table-cell office:value-type="string" calcext:value-type="string">
            <text:p>gamma_alpha_varia_rho_1</text:p>
          </table:table-cell>
          <table:table-cell table:formula="of:=RIGHT([.A138];4)" office:value-type="string" office:string-value="E6D2" calcext:value-type="string">
            <text:p>E6D2</text:p>
          </table:table-cell>
          <table:table-cell table:style-name="ce3" table:formula="of:=UNICHAR(HEX2DEC([.C138]))" office:value-type="string" office:string-value="" calcext:value-type="string">
            <text:p></text:p>
          </table:table-cell>
          <table:table-cell office:value-type="string" calcext:value-type="string">
            <text:p>γὰρ</text:p>
          </table:table-cell>
          <table:table-cell office:value-type="string" calcext:value-type="string">
            <text:p></text:p>
          </table:table-cell>
          <table:table-cell table:formula="of:=DEC2HEX(UNICODE([.F138]))" office:value-type="string" office:string-value="E6D2" calcext:value-type="string">
            <text:p>E6D2</text:p>
          </table:table-cell>
          <table:table-cell table:formula="of:=CONCATENATE(&quot;0x&quot;;[.G138])" office:value-type="string" office:string-value="0xE6D2" calcext:value-type="string">
            <text:p>0xE6D2</text:p>
          </table:table-cell>
          <table:table-cell table:formula="of:=VLOOKUP([.H138];[$FROMVS_Names.$A$1:$FROMVS_Names.$B$151];2;0)" office:value-type="string" office:string-value="gamma_alpha_varia_rho" calcext:value-type="string">
            <text:p>gamma_alpha_varia_rho</text:p>
          </table:table-cell>
          <table:table-cell table:style-name="ce7" table:formula="of:=IF(EXACT([.C138];[.G13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1</text:p>
          </table:table-cell>
          <table:table-cell office:value-type="string" calcext:value-type="string">
            <text:p>gamma_tall</text:p>
          </table:table-cell>
          <table:table-cell table:formula="of:=RIGHT([.A139];4)" office:value-type="string" office:string-value="E6D1" calcext:value-type="string">
            <text:p>E6D1</text:p>
          </table:table-cell>
          <table:table-cell table:style-name="ce3" table:formula="of:=UNICHAR(HEX2DEC([.C139]))" office:value-type="string" office:string-value="" calcext:value-type="string">
            <text:p>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</text:p>
          </table:table-cell>
          <table:table-cell table:formula="of:=DEC2HEX(UNICODE([.F139]))" office:value-type="string" office:string-value="E6D1" calcext:value-type="string">
            <text:p>E6D1</text:p>
          </table:table-cell>
          <table:table-cell table:formula="of:=CONCATENATE(&quot;0x&quot;;[.G139])" office:value-type="string" office:string-value="0xE6D1" calcext:value-type="string">
            <text:p>0xE6D1</text:p>
          </table:table-cell>
          <table:table-cell table:formula="of:=VLOOKUP([.H139];[$FROMVS_Names.$A$1:$FROMVS_Names.$B$151];2;0)" office:value-type="string" office:string-value="gamma_tall" calcext:value-type="string">
            <text:p>gamma_tall</text:p>
          </table:table-cell>
          <table:table-cell table:style-name="ce7" table:formula="of:=IF(EXACT([.C139];[.G13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D0</text:p>
          </table:table-cell>
          <table:table-cell office:value-type="string" calcext:value-type="string">
            <text:p>gamma_short</text:p>
          </table:table-cell>
          <table:table-cell table:formula="of:=RIGHT([.A140];4)" office:value-type="string" office:string-value="E6D0" calcext:value-type="string">
            <text:p>E6D0</text:p>
          </table:table-cell>
          <table:table-cell table:style-name="ce3" table:formula="of:=UNICHAR(HEX2DEC([.C140]))" office:value-type="string" office:string-value="" calcext:value-type="string">
            <text:p>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</text:p>
          </table:table-cell>
          <table:table-cell table:formula="of:=DEC2HEX(UNICODE([.F140]))" office:value-type="string" office:string-value="E6D0" calcext:value-type="string">
            <text:p>E6D0</text:p>
          </table:table-cell>
          <table:table-cell table:formula="of:=CONCATENATE(&quot;0x&quot;;[.G140])" office:value-type="string" office:string-value="0xE6D0" calcext:value-type="string">
            <text:p>0xE6D0</text:p>
          </table:table-cell>
          <table:table-cell table:formula="of:=VLOOKUP([.H140];[$FROMVS_Names.$A$1:$FROMVS_Names.$B$151];2;0)" office:value-type="string" office:string-value="gamma_short" calcext:value-type="string">
            <text:p>gamma_short</text:p>
          </table:table-cell>
          <table:table-cell table:style-name="ce7" table:formula="of:=IF(EXACT([.C140];[.G140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8</text:p>
          </table:table-cell>
          <table:table-cell office:value-type="string" calcext:value-type="string">
            <text:p>alpha_psili_sigma_tau</text:p>
          </table:table-cell>
          <table:table-cell table:formula="of:=RIGHT([.A141];4)" office:value-type="string" office:string-value="E6B8" calcext:value-type="string">
            <text:p>E6B8</text:p>
          </table:table-cell>
          <table:table-cell table:style-name="ce3" table:formula="of:=UNICHAR(HEX2DEC([.C141]))" office:value-type="string" office:string-value="" calcext:value-type="string">
            <text:p></text:p>
          </table:table-cell>
          <table:table-cell office:value-type="string" calcext:value-type="string">
            <text:p>ἀστ</text:p>
          </table:table-cell>
          <table:table-cell table:style-name="ce21" office:value-type="string" calcext:value-type="string">
            <text:p></text:p>
          </table:table-cell>
          <table:table-cell table:formula="of:=DEC2HEX(UNICODE([.F141]))" office:value-type="string" office:string-value="E6B9" calcext:value-type="string">
            <text:p>E6B9</text:p>
          </table:table-cell>
          <table:table-cell table:formula="of:=CONCATENATE(&quot;0x&quot;;[.G141])" office:value-type="string" office:string-value="0xE6B9" calcext:value-type="string">
            <text:p>0xE6B9</text:p>
          </table:table-cell>
          <table:table-cell table:formula="of:=VLOOKUP([.H141];[$FROMVS_Names.$A$1:$FROMVS_Names.$B$151];2;0)" office:value-type="string" office:string-value="alpha_psili_sigma_tau" calcext:value-type="string">
            <text:p>alpha_psili_sigma_tau</text:p>
          </table:table-cell>
          <table:table-cell table:style-name="ce7" table:formula="of:=IF(EXACT([.C141];[.G14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6B7</text:p>
          </table:table-cell>
          <table:table-cell office:value-type="string" calcext:value-type="string">
            <text:p>alpha_sigma_tau</text:p>
          </table:table-cell>
          <table:table-cell table:formula="of:=RIGHT([.A142];4)" office:value-type="string" office:string-value="E6B7" calcext:value-type="string">
            <text:p>E6B7</text:p>
          </table:table-cell>
          <table:table-cell table:style-name="ce3" table:formula="of:=UNICHAR(HEX2DEC([.C142]))" office:value-type="string" office:string-value="" calcext:value-type="string">
            <text:p></text:p>
          </table:table-cell>
          <table:table-cell office:value-type="string" calcext:value-type="string">
            <text:p>αστ</text:p>
          </table:table-cell>
          <table:table-cell table:style-name="ce21" office:value-type="string" calcext:value-type="string">
            <text:p></text:p>
          </table:table-cell>
          <table:table-cell table:formula="of:=DEC2HEX(UNICODE([.F142]))" office:value-type="string" office:string-value="E6B8" calcext:value-type="string">
            <text:p>E6B8</text:p>
          </table:table-cell>
          <table:table-cell table:formula="of:=CONCATENATE(&quot;0x&quot;;[.G142])" office:value-type="string" office:string-value="0xE6B8" calcext:value-type="string">
            <text:p>0xE6B8</text:p>
          </table:table-cell>
          <table:table-cell table:formula="of:=VLOOKUP([.H142];[$FROMVS_Names.$A$1:$FROMVS_Names.$B$151];2;0)" office:value-type="string" office:string-value="alpha_sigma_tau" calcext:value-type="string">
            <text:p>alpha_sigma_tau</text:p>
          </table:table-cell>
          <table:table-cell table:style-name="ce7" table:formula="of:=IF(EXACT([.C142];[.G142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833</text:p>
          </table:table-cell>
          <table:table-cell office:value-type="string" calcext:value-type="string">
            <text:p>alpha_rho</text:p>
          </table:table-cell>
          <table:table-cell table:formula="of:=RIGHT([.A143];4)" office:value-type="string" office:string-value="E833" calcext:value-type="string">
            <text:p>E833</text:p>
          </table:table-cell>
          <table:table-cell table:style-name="ce3" table:formula="of:=UNICHAR(HEX2DEC([.C143]))" office:value-type="string" office:string-value="" calcext:value-type="string">
            <text:p></text:p>
          </table:table-cell>
          <table:table-cell office:value-type="string" calcext:value-type="string">
            <text:p>αρ</text:p>
          </table:table-cell>
          <table:table-cell table:style-name="ce3" office:value-type="string" calcext:value-type="string">
            <text:p></text:p>
          </table:table-cell>
          <table:table-cell table:formula="of:=DEC2HEX(UNICODE([.F143]))" office:value-type="string" office:string-value="E6B7" calcext:value-type="string">
            <text:p>E6B7</text:p>
          </table:table-cell>
          <table:table-cell table:formula="of:=CONCATENATE(&quot;0x&quot;;[.G143])" office:value-type="string" office:string-value="0xE6B7" calcext:value-type="string">
            <text:p>0xE6B7</text:p>
          </table:table-cell>
          <table:table-cell table:formula="of:=VLOOKUP([.H143];[$FROMVS_Names.$A$1:$FROMVS_Names.$B$151];2;0)" office:value-type="string" office:string-value="alpha_rho" calcext:value-type="string">
            <text:p>alpha_rho</text:p>
          </table:table-cell>
          <table:table-cell table:style-name="ce7" table:formula="of:=IF(EXACT([.C143];[.G143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6B6</text:p>
          </table:table-cell>
          <table:table-cell office:value-type="string" calcext:value-type="string">
            <text:p>alpha_nu</text:p>
          </table:table-cell>
          <table:table-cell table:formula="of:=RIGHT([.A144];4)" office:value-type="string" office:string-value="E6B6" calcext:value-type="string">
            <text:p>E6B6</text:p>
          </table:table-cell>
          <table:table-cell table:style-name="ce3" table:formula="of:=UNICHAR(HEX2DEC([.C144]))" office:value-type="string" office:string-value="" calcext:value-type="string">
            <text:p></text:p>
          </table:table-cell>
          <table:table-cell office:value-type="string" calcext:value-type="string">
            <text:p>αν</text:p>
          </table:table-cell>
          <table:table-cell office:value-type="string" calcext:value-type="string">
            <text:p></text:p>
          </table:table-cell>
          <table:table-cell table:formula="of:=DEC2HEX(UNICODE([.F144]))" office:value-type="string" office:string-value="E6B6" calcext:value-type="string">
            <text:p>E6B6</text:p>
          </table:table-cell>
          <table:table-cell table:formula="of:=CONCATENATE(&quot;0x&quot;;[.G144])" office:value-type="string" office:string-value="0xE6B6" calcext:value-type="string">
            <text:p>0xE6B6</text:p>
          </table:table-cell>
          <table:table-cell table:formula="of:=VLOOKUP([.H144];[$FROMVS_Names.$A$1:$FROMVS_Names.$B$151];2;0)" office:value-type="string" office:string-value="alpha_nu" calcext:value-type="string">
            <text:p>alpha_nu</text:p>
          </table:table-cell>
          <table:table-cell table:style-name="ce7" table:formula="of:=IF(EXACT([.C144];[.G144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5</text:p>
          </table:table-cell>
          <table:table-cell office:value-type="string" calcext:value-type="string">
            <text:p>alpha_iota_perispomeni</text:p>
          </table:table-cell>
          <table:table-cell table:formula="of:=RIGHT([.A145];4)" office:value-type="string" office:string-value="E6B5" calcext:value-type="string">
            <text:p>E6B5</text:p>
          </table:table-cell>
          <table:table-cell table:style-name="ce3" table:formula="of:=UNICHAR(HEX2DEC([.C145]))" office:value-type="string" office:string-value="" calcext:value-type="string">
            <text:p></text:p>
          </table:table-cell>
          <table:table-cell office:value-type="string" calcext:value-type="string">
            <text:p>αῖ</text:p>
          </table:table-cell>
          <table:table-cell office:value-type="string" calcext:value-type="string">
            <text:p></text:p>
          </table:table-cell>
          <table:table-cell table:formula="of:=DEC2HEX(UNICODE([.F145]))" office:value-type="string" office:string-value="E6B5" calcext:value-type="string">
            <text:p>E6B5</text:p>
          </table:table-cell>
          <table:table-cell table:formula="of:=CONCATENATE(&quot;0x&quot;;[.G145])" office:value-type="string" office:string-value="0xE6B5" calcext:value-type="string">
            <text:p>0xE6B5</text:p>
          </table:table-cell>
          <table:table-cell table:formula="of:=VLOOKUP([.H145];[$FROMVS_Names.$A$1:$FROMVS_Names.$B$151];2;0)" office:value-type="string" office:string-value="alpha_iota_perispomeni" calcext:value-type="string">
            <text:p>alpha_iota_perispomeni</text:p>
          </table:table-cell>
          <table:table-cell table:style-name="ce7" table:formula="of:=IF(EXACT([.C145];[.G145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4</text:p>
          </table:table-cell>
          <table:table-cell office:value-type="string" calcext:value-type="string">
            <text:p>alpha_iota_psili_oxia</text:p>
          </table:table-cell>
          <table:table-cell table:formula="of:=RIGHT([.A146];4)" office:value-type="string" office:string-value="E6B4" calcext:value-type="string">
            <text:p>E6B4</text:p>
          </table:table-cell>
          <table:table-cell table:style-name="ce3" table:formula="of:=UNICHAR(HEX2DEC([.C146]))" office:value-type="string" office:string-value="" calcext:value-type="string">
            <text:p></text:p>
          </table:table-cell>
          <table:table-cell office:value-type="string" calcext:value-type="string">
            <text:p>αἴ</text:p>
          </table:table-cell>
          <table:table-cell office:value-type="string" calcext:value-type="string">
            <text:p></text:p>
          </table:table-cell>
          <table:table-cell table:formula="of:=DEC2HEX(UNICODE([.F146]))" office:value-type="string" office:string-value="E6B4" calcext:value-type="string">
            <text:p>E6B4</text:p>
          </table:table-cell>
          <table:table-cell table:formula="of:=CONCATENATE(&quot;0x&quot;;[.G146])" office:value-type="string" office:string-value="0xE6B4" calcext:value-type="string">
            <text:p>0xE6B4</text:p>
          </table:table-cell>
          <table:table-cell table:formula="of:=VLOOKUP([.H146];[$FROMVS_Names.$A$1:$FROMVS_Names.$B$151];2;0)" office:value-type="string" office:string-value="alpha_iota_psili_oxia" calcext:value-type="string">
            <text:p>alpha_iota_psili_oxia</text:p>
          </table:table-cell>
          <table:table-cell table:style-name="ce7" table:formula="of:=IF(EXACT([.C146];[.G146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3</text:p>
          </table:table-cell>
          <table:table-cell office:value-type="string" calcext:value-type="string">
            <text:p>alpha_iota_oxia</text:p>
          </table:table-cell>
          <table:table-cell table:formula="of:=RIGHT([.A147];4)" office:value-type="string" office:string-value="E6B3" calcext:value-type="string">
            <text:p>E6B3</text:p>
          </table:table-cell>
          <table:table-cell table:style-name="ce3" table:formula="of:=UNICHAR(HEX2DEC([.C147]))" office:value-type="string" office:string-value="" calcext:value-type="string">
            <text:p></text:p>
          </table:table-cell>
          <table:table-cell office:value-type="string" calcext:value-type="string">
            <text:p>α<text:span text:style-name="T1">ί</text:span></text:p>
          </table:table-cell>
          <table:table-cell office:value-type="string" calcext:value-type="string">
            <text:p></text:p>
          </table:table-cell>
          <table:table-cell table:formula="of:=DEC2HEX(UNICODE([.F147]))" office:value-type="string" office:string-value="E6B3" calcext:value-type="string">
            <text:p>E6B3</text:p>
          </table:table-cell>
          <table:table-cell table:formula="of:=CONCATENATE(&quot;0x&quot;;[.G147])" office:value-type="string" office:string-value="0xE6B3" calcext:value-type="string">
            <text:p>0xE6B3</text:p>
          </table:table-cell>
          <table:table-cell table:formula="of:=VLOOKUP([.H147];[$FROMVS_Names.$A$1:$FROMVS_Names.$B$151];2;0)" office:value-type="string" office:string-value="alpha_iota_tonos" calcext:value-type="string">
            <text:p>alpha_iota_tonos</text:p>
          </table:table-cell>
          <table:table-cell table:style-name="ce7" table:formula="of:=IF(EXACT([.C147];[.G147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2</text:p>
          </table:table-cell>
          <table:table-cell office:value-type="string" calcext:value-type="string">
            <text:p>alpha_iota_psili</text:p>
          </table:table-cell>
          <table:table-cell table:formula="of:=RIGHT([.A148];4)" office:value-type="string" office:string-value="E6B2" calcext:value-type="string">
            <text:p>E6B2</text:p>
          </table:table-cell>
          <table:table-cell table:style-name="ce3" table:formula="of:=UNICHAR(HEX2DEC([.C148]))" office:value-type="string" office:string-value="" calcext:value-type="string">
            <text:p></text:p>
          </table:table-cell>
          <table:table-cell office:value-type="string" calcext:value-type="string">
            <text:p>α<text:span text:style-name="T1">ἰ</text:span></text:p>
          </table:table-cell>
          <table:table-cell table:style-name="ce21" office:value-type="string" calcext:value-type="string">
            <text:p></text:p>
          </table:table-cell>
          <table:table-cell table:formula="of:=DEC2HEX(UNICODE([.F148]))" office:value-type="string" office:string-value="E6B2" calcext:value-type="string">
            <text:p>E6B2</text:p>
          </table:table-cell>
          <table:table-cell table:formula="of:=CONCATENATE(&quot;0x&quot;;[.G148])" office:value-type="string" office:string-value="0xE6B2" calcext:value-type="string">
            <text:p>0xE6B2</text:p>
          </table:table-cell>
          <table:table-cell table:formula="of:=VLOOKUP([.H148];[$FROMVS_Names.$A$1:$FROMVS_Names.$B$151];2;0)" office:value-type="string" office:string-value="alpha_iota_psili" calcext:value-type="string">
            <text:p>alpha_iota_psili</text:p>
          </table:table-cell>
          <table:table-cell table:style-name="ce7" table:formula="of:=IF(EXACT([.C148];[.G148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1</text:p>
          </table:table-cell>
          <table:table-cell office:value-type="string" calcext:value-type="string">
            <text:p>alpha_iota</text:p>
          </table:table-cell>
          <table:table-cell table:formula="of:=RIGHT([.A149];4)" office:value-type="string" office:string-value="E6B1" calcext:value-type="string">
            <text:p>E6B1</text:p>
          </table:table-cell>
          <table:table-cell table:style-name="ce3" table:formula="of:=UNICHAR(HEX2DEC([.C149]))" office:value-type="string" office:string-value="" calcext:value-type="string">
            <text:p></text:p>
          </table:table-cell>
          <table:table-cell office:value-type="string" calcext:value-type="string">
            <text:p>αι</text:p>
          </table:table-cell>
          <table:table-cell table:style-name="ce21" office:value-type="string" calcext:value-type="string">
            <text:p></text:p>
          </table:table-cell>
          <table:table-cell table:formula="of:=DEC2HEX(UNICODE([.F149]))" office:value-type="string" office:string-value="E6B1" calcext:value-type="string">
            <text:p>E6B1</text:p>
          </table:table-cell>
          <table:table-cell table:formula="of:=CONCATENATE(&quot;0x&quot;;[.G149])" office:value-type="string" office:string-value="0xE6B1" calcext:value-type="string">
            <text:p>0xE6B1</text:p>
          </table:table-cell>
          <table:table-cell table:formula="of:=VLOOKUP([.H149];[$FROMVS_Names.$A$1:$FROMVS_Names.$B$151];2;0)" office:value-type="string" office:string-value="alpha_iota" calcext:value-type="string">
            <text:p>alpha_iota</text:p>
          </table:table-cell>
          <table:table-cell table:style-name="ce7" table:formula="of:=IF(EXACT([.C149];[.G149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6B0</text:p>
          </table:table-cell>
          <table:table-cell office:value-type="string" calcext:value-type="string">
            <text:p>alpha_curly</text:p>
          </table:table-cell>
          <table:table-cell table:formula="of:=RIGHT([.A150];4)" office:value-type="string" office:string-value="E6B0" calcext:value-type="string">
            <text:p>E6B0</text:p>
          </table:table-cell>
          <table:table-cell table:style-name="ce3" table:formula="of:=UNICHAR(HEX2DEC([.C150]))" office:value-type="string" office:string-value="" calcext:value-type="string">
            <text:p></text:p>
          </table:table-cell>
          <table:table-cell office:value-type="string" calcext:value-type="string">
            <text:p>α</text:p>
          </table:table-cell>
          <table:table-cell table:style-name="ce21" office:value-type="string" calcext:value-type="string">
            <text:p></text:p>
          </table:table-cell>
          <table:table-cell table:formula="of:=DEC2HEX(UNICODE([.F150]))" office:value-type="string" office:string-value="E6B0" calcext:value-type="string">
            <text:p>E6B0</text:p>
          </table:table-cell>
          <table:table-cell table:formula="of:=CONCATENATE(&quot;0x&quot;;[.G150])" office:value-type="string" office:string-value="0xE6B0" calcext:value-type="string">
            <text:p>0xE6B0</text:p>
          </table:table-cell>
          <table:table-cell table:formula="of:=VLOOKUP([.H150];[$FROMVS_Names.$A$1:$FROMVS_Names.$B$151];2;0)" office:value-type="string" office:string-value="alpha_curly" calcext:value-type="string">
            <text:p>alpha_curly</text:p>
          </table:table-cell>
          <table:table-cell table:style-name="ce7" table:formula="of:=IF(EXACT([.C150];[.G150]); &quot;Match&quot;; &quot;Replace&quot;)" office:value-type="string" office:string-value="Match" calcext:value-type="string">
            <text:p>Match</text:p>
          </table:table-cell>
        </table:table-row>
        <table:table-row table:style-name="ro1">
          <table:table-cell office:value-type="string" calcext:value-type="string">
            <text:p>0xE720</text:p>
          </table:table-cell>
          <table:table-cell office:value-type="string" calcext:value-type="string">
            <text:p>theta_1</text:p>
          </table:table-cell>
          <table:table-cell table:formula="of:=RIGHT([.A151];4)" office:value-type="string" office:string-value="E720" calcext:value-type="string">
            <text:p>E720</text:p>
          </table:table-cell>
          <table:table-cell table:style-name="ce3" table:formula="of:=UNICHAR(HEX2DEC([.C151]))" office:value-type="string" office:string-value="" calcext:value-type="string">
            <text:p>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ϑ</text:p>
          </table:table-cell>
          <table:table-cell table:formula="of:=DEC2HEX(UNICODE([.F151]))" office:value-type="string" office:string-value="3D1" calcext:value-type="string">
            <text:p>3D1</text:p>
          </table:table-cell>
          <table:table-cell table:formula="of:=CONCATENATE(&quot;0x&quot;;[.G151])" office:value-type="string" office:string-value="0x3D1" calcext:value-type="string">
            <text:p>0x3D1</text:p>
          </table:table-cell>
          <table:table-cell office:value-type="string" calcext:value-type="string">
            <text:p>theta_symbol</text:p>
          </table:table-cell>
          <table:table-cell table:style-name="ce7" table:formula="of:=IF(EXACT([.C151];[.G151]); &quot;Match&quot;; &quot;Replace&quot;)" office:value-type="string" office:string-value="Replace" calcext:value-type="string">
            <text:p>Replace</text:p>
          </table:table-cell>
        </table:table-row>
        <table:table-row table:style-name="ro1">
          <table:table-cell office:value-type="string" calcext:value-type="string">
            <text:p>0xE6C0</text:p>
          </table:table-cell>
          <table:table-cell office:value-type="string" calcext:value-type="string">
            <text:p>beta_curly</text:p>
          </table:table-cell>
          <table:table-cell table:formula="of:=RIGHT([.A152];4)" office:value-type="string" office:string-value="E6C0" calcext:value-type="string">
            <text:p>E6C0</text:p>
          </table:table-cell>
          <table:table-cell table:style-name="ce3" table:formula="of:=UNICHAR(HEX2DEC([.C152]))" office:value-type="string" office:string-value="" calcext:value-type="string">
            <text:p>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ϐ</text:p>
          </table:table-cell>
          <table:table-cell table:formula="of:=DEC2HEX(UNICODE([.F152]))" office:value-type="string" office:string-value="3D0" calcext:value-type="string">
            <text:p>3D0</text:p>
          </table:table-cell>
          <table:table-cell table:formula="of:=CONCATENATE(&quot;0x&quot;;[.G152])" office:value-type="string" office:string-value="0x3D0" calcext:value-type="string">
            <text:p>0x3D0</text:p>
          </table:table-cell>
          <table:table-cell office:value-type="string" calcext:value-type="string">
            <text:p>beta_symbol</text:p>
          </table:table-cell>
          <table:table-cell table:style-name="ce7" table:formula="of:=IF(EXACT([.C152];[.G152]); &quot;Match&quot;; &quot;Replace&quot;)" office:value-type="string" office:string-value="Replace" calcext:value-type="string">
            <text:p>Replace</text:p>
          </table:table-cell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ROMVS2_1_Name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0xE83E</text:p>
          </table:table-cell>
          <table:table-cell office:value-type="string" calcext:value-type="string">
            <text:p>tau_tall_psili</text:p>
          </table:table-cell>
        </table:table-row>
        <table:table-row table:style-name="ro1">
          <table:table-cell office:value-type="string" calcext:value-type="string">
            <text:p>0xE83D</text:p>
          </table:table-cell>
          <table:table-cell office:value-type="string" calcext:value-type="string">
            <text:p>epsilon_nu_2</text:p>
          </table:table-cell>
        </table:table-row>
        <table:table-row table:style-name="ro1">
          <table:table-cell office:value-type="string" calcext:value-type="string">
            <text:p>0xE83C</text:p>
          </table:table-cell>
          <table:table-cell office:value-type="string" calcext:value-type="string">
            <text:p>epsilon_nu</text:p>
          </table:table-cell>
        </table:table-row>
        <table:table-row table:style-name="ro1">
          <table:table-cell office:value-type="string" calcext:value-type="string">
            <text:p>0xE83B</text:p>
          </table:table-cell>
          <table:table-cell office:value-type="string" calcext:value-type="string">
            <text:p>alpha_sigma_2</text:p>
          </table:table-cell>
        </table:table-row>
        <table:table-row table:style-name="ro1">
          <table:table-cell office:value-type="string" calcext:value-type="string">
            <text:p>0xE83A</text:p>
          </table:table-cell>
          <table:table-cell office:value-type="string" calcext:value-type="string">
            <text:p>omicron_iota_perispomeni_sigma2</text:p>
          </table:table-cell>
        </table:table-row>
        <table:table-row table:style-name="ro1">
          <table:table-cell office:value-type="string" calcext:value-type="string">
            <text:p>0xE839</text:p>
          </table:table-cell>
          <table:table-cell office:value-type="string" calcext:value-type="string">
            <text:p>omicron_sigma_2</text:p>
          </table:table-cell>
        </table:table-row>
        <table:table-row table:style-name="ro1">
          <table:table-cell office:value-type="string" calcext:value-type="string">
            <text:p>0xE838</text:p>
          </table:table-cell>
          <table:table-cell office:value-type="string" calcext:value-type="string">
            <text:p>alpha_iota_perispomeni_sigma</text:p>
          </table:table-cell>
        </table:table-row>
        <table:table-row table:style-name="ro1">
          <table:table-cell office:value-type="string" calcext:value-type="string">
            <text:p>0xE837</text:p>
          </table:table-cell>
          <table:table-cell office:value-type="string" calcext:value-type="string">
            <text:p>alpha_nu_2</text:p>
          </table:table-cell>
        </table:table-row>
        <table:table-row table:style-name="ro1">
          <table:table-cell office:value-type="string" calcext:value-type="string">
            <text:p>0xE836</text:p>
          </table:table-cell>
          <table:table-cell office:value-type="string" calcext:value-type="string">
            <text:p>upsilon_tonos</text:p>
          </table:table-cell>
        </table:table-row>
        <table:table-row table:style-name="ro1">
          <table:table-cell office:value-type="string" calcext:value-type="string">
            <text:p>0xE835</text:p>
          </table:table-cell>
          <table:table-cell office:value-type="string" calcext:value-type="string">
            <text:p>alpha_perispomeni_sigma</text:p>
          </table:table-cell>
        </table:table-row>
        <table:table-row table:style-name="ro1">
          <table:table-cell office:value-type="string" calcext:value-type="string">
            <text:p>0xE834</text:p>
          </table:table-cell>
          <table:table-cell office:value-type="string" calcext:value-type="string">
            <text:p>iota_nu</text:p>
          </table:table-cell>
        </table:table-row>
        <table:table-row table:style-name="ro1">
          <table:table-cell office:value-type="string" calcext:value-type="string">
            <text:p>0xE833</text:p>
          </table:table-cell>
          <table:table-cell office:value-type="string" calcext:value-type="string">
            <text:p>alpha_rho</text:p>
          </table:table-cell>
        </table:table-row>
        <table:table-row table:style-name="ro1">
          <table:table-cell office:value-type="string" calcext:value-type="string">
            <text:p>0xE832</text:p>
          </table:table-cell>
          <table:table-cell office:value-type="string" calcext:value-type="string">
            <text:p>upsilon_varia_nu</text:p>
          </table:table-cell>
        </table:table-row>
        <table:table-row table:style-name="ro1">
          <table:table-cell office:value-type="string" calcext:value-type="string">
            <text:p>0xE831</text:p>
          </table:table-cell>
          <table:table-cell office:value-type="string" calcext:value-type="string">
            <text:p>tau_omicron_2</text:p>
          </table:table-cell>
        </table:table-row>
        <table:table-row table:style-name="ro1">
          <table:table-cell office:value-type="string" calcext:value-type="string">
            <text:p>0xE830</text:p>
          </table:table-cell>
          <table:table-cell office:value-type="string" calcext:value-type="string">
            <text:p>omega_perispomeni_sigma</text:p>
          </table:table-cell>
        </table:table-row>
        <table:table-row table:style-name="ro1">
          <table:table-cell office:value-type="string" calcext:value-type="string">
            <text:p>0xE82F</text:p>
          </table:table-cell>
          <table:table-cell office:value-type="string" calcext:value-type="string">
            <text:p>chi_psili</text:p>
          </table:table-cell>
        </table:table-row>
        <table:table-row table:style-name="ro1">
          <table:table-cell office:value-type="string" calcext:value-type="string">
            <text:p>0xE82E</text:p>
          </table:table-cell>
          <table:table-cell office:value-type="string" calcext:value-type="string">
            <text:p>phi_psili</text:p>
          </table:table-cell>
        </table:table-row>
        <table:table-row table:style-name="ro1">
          <table:table-cell office:value-type="string" calcext:value-type="string">
            <text:p>0xE82D</text:p>
          </table:table-cell>
          <table:table-cell office:value-type="string" calcext:value-type="string">
            <text:p>pi_psili</text:p>
          </table:table-cell>
        </table:table-row>
        <table:table-row table:style-name="ro1">
          <table:table-cell office:value-type="string" calcext:value-type="string">
            <text:p>0xE82C</text:p>
          </table:table-cell>
          <table:table-cell office:value-type="string" calcext:value-type="string">
            <text:p>lambda_psili</text:p>
          </table:table-cell>
        </table:table-row>
        <table:table-row table:style-name="ro1">
          <table:table-cell office:value-type="string" calcext:value-type="string">
            <text:p>0xE82B</text:p>
          </table:table-cell>
          <table:table-cell office:value-type="string" calcext:value-type="string">
            <text:p>epsilon_iota_sigma</text:p>
          </table:table-cell>
        </table:table-row>
        <table:table-row table:style-name="ro1">
          <table:table-cell office:value-type="string" calcext:value-type="string">
            <text:p>0xE82A</text:p>
          </table:table-cell>
          <table:table-cell office:value-type="string" calcext:value-type="string">
            <text:p>epsilon_upsilon2</text:p>
          </table:table-cell>
        </table:table-row>
        <table:table-row table:style-name="ro1">
          <table:table-cell office:value-type="string" calcext:value-type="string">
            <text:p>0xE829</text:p>
          </table:table-cell>
          <table:table-cell office:value-type="string" calcext:value-type="string">
            <text:p>pisymbol_psili</text:p>
          </table:table-cell>
        </table:table-row>
        <table:table-row table:style-name="ro1">
          <table:table-cell office:value-type="string" calcext:value-type="string">
            <text:p>0xE828</text:p>
          </table:table-cell>
          <table:table-cell office:value-type="string" calcext:value-type="string">
            <text:p>tau_alpha_iota_2</text:p>
          </table:table-cell>
        </table:table-row>
        <table:table-row table:style-name="ro1">
          <table:table-cell office:value-type="string" calcext:value-type="string">
            <text:p>0xE827</text:p>
          </table:table-cell>
          <table:table-cell office:value-type="string" calcext:value-type="string">
            <text:p>iota_perispomeni_nu</text:p>
          </table:table-cell>
        </table:table-row>
        <table:table-row table:style-name="ro1">
          <table:table-cell office:value-type="string" calcext:value-type="string">
            <text:p>0xE826</text:p>
          </table:table-cell>
          <table:table-cell office:value-type="string" calcext:value-type="string">
            <text:p>gamma_omicron_2</text:p>
          </table:table-cell>
        </table:table-row>
        <table:table-row table:style-name="ro1">
          <table:table-cell office:value-type="string" calcext:value-type="string">
            <text:p>0xE825</text:p>
          </table:table-cell>
          <table:table-cell office:value-type="string" calcext:value-type="string">
            <text:p>iota_sigma</text:p>
          </table:table-cell>
        </table:table-row>
        <table:table-row table:style-name="ro1">
          <table:table-cell office:value-type="string" calcext:value-type="string">
            <text:p>0xE824</text:p>
          </table:table-cell>
          <table:table-cell office:value-type="string" calcext:value-type="string">
            <text:p>alpha_nu_1</text:p>
          </table:table-cell>
        </table:table-row>
        <table:table-row table:style-name="ro1">
          <table:table-cell office:value-type="string" calcext:value-type="string">
            <text:p>0xE822</text:p>
          </table:table-cell>
          <table:table-cell office:value-type="string" calcext:value-type="string">
            <text:p>omega_perispomeni_nu</text:p>
          </table:table-cell>
        </table:table-row>
        <table:table-row table:style-name="ro1">
          <table:table-cell office:value-type="string" calcext:value-type="string">
            <text:p>0xE821</text:p>
          </table:table-cell>
          <table:table-cell office:value-type="string" calcext:value-type="string">
            <text:p>slant_2</text:p>
          </table:table-cell>
        </table:table-row>
        <table:table-row table:style-name="ro1">
          <table:table-cell office:value-type="string" calcext:value-type="string">
            <text:p>0xE820</text:p>
          </table:table-cell>
          <table:table-cell office:value-type="string" calcext:value-type="string">
            <text:p>slant_1</text:p>
          </table:table-cell>
        </table:table-row>
        <table:table-row table:style-name="ro1">
          <table:table-cell office:value-type="string" calcext:value-type="string">
            <text:p>0xE810</text:p>
          </table:table-cell>
          <table:table-cell office:value-type="string" calcext:value-type="string">
            <text:p>chi_rho</text:p>
          </table:table-cell>
        </table:table-row>
        <table:table-row table:style-name="ro1">
          <table:table-cell office:value-type="string" calcext:value-type="string">
            <text:p>0xE7F5</text:p>
          </table:table-cell>
          <table:table-cell office:value-type="string" calcext:value-type="string">
            <text:p>upsilon_psili_perispomeni_nu</text:p>
          </table:table-cell>
        </table:table-row>
        <table:table-row table:style-name="ro1">
          <table:table-cell office:value-type="string" calcext:value-type="string">
            <text:p>0xE7F4</text:p>
          </table:table-cell>
          <table:table-cell office:value-type="string" calcext:value-type="string">
            <text:p>upsilon_perispomeni</text:p>
          </table:table-cell>
        </table:table-row>
        <table:table-row table:style-name="ro1">
          <table:table-cell office:value-type="string" calcext:value-type="string">
            <text:p>0xE7F3</text:p>
          </table:table-cell>
          <table:table-cell office:value-type="string" calcext:value-type="string">
            <text:p>upsilon_perispomeni_nu</text:p>
          </table:table-cell>
        </table:table-row>
        <table:table-row table:style-name="ro1">
          <table:table-cell office:value-type="string" calcext:value-type="string">
            <text:p>0xE7F2</text:p>
          </table:table-cell>
          <table:table-cell office:value-type="string" calcext:value-type="string">
            <text:p>upsilon_oxia_nu</text:p>
          </table:table-cell>
        </table:table-row>
        <table:table-row table:style-name="ro1">
          <table:table-cell office:value-type="string" calcext:value-type="string">
            <text:p>0xE7F1</text:p>
          </table:table-cell>
          <table:table-cell office:value-type="string" calcext:value-type="string">
            <text:p>upsilon_nu</text:p>
          </table:table-cell>
        </table:table-row>
        <table:table-row table:style-name="ro1">
          <table:table-cell office:value-type="string" calcext:value-type="string">
            <text:p>0xE7F0</text:p>
          </table:table-cell>
          <table:table-cell office:value-type="string" calcext:value-type="string">
            <text:p>upsilon_dasia_iota</text:p>
          </table:table-cell>
        </table:table-row>
        <table:table-row table:style-name="ro1">
          <table:table-cell office:value-type="string" calcext:value-type="string">
            <text:p>0xE7E7</text:p>
          </table:table-cell>
          <table:table-cell office:value-type="string" calcext:value-type="string">
            <text:p>tau_omega_perispomeni_nu_2</text:p>
          </table:table-cell>
        </table:table-row>
        <table:table-row table:style-name="ro1">
          <table:table-cell office:value-type="string" calcext:value-type="string">
            <text:p>0xE7E6</text:p>
          </table:table-cell>
          <table:table-cell office:value-type="string" calcext:value-type="string">
            <text:p>tau_omega_perispomeni_nu_1</text:p>
          </table:table-cell>
        </table:table-row>
        <table:table-row table:style-name="ro1">
          <table:table-cell office:value-type="string" calcext:value-type="string">
            <text:p>0xE7E5</text:p>
          </table:table-cell>
          <table:table-cell office:value-type="string" calcext:value-type="string">
            <text:p>tau_omega_perispomeni_prosgegrammeni</text:p>
          </table:table-cell>
        </table:table-row>
        <table:table-row table:style-name="ro1">
          <table:table-cell office:value-type="string" calcext:value-type="string">
            <text:p>0xE7E4</text:p>
          </table:table-cell>
          <table:table-cell office:value-type="string" calcext:value-type="string">
            <text:p>tau_tall_tau</text:p>
          </table:table-cell>
        </table:table-row>
        <table:table-row table:style-name="ro1">
          <table:table-cell office:value-type="string" calcext:value-type="string">
            <text:p>0xE7E3</text:p>
          </table:table-cell>
          <table:table-cell office:value-type="string" calcext:value-type="string">
            <text:p>tau_rho_2</text:p>
          </table:table-cell>
        </table:table-row>
        <table:table-row table:style-name="ro1">
          <table:table-cell office:value-type="string" calcext:value-type="string">
            <text:p>0xE7E2</text:p>
          </table:table-cell>
          <table:table-cell office:value-type="string" calcext:value-type="string">
            <text:p>tau_rho_1</text:p>
          </table:table-cell>
        </table:table-row>
        <table:table-row table:style-name="ro1">
          <table:table-cell office:value-type="string" calcext:value-type="string">
            <text:p>0xE7E1</text:p>
          </table:table-cell>
          <table:table-cell office:value-type="string" calcext:value-type="string">
            <text:p>tau_omicron_upsilon_perispomeni_2</text:p>
          </table:table-cell>
        </table:table-row>
        <table:table-row table:style-name="ro1">
          <table:table-cell office:value-type="string" calcext:value-type="string">
            <text:p>0xE7E0</text:p>
          </table:table-cell>
          <table:table-cell office:value-type="string" calcext:value-type="string">
            <text:p>tau_omicron_upsilon_perispomeni_1</text:p>
          </table:table-cell>
        </table:table-row>
        <table:table-row table:style-name="ro1">
          <table:table-cell office:value-type="string" calcext:value-type="string">
            <text:p>0xE7DF</text:p>
          </table:table-cell>
          <table:table-cell office:value-type="string" calcext:value-type="string">
            <text:p>tau_tall_omicron_sigma</text:p>
          </table:table-cell>
        </table:table-row>
        <table:table-row table:style-name="ro1">
          <table:table-cell office:value-type="string" calcext:value-type="string">
            <text:p>0xE7DE</text:p>
          </table:table-cell>
          <table:table-cell office:value-type="string" calcext:value-type="string">
            <text:p>tau_omicron_varia_nu</text:p>
          </table:table-cell>
        </table:table-row>
        <table:table-row table:style-name="ro1">
          <table:table-cell office:value-type="string" calcext:value-type="string">
            <text:p>0xE7DD</text:p>
          </table:table-cell>
          <table:table-cell office:value-type="string" calcext:value-type="string">
            <text:p>tau_omicron_4_varia</text:p>
          </table:table-cell>
        </table:table-row>
        <table:table-row table:style-name="ro1">
          <table:table-cell office:value-type="string" calcext:value-type="string">
            <text:p>0xE7DC</text:p>
          </table:table-cell>
          <table:table-cell office:value-type="string" calcext:value-type="string">
            <text:p>tau_omicron_3_varia</text:p>
          </table:table-cell>
        </table:table-row>
        <table:table-row table:style-name="ro1">
          <table:table-cell office:value-type="string" calcext:value-type="string">
            <text:p>0xE7DB</text:p>
          </table:table-cell>
          <table:table-cell office:value-type="string" calcext:value-type="string">
            <text:p>tau_omicron_2_varia</text:p>
          </table:table-cell>
        </table:table-row>
        <table:table-row table:style-name="ro1">
          <table:table-cell office:value-type="string" calcext:value-type="string">
            <text:p>0xE7DA</text:p>
          </table:table-cell>
          <table:table-cell office:value-type="string" calcext:value-type="string">
            <text:p>tau_omicron_1_varia</text:p>
          </table:table-cell>
        </table:table-row>
        <table:table-row table:style-name="ro1">
          <table:table-cell office:value-type="string" calcext:value-type="string">
            <text:p>0xE7D9</text:p>
          </table:table-cell>
          <table:table-cell office:value-type="string" calcext:value-type="string">
            <text:p>tau_omicron_1</text:p>
          </table:table-cell>
        </table:table-row>
        <table:table-row table:style-name="ro1">
          <table:table-cell office:value-type="string" calcext:value-type="string">
            <text:p>0xE7D8</text:p>
          </table:table-cell>
          <table:table-cell office:value-type="string" calcext:value-type="string">
            <text:p>tau_iota</text:p>
          </table:table-cell>
        </table:table-row>
        <table:table-row table:style-name="ro1">
          <table:table-cell office:value-type="string" calcext:value-type="string">
            <text:p>0xE7D7</text:p>
          </table:table-cell>
          <table:table-cell office:value-type="string" calcext:value-type="string">
            <text:p>tau_eta_perispomeni_sigma_2</text:p>
          </table:table-cell>
        </table:table-row>
        <table:table-row table:style-name="ro1">
          <table:table-cell office:value-type="string" calcext:value-type="string">
            <text:p>0xE7D6</text:p>
          </table:table-cell>
          <table:table-cell office:value-type="string" calcext:value-type="string">
            <text:p>tau_eta_perispomeni_sigma_1</text:p>
          </table:table-cell>
        </table:table-row>
        <table:table-row table:style-name="ro1">
          <table:table-cell office:value-type="string" calcext:value-type="string">
            <text:p>0xE7D5</text:p>
          </table:table-cell>
          <table:table-cell office:value-type="string" calcext:value-type="string">
            <text:p>tau_eta_nu_varia_2</text:p>
          </table:table-cell>
        </table:table-row>
        <table:table-row table:style-name="ro1">
          <table:table-cell office:value-type="string" calcext:value-type="string">
            <text:p>0xE7D4</text:p>
          </table:table-cell>
          <table:table-cell office:value-type="string" calcext:value-type="string">
            <text:p>tau_eta_nu_varia_1</text:p>
          </table:table-cell>
        </table:table-row>
        <table:table-row table:style-name="ro1">
          <table:table-cell office:value-type="string" calcext:value-type="string">
            <text:p>0xE7D3</text:p>
          </table:table-cell>
          <table:table-cell office:value-type="string" calcext:value-type="string">
            <text:p>tau_epsilon</text:p>
          </table:table-cell>
        </table:table-row>
        <table:table-row table:style-name="ro1">
          <table:table-cell office:value-type="string" calcext:value-type="string">
            <text:p>0xE7D2</text:p>
          </table:table-cell>
          <table:table-cell office:value-type="string" calcext:value-type="string">
            <text:p>tau_alpha_iota</text:p>
          </table:table-cell>
        </table:table-row>
        <table:table-row table:style-name="ro1">
          <table:table-cell office:value-type="string" calcext:value-type="string">
            <text:p>0xE7D1</text:p>
          </table:table-cell>
          <table:table-cell office:value-type="string" calcext:value-type="string">
            <text:p>tau_psili</text:p>
          </table:table-cell>
        </table:table-row>
        <table:table-row table:style-name="ro1">
          <table:table-cell office:value-type="string" calcext:value-type="string">
            <text:p>0xE7D0</text:p>
          </table:table-cell>
          <table:table-cell office:value-type="string" calcext:value-type="string">
            <text:p>tau_tall</text:p>
          </table:table-cell>
        </table:table-row>
        <table:table-row table:style-name="ro1">
          <table:table-cell office:value-type="string" calcext:value-type="string">
            <text:p>0xE7C7</text:p>
          </table:table-cell>
          <table:table-cell office:value-type="string" calcext:value-type="string">
            <text:p>sigma_chi</text:p>
          </table:table-cell>
        </table:table-row>
        <table:table-row table:style-name="ro1">
          <table:table-cell office:value-type="string" calcext:value-type="string">
            <text:p>0xE7C6</text:p>
          </table:table-cell>
          <table:table-cell office:value-type="string" calcext:value-type="string">
            <text:p>sigma_tau_rho</text:p>
          </table:table-cell>
        </table:table-row>
        <table:table-row table:style-name="ro1">
          <table:table-cell office:value-type="string" calcext:value-type="string">
            <text:p>0xE7C5</text:p>
          </table:table-cell>
          <table:table-cell office:value-type="string" calcext:value-type="string">
            <text:p>sigma_tau</text:p>
          </table:table-cell>
        </table:table-row>
        <table:table-row table:style-name="ro1">
          <table:table-cell office:value-type="string" calcext:value-type="string">
            <text:p>0xE7C4</text:p>
          </table:table-cell>
          <table:table-cell office:value-type="string" calcext:value-type="string">
            <text:p>sigma_sigma</text:p>
          </table:table-cell>
        </table:table-row>
        <table:table-row table:style-name="ro1">
          <table:table-cell office:value-type="string" calcext:value-type="string">
            <text:p>0xE7C3</text:p>
          </table:table-cell>
          <table:table-cell office:value-type="string" calcext:value-type="string">
            <text:p>sigma_pi</text:p>
          </table:table-cell>
        </table:table-row>
        <table:table-row table:style-name="ro1">
          <table:table-cell office:value-type="string" calcext:value-type="string">
            <text:p>0xE7C2</text:p>
          </table:table-cell>
          <table:table-cell office:value-type="string" calcext:value-type="string">
            <text:p>sigma_theta_alpha_iota</text:p>
          </table:table-cell>
        </table:table-row>
        <table:table-row table:style-name="ro1">
          <table:table-cell office:value-type="string" calcext:value-type="string">
            <text:p>0xE7C1</text:p>
          </table:table-cell>
          <table:table-cell office:value-type="string" calcext:value-type="string">
            <text:p>sigma_theta</text:p>
          </table:table-cell>
        </table:table-row>
        <table:table-row table:style-name="ro1">
          <table:table-cell office:value-type="string" calcext:value-type="string">
            <text:p>0xE7C0</text:p>
          </table:table-cell>
          <table:table-cell office:value-type="string" calcext:value-type="string">
            <text:p>sigma_1</text:p>
          </table:table-cell>
        </table:table-row>
        <table:table-row table:style-name="ro1">
          <table:table-cell office:value-type="string" calcext:value-type="string">
            <text:p>0xE7A7</text:p>
          </table:table-cell>
          <table:table-cell office:value-type="string" calcext:value-type="string">
            <text:p>Pi_1</text:p>
          </table:table-cell>
        </table:table-row>
        <table:table-row table:style-name="ro1">
          <table:table-cell office:value-type="string" calcext:value-type="string">
            <text:p>0xE7A6</text:p>
          </table:table-cell>
          <table:table-cell office:value-type="string" calcext:value-type="string">
            <text:p>pi_tau</text:p>
          </table:table-cell>
        </table:table-row>
        <table:table-row table:style-name="ro1">
          <table:table-cell office:value-type="string" calcext:value-type="string">
            <text:p>0xE7A5</text:p>
          </table:table-cell>
          <table:table-cell office:value-type="string" calcext:value-type="string">
            <text:p>pi_rho</text:p>
          </table:table-cell>
        </table:table-row>
        <table:table-row table:style-name="ro1">
          <table:table-cell office:value-type="string" calcext:value-type="string">
            <text:p>0xE7A4</text:p>
          </table:table-cell>
          <table:table-cell office:value-type="string" calcext:value-type="string">
            <text:p>pi_omicron_varia</text:p>
          </table:table-cell>
        </table:table-row>
        <table:table-row table:style-name="ro1">
          <table:table-cell office:value-type="string" calcext:value-type="string">
            <text:p>0xE7A3</text:p>
          </table:table-cell>
          <table:table-cell office:value-type="string" calcext:value-type="string">
            <text:p>pi_omicron</text:p>
          </table:table-cell>
        </table:table-row>
        <table:table-row table:style-name="ro1">
          <table:table-cell office:value-type="string" calcext:value-type="string">
            <text:p>0xE7A2</text:p>
          </table:table-cell>
          <table:table-cell office:value-type="string" calcext:value-type="string">
            <text:p>pi_epsilon_rho</text:p>
          </table:table-cell>
        </table:table-row>
        <table:table-row table:style-name="ro1">
          <table:table-cell office:value-type="string" calcext:value-type="string">
            <text:p>0xE7A1</text:p>
          </table:table-cell>
          <table:table-cell office:value-type="string" calcext:value-type="string">
            <text:p>pi_alpha_rho</text:p>
          </table:table-cell>
        </table:table-row>
        <table:table-row table:style-name="ro1">
          <table:table-cell office:value-type="string" calcext:value-type="string">
            <text:p>0xE7A0</text:p>
          </table:table-cell>
          <table:table-cell office:value-type="string" calcext:value-type="string">
            <text:p>pi_1</text:p>
          </table:table-cell>
        </table:table-row>
        <table:table-row table:style-name="ro1">
          <table:table-cell office:value-type="string" calcext:value-type="string">
            <text:p>0xE796</text:p>
          </table:table-cell>
          <table:table-cell office:value-type="string" calcext:value-type="string">
            <text:p>omicron_sigma</text:p>
          </table:table-cell>
        </table:table-row>
        <table:table-row table:style-name="ro1">
          <table:table-cell office:value-type="string" calcext:value-type="string">
            <text:p>0xE795</text:p>
          </table:table-cell>
          <table:table-cell office:value-type="string" calcext:value-type="string">
            <text:p>omicron_upsilon_persipomeni</text:p>
          </table:table-cell>
        </table:table-row>
        <table:table-row table:style-name="ro1">
          <table:table-cell office:value-type="string" calcext:value-type="string">
            <text:p>0xE794</text:p>
          </table:table-cell>
          <table:table-cell office:value-type="string" calcext:value-type="string">
            <text:p>omicron_upsilon_oxia</text:p>
          </table:table-cell>
        </table:table-row>
        <table:table-row table:style-name="ro1">
          <table:table-cell office:value-type="string" calcext:value-type="string">
            <text:p>0xE793</text:p>
          </table:table-cell>
          <table:table-cell office:value-type="string" calcext:value-type="string">
            <text:p>omicron_upsilon</text:p>
          </table:table-cell>
        </table:table-row>
        <table:table-row table:style-name="ro1">
          <table:table-cell office:value-type="string" calcext:value-type="string">
            <text:p>0xE792</text:p>
          </table:table-cell>
          <table:table-cell office:value-type="string" calcext:value-type="string">
            <text:p>omicron_dasia_perispomeni</text:p>
          </table:table-cell>
        </table:table-row>
        <table:table-row table:style-name="ro1">
          <table:table-cell office:value-type="string" calcext:value-type="string">
            <text:p>0xE791</text:p>
          </table:table-cell>
          <table:table-cell office:value-type="string" calcext:value-type="string">
            <text:p>omicron_psili_perispomeni</text:p>
          </table:table-cell>
        </table:table-row>
        <table:table-row table:style-name="ro1">
          <table:table-cell office:value-type="string" calcext:value-type="string">
            <text:p>0xE790</text:p>
          </table:table-cell>
          <table:table-cell office:value-type="string" calcext:value-type="string">
            <text:p>omicron_perispomeni</text:p>
          </table:table-cell>
        </table:table-row>
        <table:table-row table:style-name="ro1">
          <table:table-cell office:value-type="string" calcext:value-type="string">
            <text:p>0xE780</text:p>
          </table:table-cell>
          <table:table-cell office:value-type="string" calcext:value-type="string">
            <text:p>xi_1</text:p>
          </table:table-cell>
        </table:table-row>
        <table:table-row table:style-name="ro1">
          <table:table-cell office:value-type="string" calcext:value-type="string">
            <text:p>0xE770</text:p>
          </table:table-cell>
          <table:table-cell office:value-type="string" calcext:value-type="string">
            <text:p>nu_final</text:p>
          </table:table-cell>
        </table:table-row>
        <table:table-row table:style-name="ro1">
          <table:table-cell office:value-type="string" calcext:value-type="string">
            <text:p>0xE765</text:p>
          </table:table-cell>
          <table:table-cell office:value-type="string" calcext:value-type="string">
            <text:p>mu_epsilon_nu_1_oxia</text:p>
          </table:table-cell>
        </table:table-row>
        <table:table-row table:style-name="ro1">
          <table:table-cell office:value-type="string" calcext:value-type="string">
            <text:p>0xE764</text:p>
          </table:table-cell>
          <table:table-cell office:value-type="string" calcext:value-type="string">
            <text:p>mu_epsilon_nu_3_varia</text:p>
          </table:table-cell>
        </table:table-row>
        <table:table-row table:style-name="ro1">
          <table:table-cell office:value-type="string" calcext:value-type="string">
            <text:p>0xE763</text:p>
          </table:table-cell>
          <table:table-cell office:value-type="string" calcext:value-type="string">
            <text:p>mu_epsilon_nu_4_varia</text:p>
          </table:table-cell>
        </table:table-row>
        <table:table-row table:style-name="ro1">
          <table:table-cell office:value-type="string" calcext:value-type="string">
            <text:p>0xE762</text:p>
          </table:table-cell>
          <table:table-cell office:value-type="string" calcext:value-type="string">
            <text:p>mu_epsilon_nu_3</text:p>
          </table:table-cell>
        </table:table-row>
        <table:table-row table:style-name="ro1">
          <table:table-cell office:value-type="string" calcext:value-type="string">
            <text:p>0xE761</text:p>
          </table:table-cell>
          <table:table-cell office:value-type="string" calcext:value-type="string">
            <text:p>mu_epsilon_nu_2</text:p>
          </table:table-cell>
        </table:table-row>
        <table:table-row table:style-name="ro1">
          <table:table-cell office:value-type="string" calcext:value-type="string">
            <text:p>0xE760</text:p>
          </table:table-cell>
          <table:table-cell office:value-type="string" calcext:value-type="string">
            <text:p>mu_epsilon_nu_1</text:p>
          </table:table-cell>
        </table:table-row>
        <table:table-row table:style-name="ro1">
          <table:table-cell office:value-type="string" calcext:value-type="string">
            <text:p>0xE750</text:p>
          </table:table-cell>
          <table:table-cell office:value-type="string" calcext:value-type="string">
            <text:p>lambda_lambda</text:p>
          </table:table-cell>
        </table:table-row>
        <table:table-row table:style-name="ro1">
          <table:table-cell office:value-type="string" calcext:value-type="string">
            <text:p>0xE744</text:p>
          </table:table-cell>
          <table:table-cell office:value-type="string" calcext:value-type="string">
            <text:p>kappa_alpha_tau_alpha</text:p>
          </table:table-cell>
        </table:table-row>
        <table:table-row table:style-name="ro1">
          <table:table-cell office:value-type="string" calcext:value-type="string">
            <text:p>0xE743</text:p>
          </table:table-cell>
          <table:table-cell office:value-type="string" calcext:value-type="string">
            <text:p>kappa_alpha_iota_4_varia</text:p>
          </table:table-cell>
        </table:table-row>
        <table:table-row table:style-name="ro1">
          <table:table-cell office:value-type="string" calcext:value-type="string">
            <text:p>0xE742</text:p>
          </table:table-cell>
          <table:table-cell office:value-type="string" calcext:value-type="string">
            <text:p>kappa_alpha_iota_3_varia</text:p>
          </table:table-cell>
        </table:table-row>
        <table:table-row table:style-name="ro1">
          <table:table-cell office:value-type="string" calcext:value-type="string">
            <text:p>0xE741</text:p>
          </table:table-cell>
          <table:table-cell office:value-type="string" calcext:value-type="string">
            <text:p>kappa_alpha_iota_2_varia</text:p>
          </table:table-cell>
        </table:table-row>
        <table:table-row table:style-name="ro1">
          <table:table-cell office:value-type="string" calcext:value-type="string">
            <text:p>0xE740</text:p>
          </table:table-cell>
          <table:table-cell office:value-type="string" calcext:value-type="string">
            <text:p>kappa_alpha_iota_1_varia</text:p>
          </table:table-cell>
        </table:table-row>
        <table:table-row table:style-name="ro1">
          <table:table-cell office:value-type="string" calcext:value-type="string">
            <text:p>0xE722</text:p>
          </table:table-cell>
          <table:table-cell office:value-type="string" calcext:value-type="string">
            <text:p>phi_iota_oxia</text:p>
          </table:table-cell>
        </table:table-row>
        <table:table-row table:style-name="ro1">
          <table:table-cell office:value-type="string" calcext:value-type="string">
            <text:p>0xE721</text:p>
          </table:table-cell>
          <table:table-cell office:value-type="string" calcext:value-type="string">
            <text:p>phi_iota</text:p>
          </table:table-cell>
        </table:table-row>
        <table:table-row table:style-name="ro1">
          <table:table-cell office:value-type="string" calcext:value-type="string">
            <text:p>0xE720</text:p>
          </table:table-cell>
          <table:table-cell office:value-type="string" calcext:value-type="string">
            <text:p>theta_1</text:p>
          </table:table-cell>
        </table:table-row>
        <table:table-row table:style-name="ro1">
          <table:table-cell office:value-type="string" calcext:value-type="string">
            <text:p>0xE716</text:p>
          </table:table-cell>
          <table:table-cell office:value-type="string" calcext:value-type="string">
            <text:p>eta_nu_varia_2</text:p>
          </table:table-cell>
        </table:table-row>
        <table:table-row table:style-name="ro1">
          <table:table-cell office:value-type="string" calcext:value-type="string">
            <text:p>0xE715</text:p>
          </table:table-cell>
          <table:table-cell office:value-type="string" calcext:value-type="string">
            <text:p>eta_nu_perispomeni</text:p>
          </table:table-cell>
        </table:table-row>
        <table:table-row table:style-name="ro1">
          <table:table-cell office:value-type="string" calcext:value-type="string">
            <text:p>0xE714</text:p>
          </table:table-cell>
          <table:table-cell office:value-type="string" calcext:value-type="string">
            <text:p>eta_nu_varia</text:p>
          </table:table-cell>
        </table:table-row>
        <table:table-row table:style-name="ro1">
          <table:table-cell office:value-type="string" calcext:value-type="string">
            <text:p>0xE713</text:p>
          </table:table-cell>
          <table:table-cell office:value-type="string" calcext:value-type="string">
            <text:p>eta_nu_oxia</text:p>
          </table:table-cell>
        </table:table-row>
        <table:table-row table:style-name="ro1">
          <table:table-cell office:value-type="string" calcext:value-type="string">
            <text:p>0xE712</text:p>
          </table:table-cell>
          <table:table-cell office:value-type="string" calcext:value-type="string">
            <text:p>eta_nu</text:p>
          </table:table-cell>
        </table:table-row>
        <table:table-row table:style-name="ro1">
          <table:table-cell office:value-type="string" calcext:value-type="string">
            <text:p>0xE711</text:p>
          </table:table-cell>
          <table:table-cell office:value-type="string" calcext:value-type="string">
            <text:p>eta_1_perispomeni</text:p>
          </table:table-cell>
        </table:table-row>
        <table:table-row table:style-name="ro1">
          <table:table-cell office:value-type="string" calcext:value-type="string">
            <text:p>0xE710</text:p>
          </table:table-cell>
          <table:table-cell office:value-type="string" calcext:value-type="string">
            <text:p>eta_1</text:p>
          </table:table-cell>
        </table:table-row>
        <table:table-row table:style-name="ro1">
          <table:table-cell office:value-type="string" calcext:value-type="string">
            <text:p>0xE701</text:p>
          </table:table-cell>
          <table:table-cell office:value-type="string" calcext:value-type="string">
            <text:p>zeta_2</text:p>
          </table:table-cell>
        </table:table-row>
        <table:table-row table:style-name="ro1">
          <table:table-cell office:value-type="string" calcext:value-type="string">
            <text:p>0xE700</text:p>
          </table:table-cell>
          <table:table-cell office:value-type="string" calcext:value-type="string">
            <text:p>zeta_1</text:p>
          </table:table-cell>
        </table:table-row>
        <table:table-row table:style-name="ro1">
          <table:table-cell office:value-type="string" calcext:value-type="string">
            <text:p>0xE6FE</text:p>
          </table:table-cell>
          <table:table-cell office:value-type="string" calcext:value-type="string">
            <text:p>epsilon_upsilon</text:p>
          </table:table-cell>
        </table:table-row>
        <table:table-row table:style-name="ro1">
          <table:table-cell office:value-type="string" calcext:value-type="string">
            <text:p>0xE6FD</text:p>
          </table:table-cell>
          <table:table-cell office:value-type="string" calcext:value-type="string">
            <text:p>epsilon_psili_stigma_iota_varia</text:p>
          </table:table-cell>
        </table:table-row>
        <table:table-row table:style-name="ro1">
          <table:table-cell office:value-type="string" calcext:value-type="string">
            <text:p>0xE6FC</text:p>
          </table:table-cell>
          <table:table-cell office:value-type="string" calcext:value-type="string">
            <text:p>epsilon_psili_stigma_iota</text:p>
          </table:table-cell>
        </table:table-row>
        <table:table-row table:style-name="ro1">
          <table:table-cell office:value-type="string" calcext:value-type="string">
            <text:p>0xE6FB</text:p>
          </table:table-cell>
          <table:table-cell office:value-type="string" calcext:value-type="string">
            <text:p>epsilon_stigma_iota</text:p>
          </table:table-cell>
        </table:table-row>
        <table:table-row table:style-name="ro1">
          <table:table-cell office:value-type="string" calcext:value-type="string">
            <text:p>0xE6FA</text:p>
          </table:table-cell>
          <table:table-cell office:value-type="string" calcext:value-type="string">
            <text:p>epsilon_rho_2</text:p>
          </table:table-cell>
        </table:table-row>
        <table:table-row table:style-name="ro1">
          <table:table-cell office:value-type="string" calcext:value-type="string">
            <text:p>0xE6F9</text:p>
          </table:table-cell>
          <table:table-cell office:value-type="string" calcext:value-type="string">
            <text:p>epsilon_rho_1</text:p>
          </table:table-cell>
        </table:table-row>
        <table:table-row table:style-name="ro1">
          <table:table-cell office:value-type="string" calcext:value-type="string">
            <text:p>0xE6F8</text:p>
          </table:table-cell>
          <table:table-cell office:value-type="string" calcext:value-type="string">
            <text:p>epsilon_psili_xi</text:p>
          </table:table-cell>
        </table:table-row>
        <table:table-row table:style-name="ro1">
          <table:table-cell office:value-type="string" calcext:value-type="string">
            <text:p>0xE6F7</text:p>
          </table:table-cell>
          <table:table-cell office:value-type="string" calcext:value-type="string">
            <text:p>epsilon_psili_nu</text:p>
          </table:table-cell>
        </table:table-row>
        <table:table-row table:style-name="ro1">
          <table:table-cell office:value-type="string" calcext:value-type="string">
            <text:p>0xE6F6</text:p>
          </table:table-cell>
          <table:table-cell office:value-type="string" calcext:value-type="string">
            <text:p>epsilon_iota_1_perispomeni_prosgegrammeni</text:p>
          </table:table-cell>
        </table:table-row>
        <table:table-row table:style-name="ro1">
          <table:table-cell office:value-type="string" calcext:value-type="string">
            <text:p>0xE6F5</text:p>
          </table:table-cell>
          <table:table-cell office:value-type="string" calcext:value-type="string">
            <text:p>epsion_iota_2_perispomeni</text:p>
          </table:table-cell>
        </table:table-row>
        <table:table-row table:style-name="ro1">
          <table:table-cell office:value-type="string" calcext:value-type="string">
            <text:p>0xE6F4</text:p>
          </table:table-cell>
          <table:table-cell office:value-type="string" calcext:value-type="string">
            <text:p>epsilon_iota_1_perispomeni</text:p>
          </table:table-cell>
        </table:table-row>
        <table:table-row table:style-name="ro1">
          <table:table-cell office:value-type="string" calcext:value-type="string">
            <text:p>0xE6F3</text:p>
          </table:table-cell>
          <table:table-cell office:value-type="string" calcext:value-type="string">
            <text:p>epsilon_iota_2</text:p>
          </table:table-cell>
        </table:table-row>
        <table:table-row table:style-name="ro1">
          <table:table-cell office:value-type="string" calcext:value-type="string">
            <text:p>0xE6F2</text:p>
          </table:table-cell>
          <table:table-cell office:value-type="string" calcext:value-type="string">
            <text:p>epsilon_iota_1</text:p>
          </table:table-cell>
        </table:table-row>
        <table:table-row table:style-name="ro1">
          <table:table-cell office:value-type="string" calcext:value-type="string">
            <text:p>0xE6F1</text:p>
          </table:table-cell>
          <table:table-cell office:value-type="string" calcext:value-type="string">
            <text:p>epsilon_dasia_perispomeni</text:p>
          </table:table-cell>
        </table:table-row>
        <table:table-row table:style-name="ro1">
          <table:table-cell office:value-type="string" calcext:value-type="string">
            <text:p>0xE6F0</text:p>
          </table:table-cell>
          <table:table-cell office:value-type="string" calcext:value-type="string">
            <text:p>epsilon_psili_perispomeni</text:p>
          </table:table-cell>
        </table:table-row>
        <table:table-row table:style-name="ro1">
          <table:table-cell office:value-type="string" calcext:value-type="string">
            <text:p>0xE6E3</text:p>
          </table:table-cell>
          <table:table-cell office:value-type="string" calcext:value-type="string">
            <text:p>delta_epsilon_varia_2</text:p>
          </table:table-cell>
        </table:table-row>
        <table:table-row table:style-name="ro1">
          <table:table-cell office:value-type="string" calcext:value-type="string">
            <text:p>0xE6E2</text:p>
          </table:table-cell>
          <table:table-cell office:value-type="string" calcext:value-type="string">
            <text:p>delta_epsilon_varia_1</text:p>
          </table:table-cell>
        </table:table-row>
        <table:table-row table:style-name="ro1">
          <table:table-cell office:value-type="string" calcext:value-type="string">
            <text:p>0xE6E1</text:p>
          </table:table-cell>
          <table:table-cell office:value-type="string" calcext:value-type="string">
            <text:p>delta_epsilon</text:p>
          </table:table-cell>
        </table:table-row>
        <table:table-row table:style-name="ro1">
          <table:table-cell office:value-type="string" calcext:value-type="string">
            <text:p>0xE6E0</text:p>
          </table:table-cell>
          <table:table-cell office:value-type="string" calcext:value-type="string">
            <text:p>delta_curly</text:p>
          </table:table-cell>
        </table:table-row>
        <table:table-row table:style-name="ro1">
          <table:table-cell office:value-type="string" calcext:value-type="string">
            <text:p>0xE6DA</text:p>
          </table:table-cell>
          <table:table-cell office:value-type="string" calcext:value-type="string">
            <text:p>gamma_rho</text:p>
          </table:table-cell>
        </table:table-row>
        <table:table-row table:style-name="ro1">
          <table:table-cell office:value-type="string" calcext:value-type="string">
            <text:p>0xE6D9</text:p>
          </table:table-cell>
          <table:table-cell office:value-type="string" calcext:value-type="string">
            <text:p>gamma_omicron</text:p>
          </table:table-cell>
        </table:table-row>
        <table:table-row table:style-name="ro1">
          <table:table-cell office:value-type="string" calcext:value-type="string">
            <text:p>0xE6D8</text:p>
          </table:table-cell>
          <table:table-cell office:value-type="string" calcext:value-type="string">
            <text:p>gamma_epsilon_nu_oxia</text:p>
          </table:table-cell>
        </table:table-row>
        <table:table-row table:style-name="ro1">
          <table:table-cell office:value-type="string" calcext:value-type="string">
            <text:p>0xE6D7</text:p>
          </table:table-cell>
          <table:table-cell office:value-type="string" calcext:value-type="string">
            <text:p>gamma_gamma</text:p>
          </table:table-cell>
        </table:table-row>
        <table:table-row table:style-name="ro1">
          <table:table-cell office:value-type="string" calcext:value-type="string">
            <text:p>0xE6D6</text:p>
          </table:table-cell>
          <table:table-cell office:value-type="string" calcext:value-type="string">
            <text:p>gamma_alpha_varia_rho_5</text:p>
          </table:table-cell>
        </table:table-row>
        <table:table-row table:style-name="ro1">
          <table:table-cell office:value-type="string" calcext:value-type="string">
            <text:p>0xE6D5</text:p>
          </table:table-cell>
          <table:table-cell office:value-type="string" calcext:value-type="string">
            <text:p>gamma_alpha_varia_rho_4</text:p>
          </table:table-cell>
        </table:table-row>
        <table:table-row table:style-name="ro1">
          <table:table-cell office:value-type="string" calcext:value-type="string">
            <text:p>0xE6D4</text:p>
          </table:table-cell>
          <table:table-cell office:value-type="string" calcext:value-type="string">
            <text:p>gamma_alpha_varia_rho_3</text:p>
          </table:table-cell>
        </table:table-row>
        <table:table-row table:style-name="ro1">
          <table:table-cell office:value-type="string" calcext:value-type="string">
            <text:p>0xE6D3</text:p>
          </table:table-cell>
          <table:table-cell office:value-type="string" calcext:value-type="string">
            <text:p>gamma_alpha_varia_rho_2</text:p>
          </table:table-cell>
        </table:table-row>
        <table:table-row table:style-name="ro1">
          <table:table-cell office:value-type="string" calcext:value-type="string">
            <text:p>0xE6D2</text:p>
          </table:table-cell>
          <table:table-cell office:value-type="string" calcext:value-type="string">
            <text:p>gamma_alpha_varia_rho_1</text:p>
          </table:table-cell>
        </table:table-row>
        <table:table-row table:style-name="ro1">
          <table:table-cell office:value-type="string" calcext:value-type="string">
            <text:p>0xE6D1</text:p>
          </table:table-cell>
          <table:table-cell office:value-type="string" calcext:value-type="string">
            <text:p>gamma_tall</text:p>
          </table:table-cell>
        </table:table-row>
        <table:table-row table:style-name="ro1">
          <table:table-cell office:value-type="string" calcext:value-type="string">
            <text:p>0xE6D0</text:p>
          </table:table-cell>
          <table:table-cell office:value-type="string" calcext:value-type="string">
            <text:p>gamma_short</text:p>
          </table:table-cell>
        </table:table-row>
        <table:table-row table:style-name="ro1">
          <table:table-cell office:value-type="string" calcext:value-type="string">
            <text:p>0xE6C0</text:p>
          </table:table-cell>
          <table:table-cell office:value-type="string" calcext:value-type="string">
            <text:p>beta_curly</text:p>
          </table:table-cell>
        </table:table-row>
        <table:table-row table:style-name="ro1">
          <table:table-cell office:value-type="string" calcext:value-type="string">
            <text:p>0xE6B8</text:p>
          </table:table-cell>
          <table:table-cell office:value-type="string" calcext:value-type="string">
            <text:p>alpha_psili_sigma_tau</text:p>
          </table:table-cell>
        </table:table-row>
        <table:table-row table:style-name="ro1">
          <table:table-cell office:value-type="string" calcext:value-type="string">
            <text:p>0xE6B7</text:p>
          </table:table-cell>
          <table:table-cell office:value-type="string" calcext:value-type="string">
            <text:p>alpha_sigma_tau</text:p>
          </table:table-cell>
        </table:table-row>
        <table:table-row table:style-name="ro1">
          <table:table-cell office:value-type="string" calcext:value-type="string">
            <text:p>0xE6B6</text:p>
          </table:table-cell>
          <table:table-cell office:value-type="string" calcext:value-type="string">
            <text:p>alpha_nu</text:p>
          </table:table-cell>
        </table:table-row>
        <table:table-row table:style-name="ro1">
          <table:table-cell office:value-type="string" calcext:value-type="string">
            <text:p>0xE6B5</text:p>
          </table:table-cell>
          <table:table-cell office:value-type="string" calcext:value-type="string">
            <text:p>alpha_iota_perispomeni</text:p>
          </table:table-cell>
        </table:table-row>
        <table:table-row table:style-name="ro1">
          <table:table-cell office:value-type="string" calcext:value-type="string">
            <text:p>0xE6B4</text:p>
          </table:table-cell>
          <table:table-cell office:value-type="string" calcext:value-type="string">
            <text:p>alpha_iota_psili_oxia</text:p>
          </table:table-cell>
        </table:table-row>
        <table:table-row table:style-name="ro1">
          <table:table-cell office:value-type="string" calcext:value-type="string">
            <text:p>0xE6B3</text:p>
          </table:table-cell>
          <table:table-cell office:value-type="string" calcext:value-type="string">
            <text:p>alpha_iota_oxia</text:p>
          </table:table-cell>
        </table:table-row>
        <table:table-row table:style-name="ro1">
          <table:table-cell office:value-type="string" calcext:value-type="string">
            <text:p>0xE6B2</text:p>
          </table:table-cell>
          <table:table-cell office:value-type="string" calcext:value-type="string">
            <text:p>alpha_iota_psili</text:p>
          </table:table-cell>
        </table:table-row>
        <table:table-row table:style-name="ro1">
          <table:table-cell office:value-type="string" calcext:value-type="string">
            <text:p>0xE6B1</text:p>
          </table:table-cell>
          <table:table-cell office:value-type="string" calcext:value-type="string">
            <text:p>alpha_iota</text:p>
          </table:table-cell>
        </table:table-row>
        <table:table-row table:style-name="ro1">
          <table:table-cell office:value-type="string" calcext:value-type="string">
            <text:p>0xE6B0</text:p>
          </table:table-cell>
          <table:table-cell office:value-type="string" calcext:value-type="string">
            <text:p>alpha_curly</text:p>
          </table:table-cell>
        </table:table-row>
      </table:table>
      <table:table table:name="FROMVS_Names" table:style-name="ta1"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0xE86F</text:p>
          </table:table-cell>
          <table:table-cell office:value-type="string" calcext:value-type="string">
            <text:p>omega_perispomeni_nu</text:p>
          </table:table-cell>
        </table:table-row>
        <table:table-row table:style-name="ro1">
          <table:table-cell office:value-type="string" calcext:value-type="string">
            <text:p>0xE86E</text:p>
          </table:table-cell>
          <table:table-cell office:value-type="string" calcext:value-type="string">
            <text:p>omega_nu_2</text:p>
          </table:table-cell>
        </table:table-row>
        <table:table-row table:style-name="ro1">
          <table:table-cell office:value-type="string" calcext:value-type="string">
            <text:p>0xE86D</text:p>
          </table:table-cell>
          <table:table-cell office:value-type="string" calcext:value-type="string">
            <text:p>omega_nu</text:p>
          </table:table-cell>
        </table:table-row>
        <table:table-row table:style-name="ro1">
          <table:table-cell office:value-type="string" calcext:value-type="string">
            <text:p>0xE86C</text:p>
          </table:table-cell>
          <table:table-cell office:value-type="string" calcext:value-type="string">
            <text:p>omicron_sigma_2</text:p>
          </table:table-cell>
        </table:table-row>
        <table:table-row table:style-name="ro1">
          <table:table-cell office:value-type="string" calcext:value-type="string">
            <text:p>0xE86B</text:p>
          </table:table-cell>
          <table:table-cell office:value-type="string" calcext:value-type="string">
            <text:p>omicron_iota_perispomeni_sigma</text:p>
          </table:table-cell>
        </table:table-row>
        <table:table-row table:style-name="ro1">
          <table:table-cell office:value-type="string" calcext:value-type="string">
            <text:p>0xE86A</text:p>
          </table:table-cell>
          <table:table-cell office:value-type="string" calcext:value-type="string">
            <text:p>iota_sigma</text:p>
          </table:table-cell>
        </table:table-row>
        <table:table-row table:style-name="ro1">
          <table:table-cell office:value-type="string" calcext:value-type="string">
            <text:p>0xE869</text:p>
          </table:table-cell>
          <table:table-cell office:value-type="string" calcext:value-type="string">
            <text:p>iota_perispomeni_nu</text:p>
          </table:table-cell>
        </table:table-row>
        <table:table-row table:style-name="ro1">
          <table:table-cell office:value-type="string" calcext:value-type="string">
            <text:p>0xE868</text:p>
          </table:table-cell>
          <table:table-cell office:value-type="string" calcext:value-type="string">
            <text:p>iota_nu</text:p>
          </table:table-cell>
        </table:table-row>
        <table:table-row table:style-name="ro1">
          <table:table-cell office:value-type="string" calcext:value-type="string">
            <text:p>0xE867</text:p>
          </table:table-cell>
          <table:table-cell office:value-type="string" calcext:value-type="string">
            <text:p>epsilon_nu_2</text:p>
          </table:table-cell>
        </table:table-row>
        <table:table-row table:style-name="ro1">
          <table:table-cell office:value-type="string" calcext:value-type="string">
            <text:p>0xE866</text:p>
          </table:table-cell>
          <table:table-cell office:value-type="string" calcext:value-type="string">
            <text:p>epsilon_nu</text:p>
          </table:table-cell>
        </table:table-row>
        <table:table-row table:style-name="ro1">
          <table:table-cell office:value-type="string" calcext:value-type="string">
            <text:p>0xE865</text:p>
          </table:table-cell>
          <table:table-cell office:value-type="string" calcext:value-type="string">
            <text:p>epsilon_iota_sigma</text:p>
          </table:table-cell>
        </table:table-row>
        <table:table-row table:style-name="ro1">
          <table:table-cell office:value-type="string" calcext:value-type="string">
            <text:p>0xE864</text:p>
          </table:table-cell>
          <table:table-cell office:value-type="string" calcext:value-type="string">
            <text:p>alpha_perispomeni_sigma</text:p>
          </table:table-cell>
        </table:table-row>
        <table:table-row table:style-name="ro1">
          <table:table-cell office:value-type="string" calcext:value-type="string">
            <text:p>0xE863</text:p>
          </table:table-cell>
          <table:table-cell office:value-type="string" calcext:value-type="string">
            <text:p>alpha_sigma_2</text:p>
          </table:table-cell>
        </table:table-row>
        <table:table-row table:style-name="ro1">
          <table:table-cell office:value-type="string" calcext:value-type="string">
            <text:p>0xE862</text:p>
          </table:table-cell>
          <table:table-cell office:value-type="string" calcext:value-type="string">
            <text:p>alpha_iota_perispomeni_sigma</text:p>
          </table:table-cell>
        </table:table-row>
        <table:table-row table:style-name="ro1">
          <table:table-cell office:value-type="string" calcext:value-type="string">
            <text:p>0xE861</text:p>
          </table:table-cell>
          <table:table-cell office:value-type="string" calcext:value-type="string">
            <text:p>alpha_nu_2</text:p>
          </table:table-cell>
        </table:table-row>
        <table:table-row table:style-name="ro1">
          <table:table-cell office:value-type="string" calcext:value-type="string">
            <text:p>0xE860</text:p>
          </table:table-cell>
          <table:table-cell office:value-type="string" calcext:value-type="string">
            <text:p>alpha_nu</text:p>
          </table:table-cell>
        </table:table-row>
        <table:table-row table:style-name="ro1">
          <table:table-cell office:value-type="string" calcext:value-type="string">
            <text:p>0xE841</text:p>
          </table:table-cell>
          <table:table-cell office:value-type="string" calcext:value-type="string">
            <text:p>slant_2</text:p>
          </table:table-cell>
        </table:table-row>
        <table:table-row table:style-name="ro1">
          <table:table-cell office:value-type="string" calcext:value-type="string">
            <text:p>0xE840</text:p>
          </table:table-cell>
          <table:table-cell office:value-type="string" calcext:value-type="string">
            <text:p>slant_1</text:p>
          </table:table-cell>
        </table:table-row>
        <table:table-row table:style-name="ro1">
          <table:table-cell office:value-type="string" calcext:value-type="string">
            <text:p>0xE820</text:p>
          </table:table-cell>
          <table:table-cell office:value-type="string" calcext:value-type="string">
            <text:p>omega_perispomeni_sigma</text:p>
          </table:table-cell>
        </table:table-row>
        <table:table-row table:style-name="ro1">
          <table:table-cell office:value-type="string" calcext:value-type="string">
            <text:p>0xE811</text:p>
          </table:table-cell>
          <table:table-cell office:value-type="string" calcext:value-type="string">
            <text:p>chi_rho</text:p>
          </table:table-cell>
        </table:table-row>
        <table:table-row table:style-name="ro1">
          <table:table-cell office:value-type="string" calcext:value-type="string">
            <text:p>0xE810</text:p>
          </table:table-cell>
          <table:table-cell office:value-type="string" calcext:value-type="string">
            <text:p>chi_psili</text:p>
          </table:table-cell>
        </table:table-row>
        <table:table-row table:style-name="ro1">
          <table:table-cell office:value-type="string" calcext:value-type="string">
            <text:p>0xE7FC</text:p>
          </table:table-cell>
          <table:table-cell office:value-type="string" calcext:value-type="string">
            <text:p>upsilon_psili_perispomeni_nu</text:p>
          </table:table-cell>
        </table:table-row>
        <table:table-row table:style-name="ro1">
          <table:table-cell office:value-type="string" calcext:value-type="string">
            <text:p>0xE7FB</text:p>
          </table:table-cell>
          <table:table-cell office:value-type="string" calcext:value-type="string">
            <text:p>upsilon_perispomeni</text:p>
          </table:table-cell>
        </table:table-row>
        <table:table-row table:style-name="ro1">
          <table:table-cell office:value-type="string" calcext:value-type="string">
            <text:p>0xE7FA</text:p>
          </table:table-cell>
          <table:table-cell office:value-type="string" calcext:value-type="string">
            <text:p>upsilon_varia_nu</text:p>
          </table:table-cell>
        </table:table-row>
        <table:table-row table:style-name="ro1">
          <table:table-cell office:value-type="string" calcext:value-type="string">
            <text:p>0xE7F9</text:p>
          </table:table-cell>
          <table:table-cell office:value-type="string" calcext:value-type="string">
            <text:p>upsilon_oxia_nu</text:p>
          </table:table-cell>
        </table:table-row>
        <table:table-row table:style-name="ro1">
          <table:table-cell office:value-type="string" calcext:value-type="string">
            <text:p>0xE7F8</text:p>
          </table:table-cell>
          <table:table-cell office:value-type="string" calcext:value-type="string">
            <text:p>upsilon_nu</text:p>
          </table:table-cell>
        </table:table-row>
        <table:table-row table:style-name="ro1">
          <table:table-cell office:value-type="string" calcext:value-type="string">
            <text:p>0xE7F2</text:p>
          </table:table-cell>
          <table:table-cell office:value-type="string" calcext:value-type="string">
            <text:p>upsilon_perispomeni</text:p>
          </table:table-cell>
        </table:table-row>
        <table:table-row table:style-name="ro1">
          <table:table-cell office:value-type="string" calcext:value-type="string">
            <text:p>0xE7F1</text:p>
          </table:table-cell>
          <table:table-cell office:value-type="string" calcext:value-type="string">
            <text:p>upsilon_tonos</text:p>
          </table:table-cell>
        </table:table-row>
        <table:table-row table:style-name="ro1">
          <table:table-cell office:value-type="string" calcext:value-type="string">
            <text:p>0xE7F0</text:p>
          </table:table-cell>
          <table:table-cell office:value-type="string" calcext:value-type="string">
            <text:p>upsilon_dasia_iota</text:p>
          </table:table-cell>
        </table:table-row>
        <table:table-row table:style-name="ro1">
          <table:table-cell office:value-type="string" calcext:value-type="string">
            <text:p>0xE7EA</text:p>
          </table:table-cell>
          <table:table-cell office:value-type="string" calcext:value-type="string">
            <text:p>tau_omega_perispomeni_nu_2</text:p>
          </table:table-cell>
        </table:table-row>
        <table:table-row table:style-name="ro1">
          <table:table-cell office:value-type="string" calcext:value-type="string">
            <text:p>0xE7E9</text:p>
          </table:table-cell>
          <table:table-cell office:value-type="string" calcext:value-type="string">
            <text:p>tau_omega_perispomeni_nu</text:p>
          </table:table-cell>
        </table:table-row>
        <table:table-row table:style-name="ro1">
          <table:table-cell office:value-type="string" calcext:value-type="string">
            <text:p>0xE7E8</text:p>
          </table:table-cell>
          <table:table-cell office:value-type="string" calcext:value-type="string">
            <text:p>tau_omega_perispomeni_prosgegrammeni</text:p>
          </table:table-cell>
        </table:table-row>
        <table:table-row table:style-name="ro1">
          <table:table-cell office:value-type="string" calcext:value-type="string">
            <text:p>0xE7E7</text:p>
          </table:table-cell>
          <table:table-cell office:value-type="string" calcext:value-type="string">
            <text:p>tau_tall_tau</text:p>
          </table:table-cell>
        </table:table-row>
        <table:table-row table:style-name="ro1">
          <table:table-cell office:value-type="string" calcext:value-type="string">
            <text:p>0xE7E6</text:p>
          </table:table-cell>
          <table:table-cell office:value-type="string" calcext:value-type="string">
            <text:p>tau_rho_2</text:p>
          </table:table-cell>
        </table:table-row>
        <table:table-row table:style-name="ro1">
          <table:table-cell office:value-type="string" calcext:value-type="string">
            <text:p>0xE7E5</text:p>
          </table:table-cell>
          <table:table-cell office:value-type="string" calcext:value-type="string">
            <text:p>tau_rho</text:p>
          </table:table-cell>
        </table:table-row>
        <table:table-row table:style-name="ro1">
          <table:table-cell office:value-type="string" calcext:value-type="string">
            <text:p>0xE7E4</text:p>
          </table:table-cell>
          <table:table-cell office:value-type="string" calcext:value-type="string">
            <text:p>tau_omicron_upsilon_perispomeni_2</text:p>
          </table:table-cell>
        </table:table-row>
        <table:table-row table:style-name="ro1">
          <table:table-cell office:value-type="string" calcext:value-type="string">
            <text:p>0xE7E3</text:p>
          </table:table-cell>
          <table:table-cell office:value-type="string" calcext:value-type="string">
            <text:p>tau_omicron_upsilon_perispomeni</text:p>
          </table:table-cell>
        </table:table-row>
        <table:table-row table:style-name="ro1">
          <table:table-cell office:value-type="string" calcext:value-type="string">
            <text:p>0xE7E2</text:p>
          </table:table-cell>
          <table:table-cell office:value-type="string" calcext:value-type="string">
            <text:p>tau_tall_omicron_sigma</text:p>
          </table:table-cell>
        </table:table-row>
        <table:table-row table:style-name="ro1">
          <table:table-cell office:value-type="string" calcext:value-type="string">
            <text:p>0xE7E1</text:p>
          </table:table-cell>
          <table:table-cell office:value-type="string" calcext:value-type="string">
            <text:p>tau_omicron_varia_nu</text:p>
          </table:table-cell>
        </table:table-row>
        <table:table-row table:style-name="ro1">
          <table:table-cell office:value-type="string" calcext:value-type="string">
            <text:p>0xE7E0</text:p>
          </table:table-cell>
          <table:table-cell office:value-type="string" calcext:value-type="string">
            <text:p>tau_omicron_varia_4</text:p>
          </table:table-cell>
        </table:table-row>
        <table:table-row table:style-name="ro1">
          <table:table-cell office:value-type="string" calcext:value-type="string">
            <text:p>0xE7DF</text:p>
          </table:table-cell>
          <table:table-cell office:value-type="string" calcext:value-type="string">
            <text:p>tau_omicron_varia_3</text:p>
          </table:table-cell>
        </table:table-row>
        <table:table-row table:style-name="ro1">
          <table:table-cell office:value-type="string" calcext:value-type="string">
            <text:p>0xE7DE</text:p>
          </table:table-cell>
          <table:table-cell office:value-type="string" calcext:value-type="string">
            <text:p>tau_omicron_varia_2</text:p>
          </table:table-cell>
        </table:table-row>
        <table:table-row table:style-name="ro1">
          <table:table-cell office:value-type="string" calcext:value-type="string">
            <text:p>0xE7DD</text:p>
          </table:table-cell>
          <table:table-cell office:value-type="string" calcext:value-type="string">
            <text:p>tau_omicron_varia</text:p>
          </table:table-cell>
        </table:table-row>
        <table:table-row table:style-name="ro1">
          <table:table-cell office:value-type="string" calcext:value-type="string">
            <text:p>0xE7DC</text:p>
          </table:table-cell>
          <table:table-cell office:value-type="string" calcext:value-type="string">
            <text:p>tau_omicron_2</text:p>
          </table:table-cell>
        </table:table-row>
        <table:table-row table:style-name="ro1">
          <table:table-cell office:value-type="string" calcext:value-type="string">
            <text:p>0xE7DB</text:p>
          </table:table-cell>
          <table:table-cell office:value-type="string" calcext:value-type="string">
            <text:p>tau_omicron</text:p>
          </table:table-cell>
        </table:table-row>
        <table:table-row table:style-name="ro1">
          <table:table-cell office:value-type="string" calcext:value-type="string">
            <text:p>0xE7DA</text:p>
          </table:table-cell>
          <table:table-cell office:value-type="string" calcext:value-type="string">
            <text:p>tau_iota</text:p>
          </table:table-cell>
        </table:table-row>
        <table:table-row table:style-name="ro1">
          <table:table-cell office:value-type="string" calcext:value-type="string">
            <text:p>0xE7D9</text:p>
          </table:table-cell>
          <table:table-cell office:value-type="string" calcext:value-type="string">
            <text:p>tau_eta_perispomeni_sigma_2</text:p>
          </table:table-cell>
        </table:table-row>
        <table:table-row table:style-name="ro1">
          <table:table-cell office:value-type="string" calcext:value-type="string">
            <text:p>0xE7D8</text:p>
          </table:table-cell>
          <table:table-cell office:value-type="string" calcext:value-type="string">
            <text:p>tau_eta_perispomeni_sigma</text:p>
          </table:table-cell>
        </table:table-row>
        <table:table-row table:style-name="ro1">
          <table:table-cell office:value-type="string" calcext:value-type="string">
            <text:p>0xE7D7</text:p>
          </table:table-cell>
          <table:table-cell office:value-type="string" calcext:value-type="string">
            <text:p>tau_eta_varia2_nu</text:p>
          </table:table-cell>
        </table:table-row>
        <table:table-row table:style-name="ro1">
          <table:table-cell office:value-type="string" calcext:value-type="string">
            <text:p>0xE7D6</text:p>
          </table:table-cell>
          <table:table-cell office:value-type="string" calcext:value-type="string">
            <text:p>tau_eta_varia_nu</text:p>
          </table:table-cell>
        </table:table-row>
        <table:table-row table:style-name="ro1">
          <table:table-cell office:value-type="string" calcext:value-type="string">
            <text:p>0xE7D5</text:p>
          </table:table-cell>
          <table:table-cell office:value-type="string" calcext:value-type="string">
            <text:p>tau_epsilon</text:p>
          </table:table-cell>
        </table:table-row>
        <table:table-row table:style-name="ro1">
          <table:table-cell office:value-type="string" calcext:value-type="string">
            <text:p>0xE7D4</text:p>
          </table:table-cell>
          <table:table-cell office:value-type="string" calcext:value-type="string">
            <text:p>tau_alpha_iota_2</text:p>
          </table:table-cell>
        </table:table-row>
        <table:table-row table:style-name="ro1">
          <table:table-cell office:value-type="string" calcext:value-type="string">
            <text:p>0xE7D3</text:p>
          </table:table-cell>
          <table:table-cell office:value-type="string" calcext:value-type="string">
            <text:p>tau_alpha_iota</text:p>
          </table:table-cell>
        </table:table-row>
        <table:table-row table:style-name="ro1">
          <table:table-cell office:value-type="string" calcext:value-type="string">
            <text:p>0xE7D2</text:p>
          </table:table-cell>
          <table:table-cell office:value-type="string" calcext:value-type="string">
            <text:p>tau_psili</text:p>
          </table:table-cell>
        </table:table-row>
        <table:table-row table:style-name="ro1">
          <table:table-cell office:value-type="string" calcext:value-type="string">
            <text:p>0xE7D1</text:p>
          </table:table-cell>
          <table:table-cell office:value-type="string" calcext:value-type="string">
            <text:p>tau_tall_psili</text:p>
          </table:table-cell>
        </table:table-row>
        <table:table-row table:style-name="ro1">
          <table:table-cell office:value-type="string" calcext:value-type="string">
            <text:p>0xE7D0</text:p>
          </table:table-cell>
          <table:table-cell office:value-type="string" calcext:value-type="string">
            <text:p>tau_tall</text:p>
          </table:table-cell>
        </table:table-row>
        <table:table-row table:style-name="ro1">
          <table:table-cell office:value-type="string" calcext:value-type="string">
            <text:p>0xE7C7</text:p>
          </table:table-cell>
          <table:table-cell office:value-type="string" calcext:value-type="string">
            <text:p>sigma_chi</text:p>
          </table:table-cell>
        </table:table-row>
        <table:table-row table:style-name="ro1">
          <table:table-cell office:value-type="string" calcext:value-type="string">
            <text:p>0xE7C6</text:p>
          </table:table-cell>
          <table:table-cell office:value-type="string" calcext:value-type="string">
            <text:p>sigma_tau_rho</text:p>
          </table:table-cell>
        </table:table-row>
        <table:table-row table:style-name="ro1">
          <table:table-cell office:value-type="string" calcext:value-type="string">
            <text:p>0xE7C5</text:p>
          </table:table-cell>
          <table:table-cell office:value-type="string" calcext:value-type="string">
            <text:p>sigma_tau</text:p>
          </table:table-cell>
        </table:table-row>
        <table:table-row table:style-name="ro1">
          <table:table-cell office:value-type="string" calcext:value-type="string">
            <text:p>0xE7C4</text:p>
          </table:table-cell>
          <table:table-cell office:value-type="string" calcext:value-type="string">
            <text:p>sigma_sigma</text:p>
          </table:table-cell>
        </table:table-row>
        <table:table-row table:style-name="ro1">
          <table:table-cell office:value-type="string" calcext:value-type="string">
            <text:p>0xE7C3</text:p>
          </table:table-cell>
          <table:table-cell office:value-type="string" calcext:value-type="string">
            <text:p>sigma_pi</text:p>
          </table:table-cell>
        </table:table-row>
        <table:table-row table:style-name="ro1">
          <table:table-cell office:value-type="string" calcext:value-type="string">
            <text:p>0xE7C2</text:p>
          </table:table-cell>
          <table:table-cell office:value-type="string" calcext:value-type="string">
            <text:p>sigma_theta_alpha_iota</text:p>
          </table:table-cell>
        </table:table-row>
        <table:table-row table:style-name="ro1">
          <table:table-cell office:value-type="string" calcext:value-type="string">
            <text:p>0xE7C1</text:p>
          </table:table-cell>
          <table:table-cell office:value-type="string" calcext:value-type="string">
            <text:p>sigma_theta</text:p>
          </table:table-cell>
        </table:table-row>
        <table:table-row table:style-name="ro1">
          <table:table-cell office:value-type="string" calcext:value-type="string">
            <text:p>0xE7C0</text:p>
          </table:table-cell>
          <table:table-cell office:value-type="string" calcext:value-type="string">
            <text:p>sigma_2</text:p>
          </table:table-cell>
        </table:table-row>
        <table:table-row table:style-name="ro1">
          <table:table-cell office:value-type="string" calcext:value-type="string">
            <text:p>0xE7A8</text:p>
          </table:table-cell>
          <table:table-cell office:value-type="string" calcext:value-type="string">
            <text:p>pi_tau</text:p>
          </table:table-cell>
        </table:table-row>
        <table:table-row table:style-name="ro1">
          <table:table-cell office:value-type="string" calcext:value-type="string">
            <text:p>0xE7A7</text:p>
          </table:table-cell>
          <table:table-cell office:value-type="string" calcext:value-type="string">
            <text:p>pi_rho</text:p>
          </table:table-cell>
        </table:table-row>
        <table:table-row table:style-name="ro1">
          <table:table-cell office:value-type="string" calcext:value-type="string">
            <text:p>0xE7A6</text:p>
          </table:table-cell>
          <table:table-cell office:value-type="string" calcext:value-type="string">
            <text:p>pi_omicron_varia</text:p>
          </table:table-cell>
        </table:table-row>
        <table:table-row table:style-name="ro1">
          <table:table-cell office:value-type="string" calcext:value-type="string">
            <text:p>0xE7A5</text:p>
          </table:table-cell>
          <table:table-cell office:value-type="string" calcext:value-type="string">
            <text:p>pi_omicron</text:p>
          </table:table-cell>
        </table:table-row>
        <table:table-row table:style-name="ro1">
          <table:table-cell office:value-type="string" calcext:value-type="string">
            <text:p>0xE7A4</text:p>
          </table:table-cell>
          <table:table-cell office:value-type="string" calcext:value-type="string">
            <text:p>pi_epsilon_rho</text:p>
          </table:table-cell>
        </table:table-row>
        <table:table-row table:style-name="ro1">
          <table:table-cell office:value-type="string" calcext:value-type="string">
            <text:p>0xE7A3</text:p>
          </table:table-cell>
          <table:table-cell office:value-type="string" calcext:value-type="string">
            <text:p>pi_alpha_rho</text:p>
          </table:table-cell>
        </table:table-row>
        <table:table-row table:style-name="ro1">
          <table:table-cell office:value-type="string" calcext:value-type="string">
            <text:p>0xE7A2</text:p>
          </table:table-cell>
          <table:table-cell office:value-type="string" calcext:value-type="string">
            <text:p>pisymbol_psili</text:p>
          </table:table-cell>
        </table:table-row>
        <table:table-row table:style-name="ro1">
          <table:table-cell office:value-type="string" calcext:value-type="string">
            <text:p>0xE7A1</text:p>
          </table:table-cell>
          <table:table-cell office:value-type="string" calcext:value-type="string">
            <text:p>pi_psili</text:p>
          </table:table-cell>
        </table:table-row>
        <table:table-row table:style-name="ro1">
          <table:table-cell office:value-type="string" calcext:value-type="string">
            <text:p>0xE7A0</text:p>
          </table:table-cell>
          <table:table-cell office:value-type="string" calcext:value-type="string">
            <text:p>Pi_2</text:p>
          </table:table-cell>
        </table:table-row>
        <table:table-row table:style-name="ro1">
          <table:table-cell office:value-type="string" calcext:value-type="string">
            <text:p>0xE79D</text:p>
          </table:table-cell>
          <table:table-cell office:value-type="string" calcext:value-type="string">
            <text:p>omicron_sigma</text:p>
          </table:table-cell>
        </table:table-row>
        <table:table-row table:style-name="ro1">
          <table:table-cell office:value-type="string" calcext:value-type="string">
            <text:p>0xE79C</text:p>
          </table:table-cell>
          <table:table-cell office:value-type="string" calcext:value-type="string">
            <text:p>omicron_upsilon_persipomeni</text:p>
          </table:table-cell>
        </table:table-row>
        <table:table-row table:style-name="ro1">
          <table:table-cell office:value-type="string" calcext:value-type="string">
            <text:p>0xE79B</text:p>
          </table:table-cell>
          <table:table-cell office:value-type="string" calcext:value-type="string">
            <text:p>omicron_upsilon_tonos</text:p>
          </table:table-cell>
        </table:table-row>
        <table:table-row table:style-name="ro1">
          <table:table-cell office:value-type="string" calcext:value-type="string">
            <text:p>0xE79A</text:p>
          </table:table-cell>
          <table:table-cell office:value-type="string" calcext:value-type="string">
            <text:p>omicron_upsilon</text:p>
          </table:table-cell>
        </table:table-row>
        <table:table-row table:style-name="ro1">
          <table:table-cell office:value-type="string" calcext:value-type="string">
            <text:p>0xE799</text:p>
          </table:table-cell>
          <table:table-cell office:value-type="string" calcext:value-type="string">
            <text:p>omicron_perispomeni</text:p>
          </table:table-cell>
        </table:table-row>
        <table:table-row table:style-name="ro1">
          <table:table-cell office:value-type="string" calcext:value-type="string">
            <text:p>0xE798</text:p>
          </table:table-cell>
          <table:table-cell office:value-type="string" calcext:value-type="string">
            <text:p>omicron_dasia_perispomeni</text:p>
          </table:table-cell>
        </table:table-row>
        <table:table-row table:style-name="ro1">
          <table:table-cell office:value-type="string" calcext:value-type="string">
            <text:p>0xE797</text:p>
          </table:table-cell>
          <table:table-cell office:value-type="string" calcext:value-type="string">
            <text:p>omicron_psili_perispomeni</text:p>
          </table:table-cell>
        </table:table-row>
        <table:table-row table:style-name="ro1">
          <table:table-cell office:value-type="string" calcext:value-type="string">
            <text:p>0xE780</text:p>
          </table:table-cell>
          <table:table-cell office:value-type="string" calcext:value-type="string">
            <text:p>xi_2</text:p>
          </table:table-cell>
        </table:table-row>
        <table:table-row table:style-name="ro1">
          <table:table-cell office:value-type="string" calcext:value-type="string">
            <text:p>0xE770</text:p>
          </table:table-cell>
          <table:table-cell office:value-type="string" calcext:value-type="string">
            <text:p>nu_final</text:p>
          </table:table-cell>
        </table:table-row>
        <table:table-row table:style-name="ro1">
          <table:table-cell office:value-type="string" calcext:value-type="string">
            <text:p>0xE765</text:p>
          </table:table-cell>
          <table:table-cell office:value-type="string" calcext:value-type="string">
            <text:p>mu_epsilon_tonos_nu</text:p>
          </table:table-cell>
        </table:table-row>
        <table:table-row table:style-name="ro1">
          <table:table-cell office:value-type="string" calcext:value-type="string">
            <text:p>0xE764</text:p>
          </table:table-cell>
          <table:table-cell office:value-type="string" calcext:value-type="string">
            <text:p><text:span text:style-name="T2">mu_epsilon_varia_2_</text:span>nu</text:p>
          </table:table-cell>
        </table:table-row>
        <table:table-row table:style-name="ro1">
          <table:table-cell office:value-type="string" calcext:value-type="string">
            <text:p>0xE763</text:p>
          </table:table-cell>
          <table:table-cell office:value-type="string" calcext:value-type="string">
            <text:p><text:span text:style-name="T2">mu_epsilon_varia_</text:span>nu</text:p>
          </table:table-cell>
        </table:table-row>
        <table:table-row table:style-name="ro1">
          <table:table-cell office:value-type="string" calcext:value-type="string">
            <text:p>0xE762</text:p>
          </table:table-cell>
          <table:table-cell office:value-type="string" calcext:value-type="string">
            <text:p>mu_epsilon_nu_3</text:p>
          </table:table-cell>
        </table:table-row>
        <table:table-row table:style-name="ro1">
          <table:table-cell office:value-type="string" calcext:value-type="string">
            <text:p>0xE761</text:p>
          </table:table-cell>
          <table:table-cell office:value-type="string" calcext:value-type="string">
            <text:p>mu_epsilon_nu_2</text:p>
          </table:table-cell>
        </table:table-row>
        <table:table-row table:style-name="ro1">
          <table:table-cell office:value-type="string" calcext:value-type="string">
            <text:p>0xE760</text:p>
          </table:table-cell>
          <table:table-cell office:value-type="string" calcext:value-type="string">
            <text:p>mu_epsilon_nu</text:p>
          </table:table-cell>
        </table:table-row>
        <table:table-row table:style-name="ro1">
          <table:table-cell office:value-type="string" calcext:value-type="string">
            <text:p>0xE751</text:p>
          </table:table-cell>
          <table:table-cell office:value-type="string" calcext:value-type="string">
            <text:p>lambda_lambda</text:p>
          </table:table-cell>
        </table:table-row>
        <table:table-row table:style-name="ro1">
          <table:table-cell office:value-type="string" calcext:value-type="string">
            <text:p>0xE750</text:p>
          </table:table-cell>
          <table:table-cell office:value-type="string" calcext:value-type="string">
            <text:p>lambda_psili</text:p>
          </table:table-cell>
        </table:table-row>
        <table:table-row table:style-name="ro1">
          <table:table-cell office:value-type="string" calcext:value-type="string">
            <text:p>0xE744</text:p>
          </table:table-cell>
          <table:table-cell office:value-type="string" calcext:value-type="string">
            <text:p>kappa_alpha_tau_alpha</text:p>
          </table:table-cell>
        </table:table-row>
        <table:table-row table:style-name="ro1">
          <table:table-cell office:value-type="string" calcext:value-type="string">
            <text:p>0xE743</text:p>
          </table:table-cell>
          <table:table-cell office:value-type="string" calcext:value-type="string">
            <text:p>kappa_alpha_iota_5_varia</text:p>
          </table:table-cell>
        </table:table-row>
        <table:table-row table:style-name="ro1">
          <table:table-cell office:value-type="string" calcext:value-type="string">
            <text:p>0xE742</text:p>
          </table:table-cell>
          <table:table-cell office:value-type="string" calcext:value-type="string">
            <text:p>kappa_alpha_iota_4_varia</text:p>
          </table:table-cell>
        </table:table-row>
        <table:table-row table:style-name="ro1">
          <table:table-cell office:value-type="string" calcext:value-type="string">
            <text:p>0xE741</text:p>
          </table:table-cell>
          <table:table-cell office:value-type="string" calcext:value-type="string">
            <text:p>kappa_alpha_iota_3_varia</text:p>
          </table:table-cell>
        </table:table-row>
        <table:table-row table:style-name="ro1">
          <table:table-cell office:value-type="string" calcext:value-type="string">
            <text:p>0xE740</text:p>
          </table:table-cell>
          <table:table-cell office:value-type="string" calcext:value-type="string">
            <text:p>kappa_alpha_iota_2_varia</text:p>
          </table:table-cell>
        </table:table-row>
        <table:table-row table:style-name="ro1">
          <table:table-cell office:value-type="string" calcext:value-type="string">
            <text:p>0xE723</text:p>
          </table:table-cell>
          <table:table-cell office:value-type="string" calcext:value-type="string">
            <text:p>phi_iota_tonos</text:p>
          </table:table-cell>
        </table:table-row>
        <table:table-row table:style-name="ro1">
          <table:table-cell office:value-type="string" calcext:value-type="string">
            <text:p>0xE722</text:p>
          </table:table-cell>
          <table:table-cell office:value-type="string" calcext:value-type="string">
            <text:p>phi_iota</text:p>
          </table:table-cell>
        </table:table-row>
        <table:table-row table:style-name="ro1">
          <table:table-cell office:value-type="string" calcext:value-type="string">
            <text:p>0xE721</text:p>
          </table:table-cell>
          <table:table-cell office:value-type="string" calcext:value-type="string">
            <text:p>phi_psili</text:p>
          </table:table-cell>
        </table:table-row>
        <table:table-row table:style-name="ro1">
          <table:table-cell office:value-type="string" calcext:value-type="string">
            <text:p>0xE720</text:p>
          </table:table-cell>
          <table:table-cell office:value-type="string" calcext:value-type="string">
            <text:p>theta_2</text:p>
          </table:table-cell>
        </table:table-row>
        <table:table-row table:style-name="ro1">
          <table:table-cell office:value-type="string" calcext:value-type="string">
            <text:p>0xE716</text:p>
          </table:table-cell>
          <table:table-cell office:value-type="string" calcext:value-type="string">
            <text:p><text:span text:style-name="T2">eta_perispomeni_</text:span>nu</text:p>
          </table:table-cell>
        </table:table-row>
        <table:table-row table:style-name="ro1">
          <table:table-cell office:value-type="string" calcext:value-type="string">
            <text:p>0xE715</text:p>
          </table:table-cell>
          <table:table-cell office:value-type="string" calcext:value-type="string">
            <text:p><text:span text:style-name="T2">eta_varia_2_</text:span>nu</text:p>
          </table:table-cell>
        </table:table-row>
        <table:table-row table:style-name="ro1">
          <table:table-cell office:value-type="string" calcext:value-type="string">
            <text:p>0xE714</text:p>
          </table:table-cell>
          <table:table-cell office:value-type="string" calcext:value-type="string">
            <text:p>eta_varia_nu</text:p>
          </table:table-cell>
        </table:table-row>
        <table:table-row table:style-name="ro1">
          <table:table-cell office:value-type="string" calcext:value-type="string">
            <text:p>0xE713</text:p>
          </table:table-cell>
          <table:table-cell office:value-type="string" calcext:value-type="string">
            <text:p>eta_tonos_nu</text:p>
          </table:table-cell>
        </table:table-row>
        <table:table-row table:style-name="ro1">
          <table:table-cell office:value-type="string" calcext:value-type="string">
            <text:p>0xE712</text:p>
          </table:table-cell>
          <table:table-cell office:value-type="string" calcext:value-type="string">
            <text:p>eta_nu</text:p>
          </table:table-cell>
        </table:table-row>
        <table:table-row table:style-name="ro1">
          <table:table-cell office:value-type="string" calcext:value-type="string">
            <text:p>0xE711</text:p>
          </table:table-cell>
          <table:table-cell office:value-type="string" calcext:value-type="string">
            <text:p>eta_2_perispomeni</text:p>
          </table:table-cell>
        </table:table-row>
        <table:table-row table:style-name="ro1">
          <table:table-cell office:value-type="string" calcext:value-type="string">
            <text:p>0xE710</text:p>
          </table:table-cell>
          <table:table-cell office:value-type="string" calcext:value-type="string">
            <text:p>eta_2</text:p>
          </table:table-cell>
        </table:table-row>
        <table:table-row table:style-name="ro1">
          <table:table-cell office:value-type="string" calcext:value-type="string">
            <text:p>0xE701</text:p>
          </table:table-cell>
          <table:table-cell office:value-type="string" calcext:value-type="string">
            <text:p>zeta_3</text:p>
          </table:table-cell>
        </table:table-row>
        <table:table-row table:style-name="ro1">
          <table:table-cell office:value-type="string" calcext:value-type="string">
            <text:p>0xE700</text:p>
          </table:table-cell>
          <table:table-cell office:value-type="string" calcext:value-type="string">
            <text:p>zeta_2</text:p>
          </table:table-cell>
        </table:table-row>
        <table:table-row table:style-name="ro1">
          <table:table-cell office:value-type="string" calcext:value-type="string">
            <text:p>0xE6FF</text:p>
          </table:table-cell>
          <table:table-cell office:value-type="string" calcext:value-type="string">
            <text:p>epsilon_upsilon_2</text:p>
          </table:table-cell>
        </table:table-row>
        <table:table-row table:style-name="ro1">
          <table:table-cell office:value-type="string" calcext:value-type="string">
            <text:p>0xE6FE</text:p>
          </table:table-cell>
          <table:table-cell office:value-type="string" calcext:value-type="string">
            <text:p>epsilon_upsilon</text:p>
          </table:table-cell>
        </table:table-row>
        <table:table-row table:style-name="ro1">
          <table:table-cell office:value-type="string" calcext:value-type="string">
            <text:p>0xE6FD</text:p>
          </table:table-cell>
          <table:table-cell office:value-type="string" calcext:value-type="string">
            <text:p>epsilon_psili_stigma_iota_varia</text:p>
          </table:table-cell>
        </table:table-row>
        <table:table-row table:style-name="ro1">
          <table:table-cell office:value-type="string" calcext:value-type="string">
            <text:p>0xE6FC</text:p>
          </table:table-cell>
          <table:table-cell office:value-type="string" calcext:value-type="string">
            <text:p>epsilon_psili_stigma_iota</text:p>
          </table:table-cell>
        </table:table-row>
        <table:table-row table:style-name="ro1">
          <table:table-cell office:value-type="string" calcext:value-type="string">
            <text:p>0xE6FB</text:p>
          </table:table-cell>
          <table:table-cell office:value-type="string" calcext:value-type="string">
            <text:p>epsilon_stigma_iota</text:p>
          </table:table-cell>
        </table:table-row>
        <table:table-row table:style-name="ro1">
          <table:table-cell office:value-type="string" calcext:value-type="string">
            <text:p>0xE6FA</text:p>
          </table:table-cell>
          <table:table-cell office:value-type="string" calcext:value-type="string">
            <text:p>epsilon_rho_2</text:p>
          </table:table-cell>
        </table:table-row>
        <table:table-row table:style-name="ro1">
          <table:table-cell office:value-type="string" calcext:value-type="string">
            <text:p>0xE6F9</text:p>
          </table:table-cell>
          <table:table-cell office:value-type="string" calcext:value-type="string">
            <text:p>epsilon_rho</text:p>
          </table:table-cell>
        </table:table-row>
        <table:table-row table:style-name="ro1">
          <table:table-cell office:value-type="string" calcext:value-type="string">
            <text:p>0xE6F8</text:p>
          </table:table-cell>
          <table:table-cell office:value-type="string" calcext:value-type="string">
            <text:p>epsilon_psili_xi</text:p>
          </table:table-cell>
        </table:table-row>
        <table:table-row table:style-name="ro1">
          <table:table-cell office:value-type="string" calcext:value-type="string">
            <text:p>0xE6F7</text:p>
          </table:table-cell>
          <table:table-cell office:value-type="string" calcext:value-type="string">
            <text:p>epsilon_psili_nu</text:p>
          </table:table-cell>
        </table:table-row>
        <table:table-row table:style-name="ro1">
          <table:table-cell office:value-type="string" calcext:value-type="string">
            <text:p>0xE6F6</text:p>
          </table:table-cell>
          <table:table-cell office:value-type="string" calcext:value-type="string">
            <text:p>epsilon_iota_perispomeni_prosgegrammeni</text:p>
          </table:table-cell>
        </table:table-row>
        <table:table-row table:style-name="ro1">
          <table:table-cell office:value-type="string" calcext:value-type="string">
            <text:p>0xE6F5</text:p>
          </table:table-cell>
          <table:table-cell office:value-type="string" calcext:value-type="string">
            <text:p>epsion_iota_2_perispomeni</text:p>
          </table:table-cell>
        </table:table-row>
        <table:table-row table:style-name="ro1">
          <table:table-cell office:value-type="string" calcext:value-type="string">
            <text:p>0xE6F4</text:p>
          </table:table-cell>
          <table:table-cell office:value-type="string" calcext:value-type="string">
            <text:p>epsilon_iota_perispomeni</text:p>
          </table:table-cell>
        </table:table-row>
        <table:table-row table:style-name="ro1">
          <table:table-cell office:value-type="string" calcext:value-type="string">
            <text:p>0xE6F3</text:p>
          </table:table-cell>
          <table:table-cell office:value-type="string" calcext:value-type="string">
            <text:p>epsilon_iota_2</text:p>
          </table:table-cell>
        </table:table-row>
        <table:table-row table:style-name="ro1">
          <table:table-cell office:value-type="string" calcext:value-type="string">
            <text:p>0xE6F2</text:p>
          </table:table-cell>
          <table:table-cell office:value-type="string" calcext:value-type="string">
            <text:p>epsilon_iota</text:p>
          </table:table-cell>
        </table:table-row>
        <table:table-row table:style-name="ro1">
          <table:table-cell office:value-type="string" calcext:value-type="string">
            <text:p>0xE6F1</text:p>
          </table:table-cell>
          <table:table-cell office:value-type="string" calcext:value-type="string">
            <text:p>epsilon_dasia_perispomeni</text:p>
          </table:table-cell>
        </table:table-row>
        <table:table-row table:style-name="ro1">
          <table:table-cell office:value-type="string" calcext:value-type="string">
            <text:p>0xE6F0</text:p>
          </table:table-cell>
          <table:table-cell office:value-type="string" calcext:value-type="string">
            <text:p>epsilon_psili_perispomeni</text:p>
          </table:table-cell>
        </table:table-row>
        <table:table-row table:style-name="ro1">
          <table:table-cell office:value-type="string" calcext:value-type="string">
            <text:p>0xE6E3</text:p>
          </table:table-cell>
          <table:table-cell office:value-type="string" calcext:value-type="string">
            <text:p>delta_epsilon_varia_2</text:p>
          </table:table-cell>
        </table:table-row>
        <table:table-row table:style-name="ro1">
          <table:table-cell office:value-type="string" calcext:value-type="string">
            <text:p>0xE6E2</text:p>
          </table:table-cell>
          <table:table-cell office:value-type="string" calcext:value-type="string">
            <text:p>delta_epsilon_varia</text:p>
          </table:table-cell>
        </table:table-row>
        <table:table-row table:style-name="ro1">
          <table:table-cell office:value-type="string" calcext:value-type="string">
            <text:p>0xE6E1</text:p>
          </table:table-cell>
          <table:table-cell office:value-type="string" calcext:value-type="string">
            <text:p>delta_epsilon</text:p>
          </table:table-cell>
        </table:table-row>
        <table:table-row table:style-name="ro1">
          <table:table-cell office:value-type="string" calcext:value-type="string">
            <text:p>0xE6E0</text:p>
          </table:table-cell>
          <table:table-cell office:value-type="string" calcext:value-type="string">
            <text:p>delta_curly</text:p>
          </table:table-cell>
        </table:table-row>
        <table:table-row table:style-name="ro1">
          <table:table-cell office:value-type="string" calcext:value-type="string">
            <text:p>0xE6DB</text:p>
          </table:table-cell>
          <table:table-cell office:value-type="string" calcext:value-type="string">
            <text:p>gamma_rho</text:p>
          </table:table-cell>
        </table:table-row>
        <table:table-row table:style-name="ro1">
          <table:table-cell office:value-type="string" calcext:value-type="string">
            <text:p>0xE6DA</text:p>
          </table:table-cell>
          <table:table-cell office:value-type="string" calcext:value-type="string">
            <text:p>gamma_omicron_2</text:p>
          </table:table-cell>
        </table:table-row>
        <table:table-row table:style-name="ro1">
          <table:table-cell office:value-type="string" calcext:value-type="string">
            <text:p>0xE6D9</text:p>
          </table:table-cell>
          <table:table-cell office:value-type="string" calcext:value-type="string">
            <text:p>gamma_omicron</text:p>
          </table:table-cell>
        </table:table-row>
        <table:table-row table:style-name="ro1">
          <table:table-cell office:value-type="string" calcext:value-type="string">
            <text:p>0xE6D8</text:p>
          </table:table-cell>
          <table:table-cell office:value-type="string" calcext:value-type="string">
            <text:p>gamma_epsilon_nu_oxia</text:p>
          </table:table-cell>
        </table:table-row>
        <table:table-row table:style-name="ro1">
          <table:table-cell office:value-type="string" calcext:value-type="string">
            <text:p>0xE6D7</text:p>
          </table:table-cell>
          <table:table-cell office:value-type="string" calcext:value-type="string">
            <text:p>gamma_gamma</text:p>
          </table:table-cell>
        </table:table-row>
        <table:table-row table:style-name="ro1">
          <table:table-cell office:value-type="string" calcext:value-type="string">
            <text:p>0xE6D6</text:p>
          </table:table-cell>
          <table:table-cell office:value-type="string" calcext:value-type="string">
            <text:p>gamma_alpha_varia_rho_5</text:p>
          </table:table-cell>
        </table:table-row>
        <table:table-row table:style-name="ro1">
          <table:table-cell office:value-type="string" calcext:value-type="string">
            <text:p>0xE6D5</text:p>
          </table:table-cell>
          <table:table-cell office:value-type="string" calcext:value-type="string">
            <text:p>gamma_alpha_varia_rho_4</text:p>
          </table:table-cell>
        </table:table-row>
        <table:table-row table:style-name="ro1">
          <table:table-cell office:value-type="string" calcext:value-type="string">
            <text:p>0xE6D4</text:p>
          </table:table-cell>
          <table:table-cell office:value-type="string" calcext:value-type="string">
            <text:p>gamma_alpha_varia_rho_3</text:p>
          </table:table-cell>
        </table:table-row>
        <table:table-row table:style-name="ro1">
          <table:table-cell office:value-type="string" calcext:value-type="string">
            <text:p>0xE6D3</text:p>
          </table:table-cell>
          <table:table-cell office:value-type="string" calcext:value-type="string">
            <text:p>gamma_alpha_varia_rho_2</text:p>
          </table:table-cell>
        </table:table-row>
        <table:table-row table:style-name="ro1">
          <table:table-cell office:value-type="string" calcext:value-type="string">
            <text:p>0xE6D2</text:p>
          </table:table-cell>
          <table:table-cell office:value-type="string" calcext:value-type="string">
            <text:p>gamma_alpha_varia_rho</text:p>
          </table:table-cell>
        </table:table-row>
        <table:table-row table:style-name="ro1">
          <table:table-cell office:value-type="string" calcext:value-type="string">
            <text:p>0xE6D1</text:p>
          </table:table-cell>
          <table:table-cell office:value-type="string" calcext:value-type="string">
            <text:p>gamma_tall</text:p>
          </table:table-cell>
        </table:table-row>
        <table:table-row table:style-name="ro1">
          <table:table-cell office:value-type="string" calcext:value-type="string">
            <text:p>0xE6D0</text:p>
          </table:table-cell>
          <table:table-cell office:value-type="string" calcext:value-type="string">
            <text:p>gamma_short</text:p>
          </table:table-cell>
        </table:table-row>
        <table:table-row table:style-name="ro1">
          <table:table-cell office:value-type="string" calcext:value-type="string">
            <text:p>0xE6C0</text:p>
          </table:table-cell>
          <table:table-cell office:value-type="string" calcext:value-type="string">
            <text:p>beta_curly</text:p>
          </table:table-cell>
        </table:table-row>
        <table:table-row table:style-name="ro1">
          <table:table-cell office:value-type="string" calcext:value-type="string">
            <text:p>0xE6B9</text:p>
          </table:table-cell>
          <table:table-cell office:value-type="string" calcext:value-type="string">
            <text:p>alpha_psili_sigma_tau</text:p>
          </table:table-cell>
        </table:table-row>
        <table:table-row table:style-name="ro1">
          <table:table-cell office:value-type="string" calcext:value-type="string">
            <text:p>0xE6B8</text:p>
          </table:table-cell>
          <table:table-cell office:value-type="string" calcext:value-type="string">
            <text:p>alpha_sigma_tau</text:p>
          </table:table-cell>
        </table:table-row>
        <table:table-row table:style-name="ro1">
          <table:table-cell office:value-type="string" calcext:value-type="string">
            <text:p>0xE6B7</text:p>
          </table:table-cell>
          <table:table-cell office:value-type="string" calcext:value-type="string">
            <text:p>alpha_rho</text:p>
          </table:table-cell>
        </table:table-row>
        <table:table-row table:style-name="ro1">
          <table:table-cell office:value-type="string" calcext:value-type="string">
            <text:p>0xE6B6</text:p>
          </table:table-cell>
          <table:table-cell office:value-type="string" calcext:value-type="string">
            <text:p>alpha_nu</text:p>
          </table:table-cell>
        </table:table-row>
        <table:table-row table:style-name="ro1">
          <table:table-cell office:value-type="string" calcext:value-type="string">
            <text:p>0xE6B5</text:p>
          </table:table-cell>
          <table:table-cell office:value-type="string" calcext:value-type="string">
            <text:p>alpha_iota_perispomeni</text:p>
          </table:table-cell>
        </table:table-row>
        <table:table-row table:style-name="ro1">
          <table:table-cell office:value-type="string" calcext:value-type="string">
            <text:p>0xE6B4</text:p>
          </table:table-cell>
          <table:table-cell office:value-type="string" calcext:value-type="string">
            <text:p>alpha_iota_psili_oxia</text:p>
          </table:table-cell>
        </table:table-row>
        <table:table-row table:style-name="ro1">
          <table:table-cell office:value-type="string" calcext:value-type="string">
            <text:p>0xE6B3</text:p>
          </table:table-cell>
          <table:table-cell office:value-type="string" calcext:value-type="string">
            <text:p>alpha_iota_tonos</text:p>
          </table:table-cell>
        </table:table-row>
        <table:table-row table:style-name="ro1">
          <table:table-cell office:value-type="string" calcext:value-type="string">
            <text:p>0xE6B2</text:p>
          </table:table-cell>
          <table:table-cell office:value-type="string" calcext:value-type="string">
            <text:p>alpha_iota_psili</text:p>
          </table:table-cell>
        </table:table-row>
        <table:table-row table:style-name="ro1">
          <table:table-cell office:value-type="string" calcext:value-type="string">
            <text:p>0xE6B1</text:p>
          </table:table-cell>
          <table:table-cell office:value-type="string" calcext:value-type="string">
            <text:p>alpha_iota</text:p>
          </table:table-cell>
        </table:table-row>
        <table:table-row table:style-name="ro1">
          <table:table-cell office:value-type="string" calcext:value-type="string">
            <text:p>0xE6B0</text:p>
          </table:table-cell>
          <table:table-cell office:value-type="string" calcext:value-type="string">
            <text:p>alpha_curly</text:p>
          </table:table-cell>
        </table:table-row>
      </table:table>
      <table:table table:name="FROMVS3_0_PUA_Swap" table:style-name="ta1"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0xE822</text:p>
          </table:table-cell>
          <table:table-cell office:value-type="string" calcext:value-type="string">
            <text:p>omega_perispomeni_nu</text:p>
          </table:table-cell>
          <table:table-cell table:formula="of:=RIGHT([.A1];4)" office:value-type="string" office:string-value="E822" calcext:value-type="string">
            <text:p>E822</text:p>
          </table:table-cell>
          <table:table-cell table:formula="of:=UNICHAR(HEX2DEC([.C1]))" office:value-type="string" office:string-value="" calcext:value-type="string">
            <text:p></text:p>
          </table:table-cell>
          <table:table-cell table:style-name="ce11" office:value-type="string" calcext:value-type="string">
            <text:p>ῶν</text:p>
          </table:table-cell>
          <table:table-cell table:style-name="ce15" office:value-type="string" calcext:value-type="string">
            <text:p></text:p>
          </table:table-cell>
          <table:table-cell table:formula="of:=DEC2HEX(UNICODE([.F1]))" office:value-type="string" office:string-value="E86F" calcext:value-type="string">
            <text:p>E86F</text:p>
          </table:table-cell>
          <table:table-cell table:formula="of:=CONCATENATE(&quot;0x&quot;;[.G1])" office:value-type="string" office:string-value="0xE86F" calcext:value-type="string">
            <text:p>0xE86F</text:p>
          </table:table-cell>
          <table:table-cell table:formula="of:=VLOOKUP([.H1];[$FROMVS_Names.$A$1:$FROMVS_Names.$B$151];2;0)" office:value-type="string" office:string-value="omega_perispomeni_nu" calcext:value-type="string">
            <text:p>omega_perispomeni_nu</text:p>
          </table:table-cell>
        </table:table-row>
        <table:table-row table:style-name="ro1">
          <table:table-cell office:value-type="string" calcext:value-type="string">
            <text:p>0xE823</text:p>
          </table:table-cell>
          <table:table-cell/>
          <table:table-cell table:formula="of:=RIGHT([.A2];4)" office:value-type="string" office:string-value="E823" calcext:value-type="string">
            <text:p>E823</text:p>
          </table:table-cell>
          <table:table-cell table:formula="of:=UNICHAR(HEX2DEC([.C2]))" office:value-type="string" office:string-value="" calcext:value-type="string">
            <text:p></text:p>
          </table:table-cell>
          <table:table-cell office:value-type="string" calcext:value-type="string">
            <text:p>ων</text:p>
          </table:table-cell>
          <table:table-cell table:style-name="ce15" office:value-type="string" calcext:value-type="string">
            <text:p></text:p>
          </table:table-cell>
          <table:table-cell table:formula="of:=DEC2HEX(UNICODE([.F2]))" office:value-type="string" office:string-value="E86E" calcext:value-type="string">
            <text:p>E86E</text:p>
          </table:table-cell>
          <table:table-cell table:formula="of:=CONCATENATE(&quot;0x&quot;;[.G2])" office:value-type="string" office:string-value="0xE86E" calcext:value-type="string">
            <text:p>0xE86E</text:p>
          </table:table-cell>
          <table:table-cell table:formula="of:=VLOOKUP([.H2];[$FROMVS_Names.$A$1:$FROMVS_Names.$B$151];2;0)" office:value-type="string" office:string-value="omega_nu_2" calcext:value-type="string">
            <text:p>omega_nu_2</text:p>
          </table:table-cell>
        </table:table-row>
        <table:table-row table:style-name="ro1">
          <table:table-cell office:value-type="string" calcext:value-type="string">
            <text:p>0xE839</text:p>
          </table:table-cell>
          <table:table-cell office:value-type="string" calcext:value-type="string">
            <text:p>omicron_sigma_2</text:p>
          </table:table-cell>
          <table:table-cell table:formula="of:=RIGHT([.A3];4)" office:value-type="string" office:string-value="E839" calcext:value-type="string">
            <text:p>E839</text:p>
          </table:table-cell>
          <table:table-cell table:formula="of:=UNICHAR(HEX2DEC([.C3]))" office:value-type="string" office:string-value="" calcext:value-type="string">
            <text:p></text:p>
          </table:table-cell>
          <table:table-cell office:value-type="string" calcext:value-type="string">
            <text:p>οσ</text:p>
          </table:table-cell>
          <table:table-cell table:style-name="ce16" office:value-type="string" calcext:value-type="string">
            <text:p></text:p>
          </table:table-cell>
          <table:table-cell table:formula="of:=DEC2HEX(UNICODE([.F3]))" office:value-type="string" office:string-value="E86C" calcext:value-type="string">
            <text:p>E86C</text:p>
          </table:table-cell>
          <table:table-cell table:formula="of:=CONCATENATE(&quot;0x&quot;;[.G3])" office:value-type="string" office:string-value="0xE86C" calcext:value-type="string">
            <text:p>0xE86C</text:p>
          </table:table-cell>
          <table:table-cell table:formula="of:=VLOOKUP([.H3];[$FROMVS_Names.$A$1:$FROMVS_Names.$B$151];2;0)" office:value-type="string" office:string-value="omicron_sigma_2" calcext:value-type="string">
            <text:p>omicron_sigma_2</text:p>
          </table:table-cell>
        </table:table-row>
        <table:table-row table:style-name="ro1">
          <table:table-cell office:value-type="string" calcext:value-type="string">
            <text:p>0xE83A</text:p>
          </table:table-cell>
          <table:table-cell office:value-type="string" calcext:value-type="string">
            <text:p>omicron_iota_perispomeni_sigma2</text:p>
          </table:table-cell>
          <table:table-cell table:formula="of:=RIGHT([.A4];4)" office:value-type="string" office:string-value="E83A" calcext:value-type="string">
            <text:p>E83A</text:p>
          </table:table-cell>
          <table:table-cell table:formula="of:=UNICHAR(HEX2DEC([.C4]))" office:value-type="string" office:string-value="" calcext:value-type="string">
            <text:p></text:p>
          </table:table-cell>
          <table:table-cell office:value-type="string" calcext:value-type="string">
            <text:p>ο<text:span text:style-name="T1">ῖσ</text:span></text:p>
          </table:table-cell>
          <table:table-cell table:style-name="ce16" office:value-type="string" calcext:value-type="string">
            <text:p></text:p>
          </table:table-cell>
          <table:table-cell table:formula="of:=DEC2HEX(UNICODE([.F4]))" office:value-type="string" office:string-value="E86B" calcext:value-type="string">
            <text:p>E86B</text:p>
          </table:table-cell>
          <table:table-cell table:formula="of:=CONCATENATE(&quot;0x&quot;;[.G4])" office:value-type="string" office:string-value="0xE86B" calcext:value-type="string">
            <text:p>0xE86B</text:p>
          </table:table-cell>
          <table:table-cell table:formula="of:=VLOOKUP([.H4];[$FROMVS_Names.$A$1:$FROMVS_Names.$B$151];2;0)" office:value-type="string" office:string-value="omicron_iota_perispomeni_sigma" calcext:value-type="string">
            <text:p>omicron_iota_perispomeni_sigma</text:p>
          </table:table-cell>
        </table:table-row>
        <table:table-row table:style-name="ro1">
          <table:table-cell office:value-type="string" calcext:value-type="string">
            <text:p>0xE825</text:p>
          </table:table-cell>
          <table:table-cell office:value-type="string" calcext:value-type="string">
            <text:p>iota_sigma</text:p>
          </table:table-cell>
          <table:table-cell table:formula="of:=RIGHT([.A5];4)" office:value-type="string" office:string-value="E825" calcext:value-type="string">
            <text:p>E825</text:p>
          </table:table-cell>
          <table:table-cell table:formula="of:=UNICHAR(HEX2DEC([.C5]))" office:value-type="string" office:string-value="" calcext:value-type="string">
            <text:p></text:p>
          </table:table-cell>
          <table:table-cell office:value-type="string" calcext:value-type="string">
            <text:p>ισ</text:p>
          </table:table-cell>
          <table:table-cell table:style-name="ce15" office:value-type="string" calcext:value-type="string">
            <text:p></text:p>
          </table:table-cell>
          <table:table-cell table:formula="of:=DEC2HEX(UNICODE([.F5]))" office:value-type="string" office:string-value="E86A" calcext:value-type="string">
            <text:p>E86A</text:p>
          </table:table-cell>
          <table:table-cell table:formula="of:=CONCATENATE(&quot;0x&quot;;[.G5])" office:value-type="string" office:string-value="0xE86A" calcext:value-type="string">
            <text:p>0xE86A</text:p>
          </table:table-cell>
          <table:table-cell table:formula="of:=VLOOKUP([.H5];[$FROMVS_Names.$A$1:$FROMVS_Names.$B$151];2;0)" office:value-type="string" office:string-value="iota_sigma" calcext:value-type="string">
            <text:p>iota_sigma</text:p>
          </table:table-cell>
        </table:table-row>
        <table:table-row table:style-name="ro1">
          <table:table-cell office:value-type="string" calcext:value-type="string">
            <text:p>0xE827</text:p>
          </table:table-cell>
          <table:table-cell office:value-type="string" calcext:value-type="string">
            <text:p>iota_perispomeni_nu</text:p>
          </table:table-cell>
          <table:table-cell table:formula="of:=RIGHT([.A6];4)" office:value-type="string" office:string-value="E827" calcext:value-type="string">
            <text:p>E827</text:p>
          </table:table-cell>
          <table:table-cell table:formula="of:=UNICHAR(HEX2DEC([.C6]))" office:value-type="string" office:string-value="" calcext:value-type="string">
            <text:p></text:p>
          </table:table-cell>
          <table:table-cell table:style-name="ce11" office:value-type="string" calcext:value-type="string">
            <text:p>ῖν</text:p>
          </table:table-cell>
          <table:table-cell table:style-name="ce15" office:value-type="string" calcext:value-type="string">
            <text:p></text:p>
          </table:table-cell>
          <table:table-cell table:formula="of:=DEC2HEX(UNICODE([.F6]))" office:value-type="string" office:string-value="E869" calcext:value-type="string">
            <text:p>E869</text:p>
          </table:table-cell>
          <table:table-cell table:formula="of:=CONCATENATE(&quot;0x&quot;;[.G6])" office:value-type="string" office:string-value="0xE869" calcext:value-type="string">
            <text:p>0xE869</text:p>
          </table:table-cell>
          <table:table-cell table:formula="of:=VLOOKUP([.H6];[$FROMVS_Names.$A$1:$FROMVS_Names.$B$151];2;0)" office:value-type="string" office:string-value="iota_perispomeni_nu" calcext:value-type="string">
            <text:p>iota_perispomeni_nu</text:p>
          </table:table-cell>
        </table:table-row>
        <table:table-row table:style-name="ro1">
          <table:table-cell office:value-type="string" calcext:value-type="string">
            <text:p>0xE834</text:p>
          </table:table-cell>
          <table:table-cell office:value-type="string" calcext:value-type="string">
            <text:p>iota_nu</text:p>
          </table:table-cell>
          <table:table-cell table:formula="of:=RIGHT([.A7];4)" office:value-type="string" office:string-value="E834" calcext:value-type="string">
            <text:p>E834</text:p>
          </table:table-cell>
          <table:table-cell table:formula="of:=UNICHAR(HEX2DEC([.C7]))" office:value-type="string" office:string-value="" calcext:value-type="string">
            <text:p></text:p>
          </table:table-cell>
          <table:table-cell office:value-type="string" calcext:value-type="string">
            <text:p>ιν</text:p>
          </table:table-cell>
          <table:table-cell table:style-name="ce16" office:value-type="string" calcext:value-type="string">
            <text:p></text:p>
          </table:table-cell>
          <table:table-cell table:formula="of:=DEC2HEX(UNICODE([.F7]))" office:value-type="string" office:string-value="E868" calcext:value-type="string">
            <text:p>E868</text:p>
          </table:table-cell>
          <table:table-cell table:formula="of:=CONCATENATE(&quot;0x&quot;;[.G7])" office:value-type="string" office:string-value="0xE868" calcext:value-type="string">
            <text:p>0xE868</text:p>
          </table:table-cell>
          <table:table-cell table:formula="of:=VLOOKUP([.H7];[$FROMVS_Names.$A$1:$FROMVS_Names.$B$151];2;0)" office:value-type="string" office:string-value="iota_nu" calcext:value-type="string">
            <text:p>iota_nu</text:p>
          </table:table-cell>
        </table:table-row>
        <table:table-row table:style-name="ro1">
          <table:table-cell office:value-type="string" calcext:value-type="string">
            <text:p>0xE83D</text:p>
          </table:table-cell>
          <table:table-cell office:value-type="string" calcext:value-type="string">
            <text:p>epsilon_nu_2</text:p>
          </table:table-cell>
          <table:table-cell table:formula="of:=RIGHT([.A8];4)" office:value-type="string" office:string-value="E83D" calcext:value-type="string">
            <text:p>E83D</text:p>
          </table:table-cell>
          <table:table-cell table:formula="of:=UNICHAR(HEX2DEC([.C8]))" office:value-type="string" office:string-value="" calcext:value-type="string">
            <text:p></text:p>
          </table:table-cell>
          <table:table-cell office:value-type="string" calcext:value-type="string">
            <text:p>εν</text:p>
          </table:table-cell>
          <table:table-cell table:style-name="ce16" office:value-type="string" calcext:value-type="string">
            <text:p></text:p>
          </table:table-cell>
          <table:table-cell table:formula="of:=DEC2HEX(UNICODE([.F8]))" office:value-type="string" office:string-value="E867" calcext:value-type="string">
            <text:p>E867</text:p>
          </table:table-cell>
          <table:table-cell table:formula="of:=CONCATENATE(&quot;0x&quot;;[.G8])" office:value-type="string" office:string-value="0xE867" calcext:value-type="string">
            <text:p>0xE867</text:p>
          </table:table-cell>
          <table:table-cell table:formula="of:=VLOOKUP([.H8];[$FROMVS_Names.$A$1:$FROMVS_Names.$B$151];2;0)" office:value-type="string" office:string-value="epsilon_nu_2" calcext:value-type="string">
            <text:p>epsilon_nu_2</text:p>
          </table:table-cell>
        </table:table-row>
        <table:table-row table:style-name="ro1">
          <table:table-cell office:value-type="string" calcext:value-type="string">
            <text:p>0xE83C</text:p>
          </table:table-cell>
          <table:table-cell office:value-type="string" calcext:value-type="string">
            <text:p>epsilon_nu</text:p>
          </table:table-cell>
          <table:table-cell table:formula="of:=RIGHT([.A9];4)" office:value-type="string" office:string-value="E83C" calcext:value-type="string">
            <text:p>E83C</text:p>
          </table:table-cell>
          <table:table-cell table:formula="of:=UNICHAR(HEX2DEC([.C9]))" office:value-type="string" office:string-value="" calcext:value-type="string">
            <text:p></text:p>
          </table:table-cell>
          <table:table-cell office:value-type="string" calcext:value-type="string">
            <text:p>εν</text:p>
          </table:table-cell>
          <table:table-cell table:style-name="ce16" office:value-type="string" calcext:value-type="string">
            <text:p></text:p>
          </table:table-cell>
          <table:table-cell table:formula="of:=DEC2HEX(UNICODE([.F9]))" office:value-type="string" office:string-value="E866" calcext:value-type="string">
            <text:p>E866</text:p>
          </table:table-cell>
          <table:table-cell table:formula="of:=CONCATENATE(&quot;0x&quot;;[.G9])" office:value-type="string" office:string-value="0xE866" calcext:value-type="string">
            <text:p>0xE866</text:p>
          </table:table-cell>
          <table:table-cell table:formula="of:=VLOOKUP([.H9];[$FROMVS_Names.$A$1:$FROMVS_Names.$B$151];2;0)" office:value-type="string" office:string-value="epsilon_nu" calcext:value-type="string">
            <text:p>epsilon_nu</text:p>
          </table:table-cell>
        </table:table-row>
        <table:table-row table:style-name="ro1">
          <table:table-cell office:value-type="string" calcext:value-type="string">
            <text:p>0xE82B</text:p>
          </table:table-cell>
          <table:table-cell office:value-type="string" calcext:value-type="string">
            <text:p>epsilon_iota_sigma</text:p>
          </table:table-cell>
          <table:table-cell table:formula="of:=RIGHT([.A10];4)" office:value-type="string" office:string-value="E82B" calcext:value-type="string">
            <text:p>E82B</text:p>
          </table:table-cell>
          <table:table-cell table:formula="of:=UNICHAR(HEX2DEC([.C10]))" office:value-type="string" office:string-value="" calcext:value-type="string">
            <text:p></text:p>
          </table:table-cell>
          <table:table-cell office:value-type="string" calcext:value-type="string">
            <text:p>εισ</text:p>
          </table:table-cell>
          <table:table-cell table:style-name="ce15" office:value-type="string" calcext:value-type="string">
            <text:p></text:p>
          </table:table-cell>
          <table:table-cell table:formula="of:=DEC2HEX(UNICODE([.F10]))" office:value-type="string" office:string-value="E865" calcext:value-type="string">
            <text:p>E865</text:p>
          </table:table-cell>
          <table:table-cell table:formula="of:=CONCATENATE(&quot;0x&quot;;[.G10])" office:value-type="string" office:string-value="0xE865" calcext:value-type="string">
            <text:p>0xE865</text:p>
          </table:table-cell>
          <table:table-cell table:formula="of:=VLOOKUP([.H10];[$FROMVS_Names.$A$1:$FROMVS_Names.$B$151];2;0)" office:value-type="string" office:string-value="epsilon_iota_sigma" calcext:value-type="string">
            <text:p>epsilon_iota_sigma</text:p>
          </table:table-cell>
        </table:table-row>
        <table:table-row table:style-name="ro1">
          <table:table-cell office:value-type="string" calcext:value-type="string">
            <text:p>0xE835</text:p>
          </table:table-cell>
          <table:table-cell office:value-type="string" calcext:value-type="string">
            <text:p>alpha_perispomeni_sigma</text:p>
          </table:table-cell>
          <table:table-cell table:formula="of:=RIGHT([.A11];4)" office:value-type="string" office:string-value="E835" calcext:value-type="string">
            <text:p>E835</text:p>
          </table:table-cell>
          <table:table-cell table:formula="of:=UNICHAR(HEX2DEC([.C11]))" office:value-type="string" office:string-value="" calcext:value-type="string">
            <text:p></text:p>
          </table:table-cell>
          <table:table-cell table:style-name="ce11" office:value-type="string" calcext:value-type="string">
            <text:p>ᾶσ</text:p>
          </table:table-cell>
          <table:table-cell table:style-name="ce16" office:value-type="string" calcext:value-type="string">
            <text:p></text:p>
          </table:table-cell>
          <table:table-cell table:formula="of:=DEC2HEX(UNICODE([.F11]))" office:value-type="string" office:string-value="E864" calcext:value-type="string">
            <text:p>E864</text:p>
          </table:table-cell>
          <table:table-cell table:formula="of:=CONCATENATE(&quot;0x&quot;;[.G11])" office:value-type="string" office:string-value="0xE864" calcext:value-type="string">
            <text:p>0xE864</text:p>
          </table:table-cell>
          <table:table-cell table:formula="of:=VLOOKUP([.H11];[$FROMVS_Names.$A$1:$FROMVS_Names.$B$151];2;0)" office:value-type="string" office:string-value="alpha_perispomeni_sigma" calcext:value-type="string">
            <text:p>alpha_perispomeni_sigma</text:p>
          </table:table-cell>
        </table:table-row>
        <table:table-row table:style-name="ro1">
          <table:table-cell office:value-type="string" calcext:value-type="string">
            <text:p>0xE83B</text:p>
          </table:table-cell>
          <table:table-cell office:value-type="string" calcext:value-type="string">
            <text:p>alpha_sigma_2</text:p>
          </table:table-cell>
          <table:table-cell table:formula="of:=RIGHT([.A12];4)" office:value-type="string" office:string-value="E83B" calcext:value-type="string">
            <text:p>E83B</text:p>
          </table:table-cell>
          <table:table-cell table:formula="of:=UNICHAR(HEX2DEC([.C12]))" office:value-type="string" office:string-value="" calcext:value-type="string">
            <text:p></text:p>
          </table:table-cell>
          <table:table-cell office:value-type="string" calcext:value-type="string">
            <text:p>ασ</text:p>
          </table:table-cell>
          <table:table-cell table:style-name="ce16" office:value-type="string" calcext:value-type="string">
            <text:p></text:p>
          </table:table-cell>
          <table:table-cell table:formula="of:=DEC2HEX(UNICODE([.F12]))" office:value-type="string" office:string-value="E863" calcext:value-type="string">
            <text:p>E863</text:p>
          </table:table-cell>
          <table:table-cell table:formula="of:=CONCATENATE(&quot;0x&quot;;[.G12])" office:value-type="string" office:string-value="0xE863" calcext:value-type="string">
            <text:p>0xE863</text:p>
          </table:table-cell>
          <table:table-cell table:formula="of:=VLOOKUP([.H12];[$FROMVS_Names.$A$1:$FROMVS_Names.$B$151];2;0)" office:value-type="string" office:string-value="alpha_sigma_2" calcext:value-type="string">
            <text:p>alpha_sigma_2</text:p>
          </table:table-cell>
        </table:table-row>
        <table:table-row table:style-name="ro1">
          <table:table-cell office:value-type="string" calcext:value-type="string">
            <text:p>0xE838</text:p>
          </table:table-cell>
          <table:table-cell office:value-type="string" calcext:value-type="string">
            <text:p>alpha_iota_perispomeni_sigma</text:p>
          </table:table-cell>
          <table:table-cell table:formula="of:=RIGHT([.A13];4)" office:value-type="string" office:string-value="E838" calcext:value-type="string">
            <text:p>E838</text:p>
          </table:table-cell>
          <table:table-cell table:formula="of:=UNICHAR(HEX2DEC([.C13]))" office:value-type="string" office:string-value="" calcext:value-type="string">
            <text:p></text:p>
          </table:table-cell>
          <table:table-cell table:style-name="ce10" office:value-type="string" calcext:value-type="string">
            <text:p>αῖσ</text:p>
          </table:table-cell>
          <table:table-cell table:style-name="ce16" office:value-type="string" calcext:value-type="string">
            <text:p></text:p>
          </table:table-cell>
          <table:table-cell table:formula="of:=DEC2HEX(UNICODE([.F13]))" office:value-type="string" office:string-value="E862" calcext:value-type="string">
            <text:p>E862</text:p>
          </table:table-cell>
          <table:table-cell table:formula="of:=CONCATENATE(&quot;0x&quot;;[.G13])" office:value-type="string" office:string-value="0xE862" calcext:value-type="string">
            <text:p>0xE862</text:p>
          </table:table-cell>
          <table:table-cell table:formula="of:=VLOOKUP([.H13];[$FROMVS_Names.$A$1:$FROMVS_Names.$B$151];2;0)" office:value-type="string" office:string-value="alpha_iota_perispomeni_sigma" calcext:value-type="string">
            <text:p>alpha_iota_perispomeni_sigma</text:p>
          </table:table-cell>
        </table:table-row>
        <table:table-row table:style-name="ro1">
          <table:table-cell office:value-type="string" calcext:value-type="string">
            <text:p>0xE837</text:p>
          </table:table-cell>
          <table:table-cell office:value-type="string" calcext:value-type="string">
            <text:p>alpha_nu_2</text:p>
          </table:table-cell>
          <table:table-cell table:formula="of:=RIGHT([.A14];4)" office:value-type="string" office:string-value="E837" calcext:value-type="string">
            <text:p>E837</text:p>
          </table:table-cell>
          <table:table-cell table:formula="of:=UNICHAR(HEX2DEC([.C14]))" office:value-type="string" office:string-value="" calcext:value-type="string">
            <text:p></text:p>
          </table:table-cell>
          <table:table-cell office:value-type="string" calcext:value-type="string">
            <text:p>αν</text:p>
          </table:table-cell>
          <table:table-cell table:style-name="ce15" office:value-type="string" calcext:value-type="string">
            <text:p></text:p>
          </table:table-cell>
          <table:table-cell table:formula="of:=DEC2HEX(UNICODE([.F14]))" office:value-type="string" office:string-value="E861" calcext:value-type="string">
            <text:p>E861</text:p>
          </table:table-cell>
          <table:table-cell table:formula="of:=CONCATENATE(&quot;0x&quot;;[.G14])" office:value-type="string" office:string-value="0xE861" calcext:value-type="string">
            <text:p>0xE861</text:p>
          </table:table-cell>
          <table:table-cell table:formula="of:=VLOOKUP([.H14];[$FROMVS_Names.$A$1:$FROMVS_Names.$B$151];2;0)" office:value-type="string" office:string-value="alpha_nu_2" calcext:value-type="string">
            <text:p>alpha_nu_2</text:p>
          </table:table-cell>
        </table:table-row>
        <table:table-row table:style-name="ro1">
          <table:table-cell office:value-type="string" calcext:value-type="string">
            <text:p>0xE824</text:p>
          </table:table-cell>
          <table:table-cell office:value-type="string" calcext:value-type="string">
            <text:p>alpha_nu_1</text:p>
          </table:table-cell>
          <table:table-cell table:formula="of:=RIGHT([.A15];4)" office:value-type="string" office:string-value="E824" calcext:value-type="string">
            <text:p>E824</text:p>
          </table:table-cell>
          <table:table-cell table:formula="of:=UNICHAR(HEX2DEC([.C15]))" office:value-type="string" office:string-value="" calcext:value-type="string">
            <text:p></text:p>
          </table:table-cell>
          <table:table-cell office:value-type="string" calcext:value-type="string">
            <text:p>αν</text:p>
          </table:table-cell>
          <table:table-cell table:style-name="ce15" office:value-type="string" calcext:value-type="string">
            <text:p></text:p>
          </table:table-cell>
          <table:table-cell table:formula="of:=DEC2HEX(UNICODE([.F15]))" office:value-type="string" office:string-value="E860" calcext:value-type="string">
            <text:p>E860</text:p>
          </table:table-cell>
          <table:table-cell table:formula="of:=CONCATENATE(&quot;0x&quot;;[.G15])" office:value-type="string" office:string-value="0xE860" calcext:value-type="string">
            <text:p>0xE860</text:p>
          </table:table-cell>
          <table:table-cell table:formula="of:=VLOOKUP([.H15];[$FROMVS_Names.$A$1:$FROMVS_Names.$B$151];2;0)" office:value-type="string" office:string-value="alpha_nu" calcext:value-type="string">
            <text:p>alpha_nu</text:p>
          </table:table-cell>
        </table:table-row>
        <table:table-row table:style-name="ro1">
          <table:table-cell office:value-type="string" calcext:value-type="string">
            <text:p>0xE821</text:p>
          </table:table-cell>
          <table:table-cell office:value-type="string" calcext:value-type="string">
            <text:p>slant_2</text:p>
          </table:table-cell>
          <table:table-cell table:formula="of:=RIGHT([.A16];4)" office:value-type="string" office:string-value="E821" calcext:value-type="string">
            <text:p>E821</text:p>
          </table:table-cell>
          <table:table-cell table:formula="of:=UNICHAR(HEX2DEC([.C16]))" office:value-type="string" office:string-value="" calcext:value-type="string">
            <text:p></text:p>
          </table:table-cell>
          <table:table-cell/>
          <table:table-cell table:style-name="ce15" office:value-type="string" calcext:value-type="string">
            <text:p></text:p>
          </table:table-cell>
          <table:table-cell table:formula="of:=DEC2HEX(UNICODE([.F16]))" office:value-type="string" office:string-value="E841" calcext:value-type="string">
            <text:p>E841</text:p>
          </table:table-cell>
          <table:table-cell table:formula="of:=CONCATENATE(&quot;0x&quot;;[.G16])" office:value-type="string" office:string-value="0xE841" calcext:value-type="string">
            <text:p>0xE841</text:p>
          </table:table-cell>
          <table:table-cell table:formula="of:=VLOOKUP([.H16];[$FROMVS_Names.$A$1:$FROMVS_Names.$B$151];2;0)" office:value-type="string" office:string-value="slant_2" calcext:value-type="string">
            <text:p>slant_2</text:p>
          </table:table-cell>
        </table:table-row>
        <table:table-row table:style-name="ro1">
          <table:table-cell office:value-type="string" calcext:value-type="string">
            <text:p>0xE820</text:p>
          </table:table-cell>
          <table:table-cell office:value-type="string" calcext:value-type="string">
            <text:p>slant_1</text:p>
          </table:table-cell>
          <table:table-cell table:formula="of:=RIGHT([.A17];4)" office:value-type="string" office:string-value="E820" calcext:value-type="string">
            <text:p>E820</text:p>
          </table:table-cell>
          <table:table-cell table:formula="of:=UNICHAR(HEX2DEC([.C17]))" office:value-type="string" office:string-value="" calcext:value-type="string">
            <text:p></text:p>
          </table:table-cell>
          <table:table-cell/>
          <table:table-cell table:style-name="ce15" office:value-type="string" calcext:value-type="string">
            <text:p></text:p>
          </table:table-cell>
          <table:table-cell table:formula="of:=DEC2HEX(UNICODE([.F17]))" office:value-type="string" office:string-value="E840" calcext:value-type="string">
            <text:p>E840</text:p>
          </table:table-cell>
          <table:table-cell table:formula="of:=CONCATENATE(&quot;0x&quot;;[.G17])" office:value-type="string" office:string-value="0xE840" calcext:value-type="string">
            <text:p>0xE840</text:p>
          </table:table-cell>
          <table:table-cell table:formula="of:=VLOOKUP([.H17];[$FROMVS_Names.$A$1:$FROMVS_Names.$B$151];2;0)" office:value-type="string" office:string-value="slant_1" calcext:value-type="string">
            <text:p>slant_1</text:p>
          </table:table-cell>
        </table:table-row>
        <table:table-row table:style-name="ro1">
          <table:table-cell office:value-type="string" calcext:value-type="string">
            <text:p>0xE830</text:p>
          </table:table-cell>
          <table:table-cell office:value-type="string" calcext:value-type="string">
            <text:p>omega_perispomeni_sigma</text:p>
          </table:table-cell>
          <table:table-cell table:formula="of:=RIGHT([.A18];4)" office:value-type="string" office:string-value="E830" calcext:value-type="string">
            <text:p>E830</text:p>
          </table:table-cell>
          <table:table-cell table:formula="of:=UNICHAR(HEX2DEC([.C18]))" office:value-type="string" office:string-value="" calcext:value-type="string">
            <text:p></text:p>
          </table:table-cell>
          <table:table-cell office:value-type="string" calcext:value-type="string">
            <text:p><text:span text:style-name="T1">ῶ</text:span>σ</text:p>
          </table:table-cell>
          <table:table-cell table:style-name="ce16" office:value-type="string" calcext:value-type="string">
            <text:p></text:p>
          </table:table-cell>
          <table:table-cell table:formula="of:=DEC2HEX(UNICODE([.F18]))" office:value-type="string" office:string-value="E820" calcext:value-type="string">
            <text:p>E820</text:p>
          </table:table-cell>
          <table:table-cell table:formula="of:=CONCATENATE(&quot;0x&quot;;[.G18])" office:value-type="string" office:string-value="0xE820" calcext:value-type="string">
            <text:p>0xE820</text:p>
          </table:table-cell>
          <table:table-cell table:formula="of:=VLOOKUP([.H18];[$FROMVS_Names.$A$1:$FROMVS_Names.$B$151];2;0)" office:value-type="string" office:string-value="omega_perispomeni_sigma" calcext:value-type="string">
            <text:p>omega_perispomeni_sigma</text:p>
          </table:table-cell>
        </table:table-row>
        <table:table-row table:style-name="ro1">
          <table:table-cell office:value-type="string" calcext:value-type="string">
            <text:p>0xE810</text:p>
          </table:table-cell>
          <table:table-cell office:value-type="string" calcext:value-type="string">
            <text:p>chi_rho</text:p>
          </table:table-cell>
          <table:table-cell table:formula="of:=RIGHT([.A19];4)" office:value-type="string" office:string-value="E810" calcext:value-type="string">
            <text:p>E810</text:p>
          </table:table-cell>
          <table:table-cell table:formula="of:=UNICHAR(HEX2DEC([.C19]))" office:value-type="string" office:string-value="" calcext:value-type="string">
            <text:p></text:p>
          </table:table-cell>
          <table:table-cell office:value-type="string" calcext:value-type="string">
            <text:p>χρ</text:p>
          </table:table-cell>
          <table:table-cell table:style-name="ce15" office:value-type="string" calcext:value-type="string">
            <text:p></text:p>
          </table:table-cell>
          <table:table-cell table:formula="of:=DEC2HEX(UNICODE([.F19]))" office:value-type="string" office:string-value="E811" calcext:value-type="string">
            <text:p>E811</text:p>
          </table:table-cell>
          <table:table-cell table:formula="of:=CONCATENATE(&quot;0x&quot;;[.G19])" office:value-type="string" office:string-value="0xE811" calcext:value-type="string">
            <text:p>0xE811</text:p>
          </table:table-cell>
          <table:table-cell table:formula="of:=VLOOKUP([.H19];[$FROMVS_Names.$A$1:$FROMVS_Names.$B$151];2;0)" office:value-type="string" office:string-value="chi_rho" calcext:value-type="string">
            <text:p>chi_rho</text:p>
          </table:table-cell>
        </table:table-row>
        <table:table-row table:style-name="ro1">
          <table:table-cell office:value-type="string" calcext:value-type="string">
            <text:p>0xE82F</text:p>
          </table:table-cell>
          <table:table-cell office:value-type="string" calcext:value-type="string">
            <text:p>chi_psili</text:p>
          </table:table-cell>
          <table:table-cell table:formula="of:=RIGHT([.A20];4)" office:value-type="string" office:string-value="E82F" calcext:value-type="string">
            <text:p>E82F</text:p>
          </table:table-cell>
          <table:table-cell table:formula="of:=UNICHAR(HEX2DEC([.C20]))" office:value-type="string" office:string-value="" calcext:value-type="string">
            <text:p></text:p>
          </table:table-cell>
          <table:table-cell office:value-type="string" calcext:value-type="string">
            <text:p>χ'</text:p>
          </table:table-cell>
          <table:table-cell table:style-name="ce16" office:value-type="string" calcext:value-type="string">
            <text:p></text:p>
          </table:table-cell>
          <table:table-cell table:formula="of:=DEC2HEX(UNICODE([.F20]))" office:value-type="string" office:string-value="E810" calcext:value-type="string">
            <text:p>E810</text:p>
          </table:table-cell>
          <table:table-cell table:formula="of:=CONCATENATE(&quot;0x&quot;;[.G20])" office:value-type="string" office:string-value="0xE810" calcext:value-type="string">
            <text:p>0xE810</text:p>
          </table:table-cell>
          <table:table-cell table:formula="of:=VLOOKUP([.H20];[$FROMVS_Names.$A$1:$FROMVS_Names.$B$151];2;0)" office:value-type="string" office:string-value="chi_psili" calcext:value-type="string">
            <text:p>chi_psili</text:p>
          </table:table-cell>
        </table:table-row>
        <table:table-row table:style-name="ro1">
          <table:table-cell office:value-type="string" calcext:value-type="string">
            <text:p>0xE7F5</text:p>
          </table:table-cell>
          <table:table-cell office:value-type="string" calcext:value-type="string">
            <text:p>upsilon_psili_perispomeni_nu</text:p>
          </table:table-cell>
          <table:table-cell table:formula="of:=RIGHT([.A21];4)" office:value-type="string" office:string-value="E7F5" calcext:value-type="string">
            <text:p>E7F5</text:p>
          </table:table-cell>
          <table:table-cell table:formula="of:=UNICHAR(HEX2DEC([.C21]))" office:value-type="string" office:string-value="" calcext:value-type="string">
            <text:p></text:p>
          </table:table-cell>
          <table:table-cell office:value-type="string" calcext:value-type="string">
            <text:p>ὖν</text:p>
          </table:table-cell>
          <table:table-cell table:style-name="ce15" office:value-type="string" calcext:value-type="string">
            <text:p></text:p>
          </table:table-cell>
          <table:table-cell table:formula="of:=DEC2HEX(UNICODE([.F21]))" office:value-type="string" office:string-value="E7F7" calcext:value-type="string">
            <text:p>E7F7</text:p>
          </table:table-cell>
          <table:table-cell table:formula="of:=CONCATENATE(&quot;0x&quot;;[.G21])" office:value-type="string" office:string-value="0xE7F7" calcext:value-type="string">
            <text:p>0xE7F7</text:p>
          </table:table-cell>
          <table:table-cell table:style-name="ce19" table:formula="of:=VLOOKUP([.H21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F3</text:p>
          </table:table-cell>
          <table:table-cell office:value-type="string" calcext:value-type="string">
            <text:p>upsilon_perispomeni_nu</text:p>
          </table:table-cell>
          <table:table-cell table:formula="of:=RIGHT([.A22];4)" office:value-type="string" office:string-value="E7F3" calcext:value-type="string">
            <text:p>E7F3</text:p>
          </table:table-cell>
          <table:table-cell table:formula="of:=UNICHAR(HEX2DEC([.C22]))" office:value-type="string" office:string-value="" calcext:value-type="string">
            <text:p></text:p>
          </table:table-cell>
          <table:table-cell office:value-type="string" calcext:value-type="string">
            <text:p>ῦν</text:p>
          </table:table-cell>
          <table:table-cell table:style-name="ce15" office:value-type="string" calcext:value-type="string">
            <text:p></text:p>
          </table:table-cell>
          <table:table-cell table:formula="of:=DEC2HEX(UNICODE([.F22]))" office:value-type="string" office:string-value="E7F6" calcext:value-type="string">
            <text:p>E7F6</text:p>
          </table:table-cell>
          <table:table-cell table:formula="of:=CONCATENATE(&quot;0x&quot;;[.G22])" office:value-type="string" office:string-value="0xE7F6" calcext:value-type="string">
            <text:p>0xE7F6</text:p>
          </table:table-cell>
          <table:table-cell table:style-name="ce19" table:formula="of:=VLOOKUP([.H22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832</text:p>
          </table:table-cell>
          <table:table-cell office:value-type="string" calcext:value-type="string">
            <text:p>upsilon_varia_nu</text:p>
          </table:table-cell>
          <table:table-cell table:formula="of:=RIGHT([.A23];4)" office:value-type="string" office:string-value="E832" calcext:value-type="string">
            <text:p>E832</text:p>
          </table:table-cell>
          <table:table-cell table:formula="of:=UNICHAR(HEX2DEC([.C23]))" office:value-type="string" office:string-value="" calcext:value-type="string">
            <text:p></text:p>
          </table:table-cell>
          <table:table-cell table:style-name="ce11" office:value-type="string" calcext:value-type="string">
            <text:p>ὺν</text:p>
          </table:table-cell>
          <table:table-cell table:style-name="ce16" office:value-type="string" calcext:value-type="string">
            <text:p></text:p>
          </table:table-cell>
          <table:table-cell table:formula="of:=DEC2HEX(UNICODE([.F23]))" office:value-type="string" office:string-value="E7F5" calcext:value-type="string">
            <text:p>E7F5</text:p>
          </table:table-cell>
          <table:table-cell table:formula="of:=CONCATENATE(&quot;0x&quot;;[.G23])" office:value-type="string" office:string-value="0xE7F5" calcext:value-type="string">
            <text:p>0xE7F5</text:p>
          </table:table-cell>
          <table:table-cell table:style-name="ce19" table:formula="of:=VLOOKUP([.H23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F2</text:p>
          </table:table-cell>
          <table:table-cell office:value-type="string" calcext:value-type="string">
            <text:p>upsilon_oxia_nu</text:p>
          </table:table-cell>
          <table:table-cell table:formula="of:=RIGHT([.A24];4)" office:value-type="string" office:string-value="E7F2" calcext:value-type="string">
            <text:p>E7F2</text:p>
          </table:table-cell>
          <table:table-cell table:formula="of:=UNICHAR(HEX2DEC([.C24]))" office:value-type="string" office:string-value="" calcext:value-type="string">
            <text:p></text:p>
          </table:table-cell>
          <table:table-cell table:style-name="ce11" office:value-type="string" calcext:value-type="string">
            <text:p>ύν</text:p>
          </table:table-cell>
          <table:table-cell table:style-name="ce12" office:value-type="string" calcext:value-type="string">
            <text:p></text:p>
          </table:table-cell>
          <table:table-cell table:formula="of:=DEC2HEX(UNICODE([.F24]))" office:value-type="string" office:string-value="E7F4" calcext:value-type="string">
            <text:p>E7F4</text:p>
          </table:table-cell>
          <table:table-cell table:formula="of:=CONCATENATE(&quot;0x&quot;;[.G24])" office:value-type="string" office:string-value="0xE7F4" calcext:value-type="string">
            <text:p>0xE7F4</text:p>
          </table:table-cell>
          <table:table-cell table:style-name="ce19" table:formula="of:=VLOOKUP([.H24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F1</text:p>
          </table:table-cell>
          <table:table-cell office:value-type="string" calcext:value-type="string">
            <text:p>upsilon_nu</text:p>
          </table:table-cell>
          <table:table-cell table:formula="of:=RIGHT([.A25];4)" office:value-type="string" office:string-value="E7F1" calcext:value-type="string">
            <text:p>E7F1</text:p>
          </table:table-cell>
          <table:table-cell table:formula="of:=UNICHAR(HEX2DEC([.C25]))" office:value-type="string" office:string-value="" calcext:value-type="string">
            <text:p></text:p>
          </table:table-cell>
          <table:table-cell office:value-type="string" calcext:value-type="string">
            <text:p>υν</text:p>
          </table:table-cell>
          <table:table-cell office:value-type="string" calcext:value-type="string">
            <text:p></text:p>
          </table:table-cell>
          <table:table-cell table:formula="of:=DEC2HEX(UNICODE([.F25]))" office:value-type="string" office:string-value="E7F3" calcext:value-type="string">
            <text:p>E7F3</text:p>
          </table:table-cell>
          <table:table-cell table:formula="of:=CONCATENATE(&quot;0x&quot;;[.G25])" office:value-type="string" office:string-value="0xE7F3" calcext:value-type="string">
            <text:p>0xE7F3</text:p>
          </table:table-cell>
          <table:table-cell table:style-name="ce19" table:formula="of:=VLOOKUP([.H25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F4</text:p>
          </table:table-cell>
          <table:table-cell office:value-type="string" calcext:value-type="string">
            <text:p>upsilon_perispomeni</text:p>
          </table:table-cell>
          <table:table-cell table:formula="of:=RIGHT([.A26];4)" office:value-type="string" office:string-value="E7F4" calcext:value-type="string">
            <text:p>E7F4</text:p>
          </table:table-cell>
          <table:table-cell table:formula="of:=UNICHAR(HEX2DEC([.C26]))" office:value-type="string" office:string-value="" calcext:value-type="string">
            <text:p></text:p>
          </table:table-cell>
          <table:table-cell office:value-type="string" calcext:value-type="string">
            <text:p>ῦ</text:p>
          </table:table-cell>
          <table:table-cell table:style-name="ce15" office:value-type="string" calcext:value-type="string">
            <text:p></text:p>
          </table:table-cell>
          <table:table-cell table:formula="of:=DEC2HEX(UNICODE([.F26]))" office:value-type="string" office:string-value="E7F2" calcext:value-type="string">
            <text:p>E7F2</text:p>
          </table:table-cell>
          <table:table-cell table:formula="of:=CONCATENATE(&quot;0x&quot;;[.G26])" office:value-type="string" office:string-value="0xE7F2" calcext:value-type="string">
            <text:p>0xE7F2</text:p>
          </table:table-cell>
          <table:table-cell table:formula="of:=VLOOKUP([.H26];[$FROMVS_Names.$A$1:$FROMVS_Names.$B$151];2;0)" office:value-type="string" office:string-value="upsilon_perispomeni" calcext:value-type="string">
            <text:p>upsilon_perispomeni</text:p>
          </table:table-cell>
        </table:table-row>
        <table:table-row table:style-name="ro1">
          <table:table-cell office:value-type="string" calcext:value-type="string">
            <text:p>0xE836</text:p>
          </table:table-cell>
          <table:table-cell office:value-type="string" calcext:value-type="string">
            <text:p>upsilon_tonos</text:p>
          </table:table-cell>
          <table:table-cell table:formula="of:=RIGHT([.A27];4)" office:value-type="string" office:string-value="E836" calcext:value-type="string">
            <text:p>E836</text:p>
          </table:table-cell>
          <table:table-cell table:formula="of:=UNICHAR(HEX2DEC([.C27]))" office:value-type="string" office:string-value="" calcext:value-type="string">
            <text:p></text:p>
          </table:table-cell>
          <table:table-cell table:style-name="ce10" office:value-type="string" calcext:value-type="string">
            <text:p>ύ</text:p>
          </table:table-cell>
          <table:table-cell table:style-name="ce15" office:value-type="string" calcext:value-type="string">
            <text:p></text:p>
          </table:table-cell>
          <table:table-cell table:formula="of:=DEC2HEX(UNICODE([.F27]))" office:value-type="string" office:string-value="E7F1" calcext:value-type="string">
            <text:p>E7F1</text:p>
          </table:table-cell>
          <table:table-cell table:formula="of:=CONCATENATE(&quot;0x&quot;;[.G27])" office:value-type="string" office:string-value="0xE7F1" calcext:value-type="string">
            <text:p>0xE7F1</text:p>
          </table:table-cell>
          <table:table-cell table:formula="of:=VLOOKUP([.H27];[$FROMVS_Names.$A$1:$FROMVS_Names.$B$151];2;0)" office:value-type="string" office:string-value="upsilon_tonos" calcext:value-type="string">
            <text:p>upsilon_tonos</text:p>
          </table:table-cell>
        </table:table-row>
        <table:table-row table:style-name="ro1">
          <table:table-cell office:value-type="string" calcext:value-type="string">
            <text:p>0xE7E7</text:p>
          </table:table-cell>
          <table:table-cell office:value-type="string" calcext:value-type="string">
            <text:p>tau_omega_perispomeni_nu_2</text:p>
          </table:table-cell>
          <table:table-cell table:formula="of:=RIGHT([.A28];4)" office:value-type="string" office:string-value="E7E7" calcext:value-type="string">
            <text:p>E7E7</text:p>
          </table:table-cell>
          <table:table-cell table:formula="of:=UNICHAR(HEX2DEC([.C28]))" office:value-type="string" office:string-value="" calcext:value-type="string">
            <text:p></text:p>
          </table:table-cell>
          <table:table-cell office:value-type="string" calcext:value-type="string">
            <text:p>τῶν</text:p>
          </table:table-cell>
          <table:table-cell table:style-name="ce15" office:value-type="string" calcext:value-type="string">
            <text:p></text:p>
          </table:table-cell>
          <table:table-cell table:formula="of:=DEC2HEX(UNICODE([.F28]))" office:value-type="string" office:string-value="E7EA" calcext:value-type="string">
            <text:p>E7EA</text:p>
          </table:table-cell>
          <table:table-cell table:formula="of:=CONCATENATE(&quot;0x&quot;;[.G28])" office:value-type="string" office:string-value="0xE7EA" calcext:value-type="string">
            <text:p>0xE7EA</text:p>
          </table:table-cell>
          <table:table-cell table:formula="of:=VLOOKUP([.H28];[$FROMVS_Names.$A$1:$FROMVS_Names.$B$151];2;0)" office:value-type="string" office:string-value="tau_omega_perispomeni_nu_2" calcext:value-type="string">
            <text:p>tau_omega_perispomeni_nu_2</text:p>
          </table:table-cell>
        </table:table-row>
        <table:table-row table:style-name="ro1">
          <table:table-cell office:value-type="string" calcext:value-type="string">
            <text:p>0xE7E6</text:p>
          </table:table-cell>
          <table:table-cell office:value-type="string" calcext:value-type="string">
            <text:p>tau_omega_perispomeni_nu_1</text:p>
          </table:table-cell>
          <table:table-cell table:formula="of:=RIGHT([.A29];4)" office:value-type="string" office:string-value="E7E6" calcext:value-type="string">
            <text:p>E7E6</text:p>
          </table:table-cell>
          <table:table-cell table:formula="of:=UNICHAR(HEX2DEC([.C29]))" office:value-type="string" office:string-value="" calcext:value-type="string">
            <text:p></text:p>
          </table:table-cell>
          <table:table-cell office:value-type="string" calcext:value-type="string">
            <text:p>τῶν</text:p>
          </table:table-cell>
          <table:table-cell table:style-name="ce17" office:value-type="string" calcext:value-type="string">
            <text:p></text:p>
          </table:table-cell>
          <table:table-cell table:formula="of:=DEC2HEX(UNICODE([.F29]))" office:value-type="string" office:string-value="E7E9" calcext:value-type="string">
            <text:p>E7E9</text:p>
          </table:table-cell>
          <table:table-cell table:formula="of:=CONCATENATE(&quot;0x&quot;;[.G29])" office:value-type="string" office:string-value="0xE7E9" calcext:value-type="string">
            <text:p>0xE7E9</text:p>
          </table:table-cell>
          <table:table-cell table:formula="of:=VLOOKUP([.H29];[$FROMVS_Names.$A$1:$FROMVS_Names.$B$151];2;0)" office:value-type="string" office:string-value="tau_omega_perispomeni_nu" calcext:value-type="string">
            <text:p>tau_omega_perispomeni_nu</text:p>
          </table:table-cell>
        </table:table-row>
        <table:table-row table:style-name="ro1">
          <table:table-cell office:value-type="string" calcext:value-type="string">
            <text:p>0xE7E5</text:p>
          </table:table-cell>
          <table:table-cell office:value-type="string" calcext:value-type="string">
            <text:p>tau_omega_perispomeni_prosgegrammeni</text:p>
          </table:table-cell>
          <table:table-cell table:formula="of:=RIGHT([.A30];4)" office:value-type="string" office:string-value="E7E5" calcext:value-type="string">
            <text:p>E7E5</text:p>
          </table:table-cell>
          <table:table-cell table:formula="of:=UNICHAR(HEX2DEC([.C30]))" office:value-type="string" office:string-value="" calcext:value-type="string">
            <text:p></text:p>
          </table:table-cell>
          <table:table-cell office:value-type="string" calcext:value-type="string">
            <text:p>τῷ</text:p>
          </table:table-cell>
          <table:table-cell table:style-name="ce15" office:value-type="string" calcext:value-type="string">
            <text:p></text:p>
          </table:table-cell>
          <table:table-cell table:formula="of:=DEC2HEX(UNICODE([.F30]))" office:value-type="string" office:string-value="E7E8" calcext:value-type="string">
            <text:p>E7E8</text:p>
          </table:table-cell>
          <table:table-cell table:formula="of:=CONCATENATE(&quot;0x&quot;;[.G30])" office:value-type="string" office:string-value="0xE7E8" calcext:value-type="string">
            <text:p>0xE7E8</text:p>
          </table:table-cell>
          <table:table-cell table:formula="of:=VLOOKUP([.H30];[$FROMVS_Names.$A$1:$FROMVS_Names.$B$151];2;0)" office:value-type="string" office:string-value="tau_omega_perispomeni_prosgegrammeni" calcext:value-type="string">
            <text:p>tau_omega_perispomeni_prosgegrammeni</text:p>
          </table:table-cell>
        </table:table-row>
        <table:table-row table:style-name="ro1">
          <table:table-cell office:value-type="string" calcext:value-type="string">
            <text:p>0xE7E4</text:p>
          </table:table-cell>
          <table:table-cell office:value-type="string" calcext:value-type="string">
            <text:p>tau_tall_tau</text:p>
          </table:table-cell>
          <table:table-cell table:formula="of:=RIGHT([.A31];4)" office:value-type="string" office:string-value="E7E4" calcext:value-type="string">
            <text:p>E7E4</text:p>
          </table:table-cell>
          <table:table-cell table:formula="of:=UNICHAR(HEX2DEC([.C31]))" office:value-type="string" office:string-value="" calcext:value-type="string">
            <text:p></text:p>
          </table:table-cell>
          <table:table-cell office:value-type="string" calcext:value-type="string">
            <text:p>ττ</text:p>
          </table:table-cell>
          <table:table-cell office:value-type="string" calcext:value-type="string">
            <text:p></text:p>
          </table:table-cell>
          <table:table-cell table:formula="of:=DEC2HEX(UNICODE([.F31]))" office:value-type="string" office:string-value="E7E7" calcext:value-type="string">
            <text:p>E7E7</text:p>
          </table:table-cell>
          <table:table-cell table:formula="of:=CONCATENATE(&quot;0x&quot;;[.G31])" office:value-type="string" office:string-value="0xE7E7" calcext:value-type="string">
            <text:p>0xE7E7</text:p>
          </table:table-cell>
          <table:table-cell table:formula="of:=VLOOKUP([.H31];[$FROMVS_Names.$A$1:$FROMVS_Names.$B$151];2;0)" office:value-type="string" office:string-value="tau_tall_tau" calcext:value-type="string">
            <text:p>tau_tall_tau</text:p>
          </table:table-cell>
        </table:table-row>
        <table:table-row table:style-name="ro1">
          <table:table-cell office:value-type="string" calcext:value-type="string">
            <text:p>0xE7E3</text:p>
          </table:table-cell>
          <table:table-cell office:value-type="string" calcext:value-type="string">
            <text:p>tau_rho_2</text:p>
          </table:table-cell>
          <table:table-cell table:formula="of:=RIGHT([.A32];4)" office:value-type="string" office:string-value="E7E3" calcext:value-type="string">
            <text:p>E7E3</text:p>
          </table:table-cell>
          <table:table-cell table:formula="of:=UNICHAR(HEX2DEC([.C32]))" office:value-type="string" office:string-value="" calcext:value-type="string">
            <text:p>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</text:p>
          </table:table-cell>
          <table:table-cell table:formula="of:=DEC2HEX(UNICODE([.F32]))" office:value-type="string" office:string-value="E7E6" calcext:value-type="string">
            <text:p>E7E6</text:p>
          </table:table-cell>
          <table:table-cell table:formula="of:=CONCATENATE(&quot;0x&quot;;[.G32])" office:value-type="string" office:string-value="0xE7E6" calcext:value-type="string">
            <text:p>0xE7E6</text:p>
          </table:table-cell>
          <table:table-cell table:formula="of:=VLOOKUP([.H32];[$FROMVS_Names.$A$1:$FROMVS_Names.$B$151];2;0)" office:value-type="string" office:string-value="tau_rho_2" calcext:value-type="string">
            <text:p>tau_rho_2</text:p>
          </table:table-cell>
        </table:table-row>
        <table:table-row table:style-name="ro1">
          <table:table-cell office:value-type="string" calcext:value-type="string">
            <text:p>0xE7E2</text:p>
          </table:table-cell>
          <table:table-cell office:value-type="string" calcext:value-type="string">
            <text:p>tau_rho_1</text:p>
          </table:table-cell>
          <table:table-cell table:formula="of:=RIGHT([.A33];4)" office:value-type="string" office:string-value="E7E2" calcext:value-type="string">
            <text:p>E7E2</text:p>
          </table:table-cell>
          <table:table-cell table:formula="of:=UNICHAR(HEX2DEC([.C33]))" office:value-type="string" office:string-value="" calcext:value-type="string">
            <text:p></text:p>
          </table:table-cell>
          <table:table-cell office:value-type="string" calcext:value-type="string">
            <text:p>τρ</text:p>
          </table:table-cell>
          <table:table-cell table:style-name="ce15" office:value-type="string" calcext:value-type="string">
            <text:p></text:p>
          </table:table-cell>
          <table:table-cell table:formula="of:=DEC2HEX(UNICODE([.F33]))" office:value-type="string" office:string-value="E7E5" calcext:value-type="string">
            <text:p>E7E5</text:p>
          </table:table-cell>
          <table:table-cell table:formula="of:=CONCATENATE(&quot;0x&quot;;[.G33])" office:value-type="string" office:string-value="0xE7E5" calcext:value-type="string">
            <text:p>0xE7E5</text:p>
          </table:table-cell>
          <table:table-cell table:formula="of:=VLOOKUP([.H33];[$FROMVS_Names.$A$1:$FROMVS_Names.$B$151];2;0)" office:value-type="string" office:string-value="tau_rho" calcext:value-type="string">
            <text:p>tau_rho</text:p>
          </table:table-cell>
        </table:table-row>
        <table:table-row table:style-name="ro1">
          <table:table-cell office:value-type="string" calcext:value-type="string">
            <text:p>0xE7E1</text:p>
          </table:table-cell>
          <table:table-cell office:value-type="string" calcext:value-type="string">
            <text:p>tau_omicron_upsilon_perispomeni_2</text:p>
          </table:table-cell>
          <table:table-cell table:formula="of:=RIGHT([.A34];4)" office:value-type="string" office:string-value="E7E1" calcext:value-type="string">
            <text:p>E7E1</text:p>
          </table:table-cell>
          <table:table-cell table:formula="of:=UNICHAR(HEX2DEC([.C34]))" office:value-type="string" office:string-value="" calcext:value-type="string">
            <text:p>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</text:p>
          </table:table-cell>
          <table:table-cell table:formula="of:=DEC2HEX(UNICODE([.F34]))" office:value-type="string" office:string-value="E7E4" calcext:value-type="string">
            <text:p>E7E4</text:p>
          </table:table-cell>
          <table:table-cell table:formula="of:=CONCATENATE(&quot;0x&quot;;[.G34])" office:value-type="string" office:string-value="0xE7E4" calcext:value-type="string">
            <text:p>0xE7E4</text:p>
          </table:table-cell>
          <table:table-cell table:formula="of:=VLOOKUP([.H34];[$FROMVS_Names.$A$1:$FROMVS_Names.$B$151];2;0)" office:value-type="string" office:string-value="tau_omicron_upsilon_perispomeni_2" calcext:value-type="string">
            <text:p>tau_omicron_upsilon_perispomeni_2</text:p>
          </table:table-cell>
        </table:table-row>
        <table:table-row table:style-name="ro1">
          <table:table-cell office:value-type="string" calcext:value-type="string">
            <text:p>0xE7E0</text:p>
          </table:table-cell>
          <table:table-cell office:value-type="string" calcext:value-type="string">
            <text:p>tau_omicron_upsilon_perispomeni_1</text:p>
          </table:table-cell>
          <table:table-cell table:formula="of:=RIGHT([.A35];4)" office:value-type="string" office:string-value="E7E0" calcext:value-type="string">
            <text:p>E7E0</text:p>
          </table:table-cell>
          <table:table-cell table:formula="of:=UNICHAR(HEX2DEC([.C35]))" office:value-type="string" office:string-value="" calcext:value-type="string">
            <text:p>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</text:p>
          </table:table-cell>
          <table:table-cell table:formula="of:=DEC2HEX(UNICODE([.F35]))" office:value-type="string" office:string-value="E7E3" calcext:value-type="string">
            <text:p>E7E3</text:p>
          </table:table-cell>
          <table:table-cell table:formula="of:=CONCATENATE(&quot;0x&quot;;[.G35])" office:value-type="string" office:string-value="0xE7E3" calcext:value-type="string">
            <text:p>0xE7E3</text:p>
          </table:table-cell>
          <table:table-cell table:formula="of:=VLOOKUP([.H35];[$FROMVS_Names.$A$1:$FROMVS_Names.$B$151];2;0)" office:value-type="string" office:string-value="tau_omicron_upsilon_perispomeni" calcext:value-type="string">
            <text:p>tau_omicron_upsilon_perispomeni</text:p>
          </table:table-cell>
        </table:table-row>
        <table:table-row table:style-name="ro1">
          <table:table-cell office:value-type="string" calcext:value-type="string">
            <text:p>0xE7DF</text:p>
          </table:table-cell>
          <table:table-cell office:value-type="string" calcext:value-type="string">
            <text:p>tau_tall_omicron_sigma</text:p>
          </table:table-cell>
          <table:table-cell table:formula="of:=RIGHT([.A36];4)" office:value-type="string" office:string-value="E7DF" calcext:value-type="string">
            <text:p>E7DF</text:p>
          </table:table-cell>
          <table:table-cell table:formula="of:=UNICHAR(HEX2DEC([.C36]))" office:value-type="string" office:string-value="" calcext:value-type="string">
            <text:p></text:p>
          </table:table-cell>
          <table:table-cell office:value-type="string" calcext:value-type="string">
            <text:p>τοσ</text:p>
          </table:table-cell>
          <table:table-cell office:value-type="string" calcext:value-type="string">
            <text:p></text:p>
          </table:table-cell>
          <table:table-cell table:formula="of:=DEC2HEX(UNICODE([.F36]))" office:value-type="string" office:string-value="E7E2" calcext:value-type="string">
            <text:p>E7E2</text:p>
          </table:table-cell>
          <table:table-cell table:formula="of:=CONCATENATE(&quot;0x&quot;;[.G36])" office:value-type="string" office:string-value="0xE7E2" calcext:value-type="string">
            <text:p>0xE7E2</text:p>
          </table:table-cell>
          <table:table-cell table:formula="of:=VLOOKUP([.H36];[$FROMVS_Names.$A$1:$FROMVS_Names.$B$151];2;0)" office:value-type="string" office:string-value="tau_tall_omicron_sigma" calcext:value-type="string">
            <text:p>tau_tall_omicron_sigma</text:p>
          </table:table-cell>
        </table:table-row>
        <table:table-row table:style-name="ro1">
          <table:table-cell office:value-type="string" calcext:value-type="string">
            <text:p>0xE7DE</text:p>
          </table:table-cell>
          <table:table-cell office:value-type="string" calcext:value-type="string">
            <text:p>tau_omicron_varia_nu</text:p>
          </table:table-cell>
          <table:table-cell table:formula="of:=RIGHT([.A37];4)" office:value-type="string" office:string-value="E7DE" calcext:value-type="string">
            <text:p>E7DE</text:p>
          </table:table-cell>
          <table:table-cell table:formula="of:=UNICHAR(HEX2DEC([.C37]))" office:value-type="string" office:string-value="" calcext:value-type="string">
            <text:p></text:p>
          </table:table-cell>
          <table:table-cell office:value-type="string" calcext:value-type="string">
            <text:p>τὸν</text:p>
          </table:table-cell>
          <table:table-cell office:value-type="string" calcext:value-type="string">
            <text:p></text:p>
          </table:table-cell>
          <table:table-cell table:formula="of:=DEC2HEX(UNICODE([.F37]))" office:value-type="string" office:string-value="E7E1" calcext:value-type="string">
            <text:p>E7E1</text:p>
          </table:table-cell>
          <table:table-cell table:formula="of:=CONCATENATE(&quot;0x&quot;;[.G37])" office:value-type="string" office:string-value="0xE7E1" calcext:value-type="string">
            <text:p>0xE7E1</text:p>
          </table:table-cell>
          <table:table-cell table:formula="of:=VLOOKUP([.H37];[$FROMVS_Names.$A$1:$FROMVS_Names.$B$151];2;0)" office:value-type="string" office:string-value="tau_omicron_varia_nu" calcext:value-type="string">
            <text:p>tau_omicron_varia_nu</text:p>
          </table:table-cell>
        </table:table-row>
        <table:table-row table:style-name="ro1">
          <table:table-cell office:value-type="string" calcext:value-type="string">
            <text:p>0xE7DD</text:p>
          </table:table-cell>
          <table:table-cell office:value-type="string" calcext:value-type="string">
            <text:p>tau_omicron_4_varia</text:p>
          </table:table-cell>
          <table:table-cell table:formula="of:=RIGHT([.A38];4)" office:value-type="string" office:string-value="E7DD" calcext:value-type="string">
            <text:p>E7DD</text:p>
          </table:table-cell>
          <table:table-cell table:formula="of:=UNICHAR(HEX2DEC([.C38]))" office:value-type="string" office:string-value="" calcext:value-type="string">
            <text:p>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</text:p>
          </table:table-cell>
          <table:table-cell table:formula="of:=DEC2HEX(UNICODE([.F38]))" office:value-type="string" office:string-value="E7E0" calcext:value-type="string">
            <text:p>E7E0</text:p>
          </table:table-cell>
          <table:table-cell table:formula="of:=CONCATENATE(&quot;0x&quot;;[.G38])" office:value-type="string" office:string-value="0xE7E0" calcext:value-type="string">
            <text:p>0xE7E0</text:p>
          </table:table-cell>
          <table:table-cell table:formula="of:=VLOOKUP([.H38];[$FROMVS_Names.$A$1:$FROMVS_Names.$B$151];2;0)" office:value-type="string" office:string-value="tau_omicron_varia_4" calcext:value-type="string">
            <text:p>tau_omicron_varia_4</text:p>
          </table:table-cell>
        </table:table-row>
        <table:table-row table:style-name="ro1">
          <table:table-cell office:value-type="string" calcext:value-type="string">
            <text:p>0xE7DC</text:p>
          </table:table-cell>
          <table:table-cell office:value-type="string" calcext:value-type="string">
            <text:p>tau_omicron_3_varia</text:p>
          </table:table-cell>
          <table:table-cell table:formula="of:=RIGHT([.A39];4)" office:value-type="string" office:string-value="E7DC" calcext:value-type="string">
            <text:p>E7DC</text:p>
          </table:table-cell>
          <table:table-cell table:formula="of:=UNICHAR(HEX2DEC([.C39]))" office:value-type="string" office:string-value="" calcext:value-type="string">
            <text:p>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</text:p>
          </table:table-cell>
          <table:table-cell table:formula="of:=DEC2HEX(UNICODE([.F39]))" office:value-type="string" office:string-value="E7DF" calcext:value-type="string">
            <text:p>E7DF</text:p>
          </table:table-cell>
          <table:table-cell table:formula="of:=CONCATENATE(&quot;0x&quot;;[.G39])" office:value-type="string" office:string-value="0xE7DF" calcext:value-type="string">
            <text:p>0xE7DF</text:p>
          </table:table-cell>
          <table:table-cell table:formula="of:=VLOOKUP([.H39];[$FROMVS_Names.$A$1:$FROMVS_Names.$B$151];2;0)" office:value-type="string" office:string-value="tau_omicron_varia_3" calcext:value-type="string">
            <text:p>tau_omicron_varia_3</text:p>
          </table:table-cell>
        </table:table-row>
        <table:table-row table:style-name="ro1">
          <table:table-cell office:value-type="string" calcext:value-type="string">
            <text:p>0xE7DB</text:p>
          </table:table-cell>
          <table:table-cell office:value-type="string" calcext:value-type="string">
            <text:p>tau_omicron_2_varia</text:p>
          </table:table-cell>
          <table:table-cell table:formula="of:=RIGHT([.A40];4)" office:value-type="string" office:string-value="E7DB" calcext:value-type="string">
            <text:p>E7DB</text:p>
          </table:table-cell>
          <table:table-cell table:formula="of:=UNICHAR(HEX2DEC([.C40]))" office:value-type="string" office:string-value="" calcext:value-type="string">
            <text:p>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</text:p>
          </table:table-cell>
          <table:table-cell table:formula="of:=DEC2HEX(UNICODE([.F40]))" office:value-type="string" office:string-value="E7DE" calcext:value-type="string">
            <text:p>E7DE</text:p>
          </table:table-cell>
          <table:table-cell table:formula="of:=CONCATENATE(&quot;0x&quot;;[.G40])" office:value-type="string" office:string-value="0xE7DE" calcext:value-type="string">
            <text:p>0xE7DE</text:p>
          </table:table-cell>
          <table:table-cell table:formula="of:=VLOOKUP([.H40];[$FROMVS_Names.$A$1:$FROMVS_Names.$B$151];2;0)" office:value-type="string" office:string-value="tau_omicron_varia_2" calcext:value-type="string">
            <text:p>tau_omicron_varia_2</text:p>
          </table:table-cell>
        </table:table-row>
        <table:table-row table:style-name="ro1">
          <table:table-cell office:value-type="string" calcext:value-type="string">
            <text:p>0xE7DA</text:p>
          </table:table-cell>
          <table:table-cell office:value-type="string" calcext:value-type="string">
            <text:p>tau_omicron_1_varia</text:p>
          </table:table-cell>
          <table:table-cell table:formula="of:=RIGHT([.A41];4)" office:value-type="string" office:string-value="E7DA" calcext:value-type="string">
            <text:p>E7DA</text:p>
          </table:table-cell>
          <table:table-cell table:formula="of:=UNICHAR(HEX2DEC([.C41]))" office:value-type="string" office:string-value="" calcext:value-type="string">
            <text:p>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</text:p>
          </table:table-cell>
          <table:table-cell table:formula="of:=DEC2HEX(UNICODE([.F41]))" office:value-type="string" office:string-value="E7DD" calcext:value-type="string">
            <text:p>E7DD</text:p>
          </table:table-cell>
          <table:table-cell table:formula="of:=CONCATENATE(&quot;0x&quot;;[.G41])" office:value-type="string" office:string-value="0xE7DD" calcext:value-type="string">
            <text:p>0xE7DD</text:p>
          </table:table-cell>
          <table:table-cell table:formula="of:=VLOOKUP([.H41];[$FROMVS_Names.$A$1:$FROMVS_Names.$B$151];2;0)" office:value-type="string" office:string-value="tau_omicron_varia" calcext:value-type="string">
            <text:p>tau_omicron_varia</text:p>
          </table:table-cell>
        </table:table-row>
        <table:table-row table:style-name="ro1">
          <table:table-cell office:value-type="string" calcext:value-type="string">
            <text:p>0xE831</text:p>
          </table:table-cell>
          <table:table-cell office:value-type="string" calcext:value-type="string">
            <text:p>tau_omicron_2</text:p>
          </table:table-cell>
          <table:table-cell table:formula="of:=RIGHT([.A42];4)" office:value-type="string" office:string-value="E831" calcext:value-type="string">
            <text:p>E831</text:p>
          </table:table-cell>
          <table:table-cell table:formula="of:=UNICHAR(HEX2DEC([.C42]))" office:value-type="string" office:string-value="" calcext:value-type="string">
            <text:p></text:p>
          </table:table-cell>
          <table:table-cell office:value-type="string" calcext:value-type="string">
            <text:p>το</text:p>
          </table:table-cell>
          <table:table-cell table:style-name="ce15" office:value-type="string" calcext:value-type="string">
            <text:p></text:p>
          </table:table-cell>
          <table:table-cell table:formula="of:=DEC2HEX(UNICODE([.F42]))" office:value-type="string" office:string-value="E7DC" calcext:value-type="string">
            <text:p>E7DC</text:p>
          </table:table-cell>
          <table:table-cell table:formula="of:=CONCATENATE(&quot;0x&quot;;[.G42])" office:value-type="string" office:string-value="0xE7DC" calcext:value-type="string">
            <text:p>0xE7DC</text:p>
          </table:table-cell>
          <table:table-cell table:formula="of:=VLOOKUP([.H42];[$FROMVS_Names.$A$1:$FROMVS_Names.$B$151];2;0)" office:value-type="string" office:string-value="tau_omicron_2" calcext:value-type="string">
            <text:p>tau_omicron_2</text:p>
          </table:table-cell>
        </table:table-row>
        <table:table-row table:style-name="ro1">
          <table:table-cell office:value-type="string" calcext:value-type="string">
            <text:p>0xE7D9</text:p>
          </table:table-cell>
          <table:table-cell office:value-type="string" calcext:value-type="string">
            <text:p>tau_omicron_1</text:p>
          </table:table-cell>
          <table:table-cell table:formula="of:=RIGHT([.A43];4)" office:value-type="string" office:string-value="E7D9" calcext:value-type="string">
            <text:p>E7D9</text:p>
          </table:table-cell>
          <table:table-cell table:formula="of:=UNICHAR(HEX2DEC([.C43]))" office:value-type="string" office:string-value="" calcext:value-type="string">
            <text:p></text:p>
          </table:table-cell>
          <table:table-cell office:value-type="string" calcext:value-type="string">
            <text:p>το</text:p>
          </table:table-cell>
          <table:table-cell office:value-type="string" calcext:value-type="string">
            <text:p></text:p>
          </table:table-cell>
          <table:table-cell table:formula="of:=DEC2HEX(UNICODE([.F43]))" office:value-type="string" office:string-value="E7DB" calcext:value-type="string">
            <text:p>E7DB</text:p>
          </table:table-cell>
          <table:table-cell table:formula="of:=CONCATENATE(&quot;0x&quot;;[.G43])" office:value-type="string" office:string-value="0xE7DB" calcext:value-type="string">
            <text:p>0xE7DB</text:p>
          </table:table-cell>
          <table:table-cell table:formula="of:=VLOOKUP([.H43];[$FROMVS_Names.$A$1:$FROMVS_Names.$B$151];2;0)" office:value-type="string" office:string-value="tau_omicron" calcext:value-type="string">
            <text:p>tau_omicron</text:p>
          </table:table-cell>
        </table:table-row>
        <table:table-row table:style-name="ro1">
          <table:table-cell office:value-type="string" calcext:value-type="string">
            <text:p>0xE7D8</text:p>
          </table:table-cell>
          <table:table-cell office:value-type="string" calcext:value-type="string">
            <text:p>tau_iota</text:p>
          </table:table-cell>
          <table:table-cell table:formula="of:=RIGHT([.A44];4)" office:value-type="string" office:string-value="E7D8" calcext:value-type="string">
            <text:p>E7D8</text:p>
          </table:table-cell>
          <table:table-cell table:formula="of:=UNICHAR(HEX2DEC([.C44]))" office:value-type="string" office:string-value="" calcext:value-type="string">
            <text:p>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</text:p>
          </table:table-cell>
          <table:table-cell table:formula="of:=DEC2HEX(UNICODE([.F44]))" office:value-type="string" office:string-value="E7DA" calcext:value-type="string">
            <text:p>E7DA</text:p>
          </table:table-cell>
          <table:table-cell table:formula="of:=CONCATENATE(&quot;0x&quot;;[.G44])" office:value-type="string" office:string-value="0xE7DA" calcext:value-type="string">
            <text:p>0xE7DA</text:p>
          </table:table-cell>
          <table:table-cell table:formula="of:=VLOOKUP([.H44];[$FROMVS_Names.$A$1:$FROMVS_Names.$B$151];2;0)" office:value-type="string" office:string-value="tau_iota" calcext:value-type="string">
            <text:p>tau_iota</text:p>
          </table:table-cell>
        </table:table-row>
        <table:table-row table:style-name="ro1">
          <table:table-cell office:value-type="string" calcext:value-type="string">
            <text:p>0xE7D7</text:p>
          </table:table-cell>
          <table:table-cell office:value-type="string" calcext:value-type="string">
            <text:p>tau_eta_perispomeni_sigma_2</text:p>
          </table:table-cell>
          <table:table-cell table:formula="of:=RIGHT([.A45];4)" office:value-type="string" office:string-value="E7D7" calcext:value-type="string">
            <text:p>E7D7</text:p>
          </table:table-cell>
          <table:table-cell table:formula="of:=UNICHAR(HEX2DEC([.C45]))" office:value-type="string" office:string-value="" calcext:value-type="string">
            <text:p>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</text:p>
          </table:table-cell>
          <table:table-cell table:formula="of:=DEC2HEX(UNICODE([.F45]))" office:value-type="string" office:string-value="E7D9" calcext:value-type="string">
            <text:p>E7D9</text:p>
          </table:table-cell>
          <table:table-cell table:formula="of:=CONCATENATE(&quot;0x&quot;;[.G45])" office:value-type="string" office:string-value="0xE7D9" calcext:value-type="string">
            <text:p>0xE7D9</text:p>
          </table:table-cell>
          <table:table-cell table:formula="of:=VLOOKUP([.H45];[$FROMVS_Names.$A$1:$FROMVS_Names.$B$151];2;0)" office:value-type="string" office:string-value="tau_eta_perispomeni_sigma_2" calcext:value-type="string">
            <text:p>tau_eta_perispomeni_sigma_2</text:p>
          </table:table-cell>
        </table:table-row>
        <table:table-row table:style-name="ro1">
          <table:table-cell office:value-type="string" calcext:value-type="string">
            <text:p>0xE7D6</text:p>
          </table:table-cell>
          <table:table-cell office:value-type="string" calcext:value-type="string">
            <text:p>tau_eta_perispomeni_sigma_1</text:p>
          </table:table-cell>
          <table:table-cell table:formula="of:=RIGHT([.A46];4)" office:value-type="string" office:string-value="E7D6" calcext:value-type="string">
            <text:p>E7D6</text:p>
          </table:table-cell>
          <table:table-cell table:formula="of:=UNICHAR(HEX2DEC([.C46]))" office:value-type="string" office:string-value="" calcext:value-type="string">
            <text:p>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</text:p>
          </table:table-cell>
          <table:table-cell table:formula="of:=DEC2HEX(UNICODE([.F46]))" office:value-type="string" office:string-value="E7D8" calcext:value-type="string">
            <text:p>E7D8</text:p>
          </table:table-cell>
          <table:table-cell table:formula="of:=CONCATENATE(&quot;0x&quot;;[.G46])" office:value-type="string" office:string-value="0xE7D8" calcext:value-type="string">
            <text:p>0xE7D8</text:p>
          </table:table-cell>
          <table:table-cell table:formula="of:=VLOOKUP([.H46];[$FROMVS_Names.$A$1:$FROMVS_Names.$B$151];2;0)" office:value-type="string" office:string-value="tau_eta_perispomeni_sigma" calcext:value-type="string">
            <text:p>tau_eta_perispomeni_sigma</text:p>
          </table:table-cell>
        </table:table-row>
        <table:table-row table:style-name="ro1">
          <table:table-cell office:value-type="string" calcext:value-type="string">
            <text:p>0xE7D5</text:p>
          </table:table-cell>
          <table:table-cell office:value-type="string" calcext:value-type="string">
            <text:p>tau_eta_nu_varia_2</text:p>
          </table:table-cell>
          <table:table-cell table:formula="of:=RIGHT([.A47];4)" office:value-type="string" office:string-value="E7D5" calcext:value-type="string">
            <text:p>E7D5</text:p>
          </table:table-cell>
          <table:table-cell table:formula="of:=UNICHAR(HEX2DEC([.C47]))" office:value-type="string" office:string-value="" calcext:value-type="string">
            <text:p>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</text:p>
          </table:table-cell>
          <table:table-cell table:formula="of:=DEC2HEX(UNICODE([.F47]))" office:value-type="string" office:string-value="E7D7" calcext:value-type="string">
            <text:p>E7D7</text:p>
          </table:table-cell>
          <table:table-cell table:formula="of:=CONCATENATE(&quot;0x&quot;;[.G47])" office:value-type="string" office:string-value="0xE7D7" calcext:value-type="string">
            <text:p>0xE7D7</text:p>
          </table:table-cell>
          <table:table-cell table:formula="of:=VLOOKUP([.H47];[$FROMVS_Names.$A$1:$FROMVS_Names.$B$151];2;0)" office:value-type="string" office:string-value="tau_eta_varia2_nu" calcext:value-type="string">
            <text:p>tau_eta_varia2_nu</text:p>
          </table:table-cell>
        </table:table-row>
        <table:table-row table:style-name="ro1">
          <table:table-cell office:value-type="string" calcext:value-type="string">
            <text:p>0xE7D4</text:p>
          </table:table-cell>
          <table:table-cell office:value-type="string" calcext:value-type="string">
            <text:p>tau_eta_nu_varia_1</text:p>
          </table:table-cell>
          <table:table-cell table:formula="of:=RIGHT([.A48];4)" office:value-type="string" office:string-value="E7D4" calcext:value-type="string">
            <text:p>E7D4</text:p>
          </table:table-cell>
          <table:table-cell table:formula="of:=UNICHAR(HEX2DEC([.C48]))" office:value-type="string" office:string-value="" calcext:value-type="string">
            <text:p>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</text:p>
          </table:table-cell>
          <table:table-cell table:formula="of:=DEC2HEX(UNICODE([.F48]))" office:value-type="string" office:string-value="E7D6" calcext:value-type="string">
            <text:p>E7D6</text:p>
          </table:table-cell>
          <table:table-cell table:formula="of:=CONCATENATE(&quot;0x&quot;;[.G48])" office:value-type="string" office:string-value="0xE7D6" calcext:value-type="string">
            <text:p>0xE7D6</text:p>
          </table:table-cell>
          <table:table-cell table:formula="of:=VLOOKUP([.H48];[$FROMVS_Names.$A$1:$FROMVS_Names.$B$151];2;0)" office:value-type="string" office:string-value="tau_eta_varia_nu" calcext:value-type="string">
            <text:p>tau_eta_varia_nu</text:p>
          </table:table-cell>
        </table:table-row>
        <table:table-row table:style-name="ro1">
          <table:table-cell office:value-type="string" calcext:value-type="string">
            <text:p>0xE7D3</text:p>
          </table:table-cell>
          <table:table-cell office:value-type="string" calcext:value-type="string">
            <text:p>tau_epsilon</text:p>
          </table:table-cell>
          <table:table-cell table:formula="of:=RIGHT([.A49];4)" office:value-type="string" office:string-value="E7D3" calcext:value-type="string">
            <text:p>E7D3</text:p>
          </table:table-cell>
          <table:table-cell table:formula="of:=UNICHAR(HEX2DEC([.C49]))" office:value-type="string" office:string-value="" calcext:value-type="string">
            <text:p>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</text:p>
          </table:table-cell>
          <table:table-cell table:formula="of:=DEC2HEX(UNICODE([.F49]))" office:value-type="string" office:string-value="E7D5" calcext:value-type="string">
            <text:p>E7D5</text:p>
          </table:table-cell>
          <table:table-cell table:formula="of:=CONCATENATE(&quot;0x&quot;;[.G49])" office:value-type="string" office:string-value="0xE7D5" calcext:value-type="string">
            <text:p>0xE7D5</text:p>
          </table:table-cell>
          <table:table-cell table:formula="of:=VLOOKUP([.H49];[$FROMVS_Names.$A$1:$FROMVS_Names.$B$151];2;0)" office:value-type="string" office:string-value="tau_epsilon" calcext:value-type="string">
            <text:p>tau_epsilon</text:p>
          </table:table-cell>
        </table:table-row>
        <table:table-row table:style-name="ro1">
          <table:table-cell office:value-type="string" calcext:value-type="string">
            <text:p>0xE828</text:p>
          </table:table-cell>
          <table:table-cell office:value-type="string" calcext:value-type="string">
            <text:p>tau_alpha_iota_2</text:p>
          </table:table-cell>
          <table:table-cell table:formula="of:=RIGHT([.A50];4)" office:value-type="string" office:string-value="E828" calcext:value-type="string">
            <text:p>E828</text:p>
          </table:table-cell>
          <table:table-cell table:formula="of:=UNICHAR(HEX2DEC([.C50]))" office:value-type="string" office:string-value="" calcext:value-type="string">
            <text:p></text:p>
          </table:table-cell>
          <table:table-cell office:value-type="string" calcext:value-type="string">
            <text:p>ται</text:p>
          </table:table-cell>
          <table:table-cell table:style-name="ce15" office:value-type="string" calcext:value-type="string">
            <text:p></text:p>
          </table:table-cell>
          <table:table-cell table:formula="of:=DEC2HEX(UNICODE([.F50]))" office:value-type="string" office:string-value="E7D4" calcext:value-type="string">
            <text:p>E7D4</text:p>
          </table:table-cell>
          <table:table-cell table:formula="of:=CONCATENATE(&quot;0x&quot;;[.G50])" office:value-type="string" office:string-value="0xE7D4" calcext:value-type="string">
            <text:p>0xE7D4</text:p>
          </table:table-cell>
          <table:table-cell table:formula="of:=VLOOKUP([.H50];[$FROMVS_Names.$A$1:$FROMVS_Names.$B$151];2;0)" office:value-type="string" office:string-value="tau_alpha_iota_2" calcext:value-type="string">
            <text:p>tau_alpha_iota_2</text:p>
          </table:table-cell>
        </table:table-row>
        <table:table-row table:style-name="ro1">
          <table:table-cell office:value-type="string" calcext:value-type="string">
            <text:p>0xE7D2</text:p>
          </table:table-cell>
          <table:table-cell office:value-type="string" calcext:value-type="string">
            <text:p>tau_alpha_iota</text:p>
          </table:table-cell>
          <table:table-cell table:formula="of:=RIGHT([.A51];4)" office:value-type="string" office:string-value="E7D2" calcext:value-type="string">
            <text:p>E7D2</text:p>
          </table:table-cell>
          <table:table-cell table:formula="of:=UNICHAR(HEX2DEC([.C51]))" office:value-type="string" office:string-value="" calcext:value-type="string">
            <text:p></text:p>
          </table:table-cell>
          <table:table-cell office:value-type="string" calcext:value-type="string">
            <text:p>ται</text:p>
          </table:table-cell>
          <table:table-cell office:value-type="string" calcext:value-type="string">
            <text:p></text:p>
          </table:table-cell>
          <table:table-cell table:formula="of:=DEC2HEX(UNICODE([.F51]))" office:value-type="string" office:string-value="E7D3" calcext:value-type="string">
            <text:p>E7D3</text:p>
          </table:table-cell>
          <table:table-cell table:style-name="ce19" table:formula="of:=CONCATENATE(&quot;0x&quot;;[.G51])" office:value-type="string" office:string-value="0xE7D3" calcext:value-type="string">
            <text:p>0xE7D3</text:p>
          </table:table-cell>
          <table:table-cell table:formula="of:=VLOOKUP([.H51];[$FROMVS_Names.$A$1:$FROMVS_Names.$B$151];2;0)" office:value-type="string" office:string-value="tau_alpha_iota" calcext:value-type="string">
            <text:p>tau_alpha_iota</text:p>
          </table:table-cell>
        </table:table-row>
        <table:table-row table:style-name="ro1">
          <table:table-cell office:value-type="string" calcext:value-type="string">
            <text:p>0xE7D1</text:p>
          </table:table-cell>
          <table:table-cell office:value-type="string" calcext:value-type="string">
            <text:p>tau_psili</text:p>
          </table:table-cell>
          <table:table-cell table:formula="of:=RIGHT([.A52];4)" office:value-type="string" office:string-value="E7D1" calcext:value-type="string">
            <text:p>E7D1</text:p>
          </table:table-cell>
          <table:table-cell table:formula="of:=UNICHAR(HEX2DEC([.C52]))" office:value-type="string" office:string-value="" calcext:value-type="string">
            <text:p></text:p>
          </table:table-cell>
          <table:table-cell office:value-type="string" calcext:value-type="string">
            <text:p>τ᾽</text:p>
          </table:table-cell>
          <table:table-cell office:value-type="string" calcext:value-type="string">
            <text:p></text:p>
          </table:table-cell>
          <table:table-cell table:formula="of:=DEC2HEX(UNICODE([.F52]))" office:value-type="string" office:string-value="E7D2" calcext:value-type="string">
            <text:p>E7D2</text:p>
          </table:table-cell>
          <table:table-cell table:style-name="ce19" table:formula="of:=CONCATENATE(&quot;0x&quot;;[.G52])" office:value-type="string" office:string-value="0xE7D2" calcext:value-type="string">
            <text:p>0xE7D2</text:p>
          </table:table-cell>
          <table:table-cell table:formula="of:=VLOOKUP([.H52];[$FROMVS_Names.$A$1:$FROMVS_Names.$B$151];2;0)" office:value-type="string" office:string-value="tau_psili" calcext:value-type="string">
            <text:p>tau_psili</text:p>
          </table:table-cell>
        </table:table-row>
        <table:table-row table:style-name="ro1">
          <table:table-cell office:value-type="string" calcext:value-type="string">
            <text:p>0xE83E</text:p>
          </table:table-cell>
          <table:table-cell office:value-type="string" calcext:value-type="string">
            <text:p>tau_tall_psili</text:p>
          </table:table-cell>
          <table:table-cell table:formula="of:=RIGHT([.A53];4)" office:value-type="string" office:string-value="E83E" calcext:value-type="string">
            <text:p>E83E</text:p>
          </table:table-cell>
          <table:table-cell table:formula="of:=UNICHAR(HEX2DEC([.C53]))" office:value-type="string" office:string-value="" calcext:value-type="string">
            <text:p></text:p>
          </table:table-cell>
          <table:table-cell office:value-type="string" calcext:value-type="string">
            <text:p>τ'</text:p>
          </table:table-cell>
          <table:table-cell table:style-name="ce15" office:value-type="string" calcext:value-type="string">
            <text:p></text:p>
          </table:table-cell>
          <table:table-cell table:formula="of:=DEC2HEX(UNICODE([.F53]))" office:value-type="string" office:string-value="E7D1" calcext:value-type="string">
            <text:p>E7D1</text:p>
          </table:table-cell>
          <table:table-cell table:formula="of:=CONCATENATE(&quot;0x&quot;;[.G53])" office:value-type="string" office:string-value="0xE7D1" calcext:value-type="string">
            <text:p>0xE7D1</text:p>
          </table:table-cell>
          <table:table-cell table:formula="of:=VLOOKUP([.H53];[$FROMVS_Names.$A$1:$FROMVS_Names.$B$151];2;0)" office:value-type="string" office:string-value="tau_tall_psili" calcext:value-type="string">
            <text:p>tau_tall_psili</text:p>
          </table:table-cell>
        </table:table-row>
        <table:table-row table:style-name="ro1">
          <table:table-cell office:value-type="string" calcext:value-type="string">
            <text:p>0xE7A6</text:p>
          </table:table-cell>
          <table:table-cell office:value-type="string" calcext:value-type="string">
            <text:p>pi_tau</text:p>
          </table:table-cell>
          <table:table-cell table:formula="of:=RIGHT([.A54];4)" office:value-type="string" office:string-value="E7A6" calcext:value-type="string">
            <text:p>E7A6</text:p>
          </table:table-cell>
          <table:table-cell table:formula="of:=UNICHAR(HEX2DEC([.C54]))" office:value-type="string" office:string-value="" calcext:value-type="string">
            <text:p></text:p>
          </table:table-cell>
          <table:table-cell office:value-type="string" calcext:value-type="string">
            <text:p>πτ</text:p>
          </table:table-cell>
          <table:table-cell table:style-name="ce15" office:value-type="string" calcext:value-type="string">
            <text:p></text:p>
          </table:table-cell>
          <table:table-cell table:style-name="ce19" table:formula="of:=DEC2HEX(UNICODE([.F54]))" office:value-type="string" office:string-value="E7A8" calcext:value-type="string">
            <text:p>E7A8</text:p>
          </table:table-cell>
          <table:table-cell table:formula="of:=CONCATENATE(&quot;0x&quot;;[.G54])" office:value-type="string" office:string-value="0xE7A8" calcext:value-type="string">
            <text:p>0xE7A8</text:p>
          </table:table-cell>
          <table:table-cell table:formula="of:=VLOOKUP([.H54];[$FROMVS_Names.$A$1:$FROMVS_Names.$B$151];2;0)" office:value-type="string" office:string-value="pi_tau" calcext:value-type="string">
            <text:p>pi_tau</text:p>
          </table:table-cell>
        </table:table-row>
        <table:table-row table:style-name="ro1">
          <table:table-cell office:value-type="string" calcext:value-type="string">
            <text:p>0xE7A5</text:p>
          </table:table-cell>
          <table:table-cell office:value-type="string" calcext:value-type="string">
            <text:p>pi_rho</text:p>
          </table:table-cell>
          <table:table-cell table:formula="of:=RIGHT([.A55];4)" office:value-type="string" office:string-value="E7A5" calcext:value-type="string">
            <text:p>E7A5</text:p>
          </table:table-cell>
          <table:table-cell table:formula="of:=UNICHAR(HEX2DEC([.C55]))" office:value-type="string" office:string-value="" calcext:value-type="string">
            <text:p></text:p>
          </table:table-cell>
          <table:table-cell office:value-type="string" calcext:value-type="string">
            <text:p>πρ</text:p>
          </table:table-cell>
          <table:table-cell office:value-type="string" calcext:value-type="string">
            <text:p></text:p>
          </table:table-cell>
          <table:table-cell table:style-name="ce19" table:formula="of:=DEC2HEX(UNICODE([.F55]))" office:value-type="string" office:string-value="E7A7" calcext:value-type="string">
            <text:p>E7A7</text:p>
          </table:table-cell>
          <table:table-cell table:formula="of:=CONCATENATE(&quot;0x&quot;;[.G55])" office:value-type="string" office:string-value="0xE7A7" calcext:value-type="string">
            <text:p>0xE7A7</text:p>
          </table:table-cell>
          <table:table-cell table:formula="of:=VLOOKUP([.H55];[$FROMVS_Names.$A$1:$FROMVS_Names.$B$151];2;0)" office:value-type="string" office:string-value="pi_rho" calcext:value-type="string">
            <text:p>pi_rho</text:p>
          </table:table-cell>
        </table:table-row>
        <table:table-row table:style-name="ro1">
          <table:table-cell office:value-type="string" calcext:value-type="string">
            <text:p>0xE7A4</text:p>
          </table:table-cell>
          <table:table-cell office:value-type="string" calcext:value-type="string">
            <text:p>pi_omicron_varia</text:p>
          </table:table-cell>
          <table:table-cell table:formula="of:=RIGHT([.A56];4)" office:value-type="string" office:string-value="E7A4" calcext:value-type="string">
            <text:p>E7A4</text:p>
          </table:table-cell>
          <table:table-cell table:formula="of:=UNICHAR(HEX2DEC([.C56]))" office:value-type="string" office:string-value="" calcext:value-type="string">
            <text:p></text:p>
          </table:table-cell>
          <table:table-cell office:value-type="string" calcext:value-type="string">
            <text:p>πὸ</text:p>
          </table:table-cell>
          <table:table-cell office:value-type="string" calcext:value-type="string">
            <text:p></text:p>
          </table:table-cell>
          <table:table-cell table:style-name="ce19" table:formula="of:=DEC2HEX(UNICODE([.F56]))" office:value-type="string" office:string-value="E7A6" calcext:value-type="string">
            <text:p>E7A6</text:p>
          </table:table-cell>
          <table:table-cell table:formula="of:=CONCATENATE(&quot;0x&quot;;[.G56])" office:value-type="string" office:string-value="0xE7A6" calcext:value-type="string">
            <text:p>0xE7A6</text:p>
          </table:table-cell>
          <table:table-cell table:formula="of:=VLOOKUP([.H56];[$FROMVS_Names.$A$1:$FROMVS_Names.$B$151];2;0)" office:value-type="string" office:string-value="pi_omicron_varia" calcext:value-type="string">
            <text:p>pi_omicron_varia</text:p>
          </table:table-cell>
        </table:table-row>
        <table:table-row table:style-name="ro1">
          <table:table-cell office:value-type="string" calcext:value-type="string">
            <text:p>0xE7A3</text:p>
          </table:table-cell>
          <table:table-cell office:value-type="string" calcext:value-type="string">
            <text:p>pi_omicron</text:p>
          </table:table-cell>
          <table:table-cell table:formula="of:=RIGHT([.A57];4)" office:value-type="string" office:string-value="E7A3" calcext:value-type="string">
            <text:p>E7A3</text:p>
          </table:table-cell>
          <table:table-cell table:formula="of:=UNICHAR(HEX2DEC([.C57]))" office:value-type="string" office:string-value="" calcext:value-type="string">
            <text:p></text:p>
          </table:table-cell>
          <table:table-cell office:value-type="string" calcext:value-type="string">
            <text:p>πο</text:p>
          </table:table-cell>
          <table:table-cell office:value-type="string" calcext:value-type="string">
            <text:p></text:p>
          </table:table-cell>
          <table:table-cell table:style-name="ce19" table:formula="of:=DEC2HEX(UNICODE([.F57]))" office:value-type="string" office:string-value="E7A5" calcext:value-type="string">
            <text:p>E7A5</text:p>
          </table:table-cell>
          <table:table-cell table:formula="of:=CONCATENATE(&quot;0x&quot;;[.G57])" office:value-type="string" office:string-value="0xE7A5" calcext:value-type="string">
            <text:p>0xE7A5</text:p>
          </table:table-cell>
          <table:table-cell table:formula="of:=VLOOKUP([.H57];[$FROMVS_Names.$A$1:$FROMVS_Names.$B$151];2;0)" office:value-type="string" office:string-value="pi_omicron" calcext:value-type="string">
            <text:p>pi_omicron</text:p>
          </table:table-cell>
        </table:table-row>
        <table:table-row table:style-name="ro1">
          <table:table-cell office:value-type="string" calcext:value-type="string">
            <text:p>0xE7A2</text:p>
          </table:table-cell>
          <table:table-cell office:value-type="string" calcext:value-type="string">
            <text:p>pi_epsilon_rho</text:p>
          </table:table-cell>
          <table:table-cell table:formula="of:=RIGHT([.A58];4)" office:value-type="string" office:string-value="E7A2" calcext:value-type="string">
            <text:p>E7A2</text:p>
          </table:table-cell>
          <table:table-cell table:formula="of:=UNICHAR(HEX2DEC([.C58]))" office:value-type="string" office:string-value="" calcext:value-type="string">
            <text:p></text:p>
          </table:table-cell>
          <table:table-cell office:value-type="string" calcext:value-type="string">
            <text:p>περ</text:p>
          </table:table-cell>
          <table:table-cell office:value-type="string" calcext:value-type="string">
            <text:p></text:p>
          </table:table-cell>
          <table:table-cell table:style-name="ce19" table:formula="of:=DEC2HEX(UNICODE([.F58]))" office:value-type="string" office:string-value="E7A4" calcext:value-type="string">
            <text:p>E7A4</text:p>
          </table:table-cell>
          <table:table-cell table:formula="of:=CONCATENATE(&quot;0x&quot;;[.G58])" office:value-type="string" office:string-value="0xE7A4" calcext:value-type="string">
            <text:p>0xE7A4</text:p>
          </table:table-cell>
          <table:table-cell table:formula="of:=VLOOKUP([.H58];[$FROMVS_Names.$A$1:$FROMVS_Names.$B$151];2;0)" office:value-type="string" office:string-value="pi_epsilon_rho" calcext:value-type="string">
            <text:p>pi_epsilon_rho</text:p>
          </table:table-cell>
        </table:table-row>
        <table:table-row table:style-name="ro1">
          <table:table-cell office:value-type="string" calcext:value-type="string">
            <text:p>0xE7A1</text:p>
          </table:table-cell>
          <table:table-cell office:value-type="string" calcext:value-type="string">
            <text:p>pi_alpha_rho</text:p>
          </table:table-cell>
          <table:table-cell table:formula="of:=RIGHT([.A59];4)" office:value-type="string" office:string-value="E7A1" calcext:value-type="string">
            <text:p>E7A1</text:p>
          </table:table-cell>
          <table:table-cell table:formula="of:=UNICHAR(HEX2DEC([.C59]))" office:value-type="string" office:string-value="" calcext:value-type="string">
            <text:p></text:p>
          </table:table-cell>
          <table:table-cell office:value-type="string" calcext:value-type="string">
            <text:p>παρ</text:p>
          </table:table-cell>
          <table:table-cell office:value-type="string" calcext:value-type="string">
            <text:p></text:p>
          </table:table-cell>
          <table:table-cell table:style-name="ce19" table:formula="of:=DEC2HEX(UNICODE([.F59]))" office:value-type="string" office:string-value="E7A3" calcext:value-type="string">
            <text:p>E7A3</text:p>
          </table:table-cell>
          <table:table-cell table:formula="of:=CONCATENATE(&quot;0x&quot;;[.G59])" office:value-type="string" office:string-value="0xE7A3" calcext:value-type="string">
            <text:p>0xE7A3</text:p>
          </table:table-cell>
          <table:table-cell table:formula="of:=VLOOKUP([.H59];[$FROMVS_Names.$A$1:$FROMVS_Names.$B$151];2;0)" office:value-type="string" office:string-value="pi_alpha_rho" calcext:value-type="string">
            <text:p>pi_alpha_rho</text:p>
          </table:table-cell>
        </table:table-row>
        <table:table-row table:style-name="ro1">
          <table:table-cell office:value-type="string" calcext:value-type="string">
            <text:p>0xE829</text:p>
          </table:table-cell>
          <table:table-cell office:value-type="string" calcext:value-type="string">
            <text:p>pisymbol_psili</text:p>
          </table:table-cell>
          <table:table-cell table:formula="of:=RIGHT([.A60];4)" office:value-type="string" office:string-value="E829" calcext:value-type="string">
            <text:p>E829</text:p>
          </table:table-cell>
          <table:table-cell table:formula="of:=UNICHAR(HEX2DEC([.C60]))" office:value-type="string" office:string-value="" calcext:value-type="string">
            <text:p></text:p>
          </table:table-cell>
          <table:table-cell office:value-type="string" calcext:value-type="string">
            <text:p><text:span text:style-name="T1">ϖ</text:span>'</text:p>
          </table:table-cell>
          <table:table-cell table:style-name="ce12" office:value-type="string" calcext:value-type="string">
            <text:p></text:p>
          </table:table-cell>
          <table:table-cell table:formula="of:=DEC2HEX(UNICODE([.F60]))" office:value-type="string" office:string-value="E7A2" calcext:value-type="string">
            <text:p>E7A2</text:p>
          </table:table-cell>
          <table:table-cell table:formula="of:=CONCATENATE(&quot;0x&quot;;[.G60])" office:value-type="string" office:string-value="0xE7A2" calcext:value-type="string">
            <text:p>0xE7A2</text:p>
          </table:table-cell>
          <table:table-cell table:formula="of:=VLOOKUP([.H60];[$FROMVS_Names.$A$1:$FROMVS_Names.$B$151];2;0)" office:value-type="string" office:string-value="pisymbol_psili" calcext:value-type="string">
            <text:p>pisymbol_psili</text:p>
          </table:table-cell>
        </table:table-row>
        <table:table-row table:style-name="ro1">
          <table:table-cell office:value-type="string" calcext:value-type="string">
            <text:p>0xE82D</text:p>
          </table:table-cell>
          <table:table-cell office:value-type="string" calcext:value-type="string">
            <text:p>pi_psili</text:p>
          </table:table-cell>
          <table:table-cell table:formula="of:=RIGHT([.A61];4)" office:value-type="string" office:string-value="E82D" calcext:value-type="string">
            <text:p>E82D</text:p>
          </table:table-cell>
          <table:table-cell table:formula="of:=UNICHAR(HEX2DEC([.C61]))" office:value-type="string" office:string-value="" calcext:value-type="string">
            <text:p></text:p>
          </table:table-cell>
          <table:table-cell office:value-type="string" calcext:value-type="string">
            <text:p>π'</text:p>
          </table:table-cell>
          <table:table-cell table:style-name="ce15" office:value-type="string" calcext:value-type="string">
            <text:p></text:p>
          </table:table-cell>
          <table:table-cell table:formula="of:=DEC2HEX(UNICODE([.F61]))" office:value-type="string" office:string-value="E7A1" calcext:value-type="string">
            <text:p>E7A1</text:p>
          </table:table-cell>
          <table:table-cell table:formula="of:=CONCATENATE(&quot;0x&quot;;[.G61])" office:value-type="string" office:string-value="0xE7A1" calcext:value-type="string">
            <text:p>0xE7A1</text:p>
          </table:table-cell>
          <table:table-cell table:formula="of:=VLOOKUP([.H61];[$FROMVS_Names.$A$1:$FROMVS_Names.$B$151];2;0)" office:value-type="string" office:string-value="pi_psili" calcext:value-type="string">
            <text:p>pi_psili</text:p>
          </table:table-cell>
        </table:table-row>
        <table:table-row table:style-name="ro1">
          <table:table-cell office:value-type="string" calcext:value-type="string">
            <text:p>0xE7A7</text:p>
          </table:table-cell>
          <table:table-cell office:value-type="string" calcext:value-type="string">
            <text:p>Pi_1</text:p>
          </table:table-cell>
          <table:table-cell table:formula="of:=RIGHT([.A62];4)" office:value-type="string" office:string-value="E7A7" calcext:value-type="string">
            <text:p>E7A7</text:p>
          </table:table-cell>
          <table:table-cell table:formula="of:=UNICHAR(HEX2DEC([.C62]))" office:value-type="string" office:string-value="" calcext:value-type="string">
            <text:p></text:p>
          </table:table-cell>
          <table:table-cell office:value-type="string" calcext:value-type="string">
            <text:p>Π</text:p>
          </table:table-cell>
          <table:table-cell table:style-name="ce15" office:value-type="string" calcext:value-type="string">
            <text:p></text:p>
          </table:table-cell>
          <table:table-cell table:style-name="ce19" table:formula="of:=DEC2HEX(UNICODE([.F62]))" office:value-type="string" office:string-value="E7A0" calcext:value-type="string">
            <text:p>E7A0</text:p>
          </table:table-cell>
          <table:table-cell table:formula="of:=CONCATENATE(&quot;0x&quot;;[.G62])" office:value-type="string" office:string-value="0xE7A0" calcext:value-type="string">
            <text:p>0xE7A0</text:p>
          </table:table-cell>
          <table:table-cell table:formula="of:=VLOOKUP([.H62];[$FROMVS_Names.$A$1:$FROMVS_Names.$B$151];2;0)" office:value-type="string" office:string-value="Pi_2" calcext:value-type="string">
            <text:p>Pi_2</text:p>
          </table:table-cell>
        </table:table-row>
        <table:table-row table:style-name="ro1">
          <table:table-cell office:value-type="string" calcext:value-type="string">
            <text:p>0xE790</text:p>
          </table:table-cell>
          <table:table-cell office:value-type="string" calcext:value-type="string">
            <text:p>omicron_perispomeni</text:p>
          </table:table-cell>
          <table:table-cell table:formula="of:=RIGHT([.A63];4)" office:value-type="string" office:string-value="E790" calcext:value-type="string">
            <text:p>E790</text:p>
          </table:table-cell>
          <table:table-cell table:formula="of:=UNICHAR(HEX2DEC([.C63]))" office:value-type="string" office:string-value="" calcext:value-type="string">
            <text:p></text:p>
          </table:table-cell>
          <table:table-cell table:style-name="ce14" office:value-type="string" calcext:value-type="string">
            <text:p></text:p>
          </table:table-cell>
          <table:table-cell office:value-type="string" calcext:value-type="string">
            <text:p></text:p>
          </table:table-cell>
          <table:table-cell table:style-name="ce19" table:formula="of:=DEC2HEX(UNICODE([.F63]))" office:value-type="string" office:string-value="E792" calcext:value-type="string">
            <text:p>E792</text:p>
          </table:table-cell>
          <table:table-cell table:formula="of:=CONCATENATE(&quot;0x&quot;;[.G63])" office:value-type="string" office:string-value="0xE792" calcext:value-type="string">
            <text:p>0xE792</text:p>
          </table:table-cell>
          <table:table-cell table:formula="of:=VLOOKUP([.H63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92</text:p>
          </table:table-cell>
          <table:table-cell office:value-type="string" calcext:value-type="string">
            <text:p>omicron_dasia_perispomeni</text:p>
          </table:table-cell>
          <table:table-cell table:formula="of:=RIGHT([.A64];4)" office:value-type="string" office:string-value="E792" calcext:value-type="string">
            <text:p>E792</text:p>
          </table:table-cell>
          <table:table-cell table:formula="of:=UNICHAR(HEX2DEC([.C64]))" office:value-type="string" office:string-value="" calcext:value-type="string">
            <text:p></text:p>
          </table:table-cell>
          <table:table-cell table:style-name="ce14" office:value-type="string" calcext:value-type="string">
            <text:p></text:p>
          </table:table-cell>
          <table:table-cell office:value-type="string" calcext:value-type="string">
            <text:p></text:p>
          </table:table-cell>
          <table:table-cell table:style-name="ce19" table:formula="of:=DEC2HEX(UNICODE([.F64]))" office:value-type="string" office:string-value="E791" calcext:value-type="string">
            <text:p>E791</text:p>
          </table:table-cell>
          <table:table-cell table:formula="of:=CONCATENATE(&quot;0x&quot;;[.G64])" office:value-type="string" office:string-value="0xE791" calcext:value-type="string">
            <text:p>0xE791</text:p>
          </table:table-cell>
          <table:table-cell table:formula="of:=VLOOKUP([.H64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91</text:p>
          </table:table-cell>
          <table:table-cell office:value-type="string" calcext:value-type="string">
            <text:p>omicron_psili_perispomeni</text:p>
          </table:table-cell>
          <table:table-cell table:formula="of:=RIGHT([.A65];4)" office:value-type="string" office:string-value="E791" calcext:value-type="string">
            <text:p>E791</text:p>
          </table:table-cell>
          <table:table-cell table:formula="of:=UNICHAR(HEX2DEC([.C65]))" office:value-type="string" office:string-value="" calcext:value-type="string">
            <text:p></text:p>
          </table:table-cell>
          <table:table-cell table:style-name="ce14" office:value-type="string" calcext:value-type="string">
            <text:p></text:p>
          </table:table-cell>
          <table:table-cell office:value-type="string" calcext:value-type="string">
            <text:p></text:p>
          </table:table-cell>
          <table:table-cell table:style-name="ce19" table:formula="of:=DEC2HEX(UNICODE([.F65]))" office:value-type="string" office:string-value="E790" calcext:value-type="string">
            <text:p>E790</text:p>
          </table:table-cell>
          <table:table-cell table:formula="of:=CONCATENATE(&quot;0x&quot;;[.G65])" office:value-type="string" office:string-value="0xE790" calcext:value-type="string">
            <text:p>0xE790</text:p>
          </table:table-cell>
          <table:table-cell table:formula="of:=VLOOKUP([.H65];[$FROMVS_Names.$A$1:$FROMVS_Names.$B$151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0xE750</text:p>
          </table:table-cell>
          <table:table-cell office:value-type="string" calcext:value-type="string">
            <text:p>lambda_lambda</text:p>
          </table:table-cell>
          <table:table-cell table:formula="of:=RIGHT([.A66];4)" office:value-type="string" office:string-value="E750" calcext:value-type="string">
            <text:p>E750</text:p>
          </table:table-cell>
          <table:table-cell table:formula="of:=UNICHAR(HEX2DEC([.C66]))" office:value-type="string" office:string-value="" calcext:value-type="string">
            <text:p></text:p>
          </table:table-cell>
          <table:table-cell office:value-type="string" calcext:value-type="string">
            <text:p>λλ</text:p>
          </table:table-cell>
          <table:table-cell table:style-name="ce12" office:value-type="string" calcext:value-type="string">
            <text:p></text:p>
          </table:table-cell>
          <table:table-cell table:style-name="ce19" table:formula="of:=DEC2HEX(UNICODE([.F66]))" office:value-type="string" office:string-value="E751" calcext:value-type="string">
            <text:p>E751</text:p>
          </table:table-cell>
          <table:table-cell table:formula="of:=CONCATENATE(&quot;0x&quot;;[.G66])" office:value-type="string" office:string-value="0xE751" calcext:value-type="string">
            <text:p>0xE751</text:p>
          </table:table-cell>
          <table:table-cell table:formula="of:=VLOOKUP([.H66];[$FROMVS_Names.$A$1:$FROMVS_Names.$B$151];2;0)" office:value-type="string" office:string-value="lambda_lambda" calcext:value-type="string">
            <text:p>lambda_lambda</text:p>
          </table:table-cell>
        </table:table-row>
        <table:table-row table:style-name="ro1">
          <table:table-cell office:value-type="string" calcext:value-type="string">
            <text:p>0xE82C</text:p>
          </table:table-cell>
          <table:table-cell office:value-type="string" calcext:value-type="string">
            <text:p>lambda_psili</text:p>
          </table:table-cell>
          <table:table-cell table:formula="of:=RIGHT([.A67];4)" office:value-type="string" office:string-value="E82C" calcext:value-type="string">
            <text:p>E82C</text:p>
          </table:table-cell>
          <table:table-cell table:formula="of:=UNICHAR(HEX2DEC([.C67]))" office:value-type="string" office:string-value="" calcext:value-type="string">
            <text:p></text:p>
          </table:table-cell>
          <table:table-cell office:value-type="string" calcext:value-type="string">
            <text:p>λ'</text:p>
          </table:table-cell>
          <table:table-cell table:style-name="ce15" office:value-type="string" calcext:value-type="string">
            <text:p></text:p>
          </table:table-cell>
          <table:table-cell table:formula="of:=DEC2HEX(UNICODE([.F67]))" office:value-type="string" office:string-value="E750" calcext:value-type="string">
            <text:p>E750</text:p>
          </table:table-cell>
          <table:table-cell table:formula="of:=CONCATENATE(&quot;0x&quot;;[.G67])" office:value-type="string" office:string-value="0xE750" calcext:value-type="string">
            <text:p>0xE750</text:p>
          </table:table-cell>
          <table:table-cell table:formula="of:=VLOOKUP([.H67];[$FROMVS_Names.$A$1:$FROMVS_Names.$B$151];2;0)" office:value-type="string" office:string-value="lambda_psili" calcext:value-type="string">
            <text:p>lambda_psili</text:p>
          </table:table-cell>
        </table:table-row>
        <table:table-row table:style-name="ro1">
          <table:table-cell office:value-type="string" calcext:value-type="string">
            <text:p>0xE722</text:p>
          </table:table-cell>
          <table:table-cell office:value-type="string" calcext:value-type="string">
            <text:p>phi_iota_oxia</text:p>
          </table:table-cell>
          <table:table-cell table:formula="of:=RIGHT([.A68];4)" office:value-type="string" office:string-value="E722" calcext:value-type="string">
            <text:p>E722</text:p>
          </table:table-cell>
          <table:table-cell table:formula="of:=UNICHAR(HEX2DEC([.C68]))" office:value-type="string" office:string-value="" calcext:value-type="string">
            <text:p></text:p>
          </table:table-cell>
          <table:table-cell office:value-type="string" calcext:value-type="string">
            <text:p>φ<text:span text:style-name="T1">ί</text:span></text:p>
          </table:table-cell>
          <table:table-cell table:style-name="ce12" office:value-type="string" calcext:value-type="string">
            <text:p></text:p>
          </table:table-cell>
          <table:table-cell table:formula="of:=DEC2HEX(UNICODE([.F68]))" office:value-type="string" office:string-value="E723" calcext:value-type="string">
            <text:p>E723</text:p>
          </table:table-cell>
          <table:table-cell table:formula="of:=CONCATENATE(&quot;0x&quot;;[.G68])" office:value-type="string" office:string-value="0xE723" calcext:value-type="string">
            <text:p>0xE723</text:p>
          </table:table-cell>
          <table:table-cell table:formula="of:=VLOOKUP([.H68];[$FROMVS_Names.$A$1:$FROMVS_Names.$B$151];2;0)" office:value-type="string" office:string-value="phi_iota_tonos" calcext:value-type="string">
            <text:p>phi_iota_tonos</text:p>
          </table:table-cell>
        </table:table-row>
        <table:table-row table:style-name="ro1">
          <table:table-cell office:value-type="string" calcext:value-type="string">
            <text:p>0xE721</text:p>
          </table:table-cell>
          <table:table-cell office:value-type="string" calcext:value-type="string">
            <text:p>phi_iota</text:p>
          </table:table-cell>
          <table:table-cell table:formula="of:=RIGHT([.A69];4)" office:value-type="string" office:string-value="E721" calcext:value-type="string">
            <text:p>E721</text:p>
          </table:table-cell>
          <table:table-cell table:formula="of:=UNICHAR(HEX2DEC([.C69]))" office:value-type="string" office:string-value="" calcext:value-type="string">
            <text:p></text:p>
          </table:table-cell>
          <table:table-cell office:value-type="string" calcext:value-type="string">
            <text:p>φι</text:p>
          </table:table-cell>
          <table:table-cell table:style-name="ce12" office:value-type="string" calcext:value-type="string">
            <text:p></text:p>
          </table:table-cell>
          <table:table-cell table:formula="of:=DEC2HEX(UNICODE([.F69]))" office:value-type="string" office:string-value="E722" calcext:value-type="string">
            <text:p>E722</text:p>
          </table:table-cell>
          <table:table-cell table:formula="of:=CONCATENATE(&quot;0x&quot;;[.G69])" office:value-type="string" office:string-value="0xE722" calcext:value-type="string">
            <text:p>0xE722</text:p>
          </table:table-cell>
          <table:table-cell table:formula="of:=VLOOKUP([.H69];[$FROMVS_Names.$A$1:$FROMVS_Names.$B$151];2;0)" office:value-type="string" office:string-value="phi_iota" calcext:value-type="string">
            <text:p>phi_iota</text:p>
          </table:table-cell>
        </table:table-row>
        <table:table-row table:style-name="ro1">
          <table:table-cell office:value-type="string" calcext:value-type="string">
            <text:p>0xE82E</text:p>
          </table:table-cell>
          <table:table-cell office:value-type="string" calcext:value-type="string">
            <text:p>phi_psili</text:p>
          </table:table-cell>
          <table:table-cell table:formula="of:=RIGHT([.A70];4)" office:value-type="string" office:string-value="E82E" calcext:value-type="string">
            <text:p>E82E</text:p>
          </table:table-cell>
          <table:table-cell table:formula="of:=UNICHAR(HEX2DEC([.C70]))" office:value-type="string" office:string-value="" calcext:value-type="string">
            <text:p></text:p>
          </table:table-cell>
          <table:table-cell office:value-type="string" calcext:value-type="string">
            <text:p>φ'</text:p>
          </table:table-cell>
          <table:table-cell table:style-name="ce16" office:value-type="string" calcext:value-type="string">
            <text:p></text:p>
          </table:table-cell>
          <table:table-cell table:formula="of:=DEC2HEX(UNICODE([.F70]))" office:value-type="string" office:string-value="E721" calcext:value-type="string">
            <text:p>E721</text:p>
          </table:table-cell>
          <table:table-cell table:formula="of:=CONCATENATE(&quot;0x&quot;;[.G70])" office:value-type="string" office:string-value="0xE721" calcext:value-type="string">
            <text:p>0xE721</text:p>
          </table:table-cell>
          <table:table-cell table:formula="of:=VLOOKUP([.H70];[$FROMVS_Names.$A$1:$FROMVS_Names.$B$151];2;0)" office:value-type="string" office:string-value="phi_psili" calcext:value-type="string">
            <text:p>phi_psili</text:p>
          </table:table-cell>
        </table:table-row>
        <table:table-row table:style-name="ro1">
          <table:table-cell office:value-type="string" calcext:value-type="string">
            <text:p>0xE715</text:p>
          </table:table-cell>
          <table:table-cell office:value-type="string" calcext:value-type="string">
            <text:p>eta_nu_perispomeni</text:p>
          </table:table-cell>
          <table:table-cell table:formula="of:=RIGHT([.A71];4)" office:value-type="string" office:string-value="E715" calcext:value-type="string">
            <text:p>E715</text:p>
          </table:table-cell>
          <table:table-cell table:formula="of:=UNICHAR(HEX2DEC([.C71]))" office:value-type="string" office:string-value="" calcext:value-type="string">
            <text:p></text:p>
          </table:table-cell>
          <table:table-cell office:value-type="string" calcext:value-type="string">
            <text:p>ῆν</text:p>
          </table:table-cell>
          <table:table-cell table:style-name="ce12" office:value-type="string" calcext:value-type="string">
            <text:p></text:p>
          </table:table-cell>
          <table:table-cell table:formula="of:=DEC2HEX(UNICODE([.F71]))" office:value-type="string" office:string-value="E716" calcext:value-type="string">
            <text:p>E716</text:p>
          </table:table-cell>
          <table:table-cell table:formula="of:=CONCATENATE(&quot;0x&quot;;[.G71])" office:value-type="string" office:string-value="0xE716" calcext:value-type="string">
            <text:p>0xE716</text:p>
          </table:table-cell>
          <table:table-cell table:formula="of:=VLOOKUP([.H71];[$FROMVS_Names.$A$1:$FROMVS_Names.$B$151];2;0)" office:value-type="string" office:string-value="eta_perispomeni_nu" calcext:value-type="string">
            <text:p>eta_perispomeni_nu</text:p>
          </table:table-cell>
        </table:table-row>
        <table:table-row table:style-name="ro1">
          <table:table-cell office:value-type="string" calcext:value-type="string">
            <text:p>0xE716</text:p>
          </table:table-cell>
          <table:table-cell office:value-type="string" calcext:value-type="string">
            <text:p>eta_nu_varia_2</text:p>
          </table:table-cell>
          <table:table-cell table:formula="of:=RIGHT([.A72];4)" office:value-type="string" office:string-value="E716" calcext:value-type="string">
            <text:p>E716</text:p>
          </table:table-cell>
          <table:table-cell table:formula="of:=UNICHAR(HEX2DEC([.C72]))" office:value-type="string" office:string-value="" calcext:value-type="string">
            <text:p></text:p>
          </table:table-cell>
          <table:table-cell office:value-type="string" calcext:value-type="string">
            <text:p>ὴν</text:p>
          </table:table-cell>
          <table:table-cell office:value-type="string" calcext:value-type="string">
            <text:p></text:p>
          </table:table-cell>
          <table:table-cell table:formula="of:=DEC2HEX(UNICODE([.F72]))" office:value-type="string" office:string-value="E715" calcext:value-type="string">
            <text:p>E715</text:p>
          </table:table-cell>
          <table:table-cell table:formula="of:=CONCATENATE(&quot;0x&quot;;[.G72])" office:value-type="string" office:string-value="0xE715" calcext:value-type="string">
            <text:p>0xE715</text:p>
          </table:table-cell>
          <table:table-cell table:formula="of:=VLOOKUP([.H72];[$FROMVS_Names.$A$1:$FROMVS_Names.$B$151];2;0)" office:value-type="string" office:string-value="eta_varia_2_nu" calcext:value-type="string">
            <text:p>eta_varia_2_nu</text:p>
          </table:table-cell>
        </table:table-row>
        <table:table-row table:style-name="ro1">
          <table:table-cell office:value-type="string" calcext:value-type="string">
            <text:p>0xE82A</text:p>
          </table:table-cell>
          <table:table-cell office:value-type="string" calcext:value-type="string">
            <text:p>epsilon_upsilon2</text:p>
          </table:table-cell>
          <table:table-cell table:formula="of:=RIGHT([.A73];4)" office:value-type="string" office:string-value="E82A" calcext:value-type="string">
            <text:p>E82A</text:p>
          </table:table-cell>
          <table:table-cell table:formula="of:=UNICHAR(HEX2DEC([.C73]))" office:value-type="string" office:string-value="" calcext:value-type="string">
            <text:p></text:p>
          </table:table-cell>
          <table:table-cell office:value-type="string" calcext:value-type="string">
            <text:p>ευ</text:p>
          </table:table-cell>
          <table:table-cell table:style-name="ce15" office:value-type="string" calcext:value-type="string">
            <text:p></text:p>
          </table:table-cell>
          <table:table-cell table:formula="of:=DEC2HEX(UNICODE([.F73]))" office:value-type="string" office:string-value="E6FF" calcext:value-type="string">
            <text:p>E6FF</text:p>
          </table:table-cell>
          <table:table-cell table:formula="of:=CONCATENATE(&quot;0x&quot;;[.G73])" office:value-type="string" office:string-value="0xE6FF" calcext:value-type="string">
            <text:p>0xE6FF</text:p>
          </table:table-cell>
          <table:table-cell table:formula="of:=VLOOKUP([.H73];[$FROMVS_Names.$A$1:$FROMVS_Names.$B$151];2;0)" office:value-type="string" office:string-value="epsilon_upsilon_2" calcext:value-type="string">
            <text:p>epsilon_upsilon_2</text:p>
          </table:table-cell>
        </table:table-row>
        <table:table-row table:style-name="ro1">
          <table:table-cell office:value-type="string" calcext:value-type="string">
            <text:p>0xE6DA</text:p>
          </table:table-cell>
          <table:table-cell office:value-type="string" calcext:value-type="string">
            <text:p>gamma_rho</text:p>
          </table:table-cell>
          <table:table-cell table:formula="of:=RIGHT([.A74];4)" office:value-type="string" office:string-value="E6DA" calcext:value-type="string">
            <text:p>E6DA</text:p>
          </table:table-cell>
          <table:table-cell table:formula="of:=UNICHAR(HEX2DEC([.C74]))" office:value-type="string" office:string-value="" calcext:value-type="string">
            <text:p></text:p>
          </table:table-cell>
          <table:table-cell office:value-type="string" calcext:value-type="string">
            <text:p>γρ</text:p>
          </table:table-cell>
          <table:table-cell table:style-name="ce12" office:value-type="string" calcext:value-type="string">
            <text:p></text:p>
          </table:table-cell>
          <table:table-cell table:formula="of:=DEC2HEX(UNICODE([.F74]))" office:value-type="string" office:string-value="E6DB" calcext:value-type="string">
            <text:p>E6DB</text:p>
          </table:table-cell>
          <table:table-cell table:formula="of:=CONCATENATE(&quot;0x&quot;;[.G74])" office:value-type="string" office:string-value="0xE6DB" calcext:value-type="string">
            <text:p>0xE6DB</text:p>
          </table:table-cell>
          <table:table-cell table:formula="of:=VLOOKUP([.H74];[$FROMVS_Names.$A$1:$FROMVS_Names.$B$151];2;0)" office:value-type="string" office:string-value="gamma_rho" calcext:value-type="string">
            <text:p>gamma_rho</text:p>
          </table:table-cell>
        </table:table-row>
        <table:table-row table:style-name="ro1">
          <table:table-cell office:value-type="string" calcext:value-type="string">
            <text:p>0xE826</text:p>
          </table:table-cell>
          <table:table-cell office:value-type="string" calcext:value-type="string">
            <text:p>gamma_omicron_2</text:p>
          </table:table-cell>
          <table:table-cell table:formula="of:=RIGHT([.A75];4)" office:value-type="string" office:string-value="E826" calcext:value-type="string">
            <text:p>E826</text:p>
          </table:table-cell>
          <table:table-cell table:formula="of:=UNICHAR(HEX2DEC([.C75]))" office:value-type="string" office:string-value="" calcext:value-type="string">
            <text:p></text:p>
          </table:table-cell>
          <table:table-cell office:value-type="string" calcext:value-type="string">
            <text:p>γο</text:p>
          </table:table-cell>
          <table:table-cell table:style-name="ce15" office:value-type="string" calcext:value-type="string">
            <text:p></text:p>
          </table:table-cell>
          <table:table-cell table:formula="of:=DEC2HEX(UNICODE([.F75]))" office:value-type="string" office:string-value="E6DA" calcext:value-type="string">
            <text:p>E6DA</text:p>
          </table:table-cell>
          <table:table-cell table:formula="of:=CONCATENATE(&quot;0x&quot;;[.G75])" office:value-type="string" office:string-value="0xE6DA" calcext:value-type="string">
            <text:p>0xE6DA</text:p>
          </table:table-cell>
          <table:table-cell table:formula="of:=VLOOKUP([.H75];[$FROMVS_Names.$A$1:$FROMVS_Names.$B$151];2;0)" office:value-type="string" office:string-value="gamma_omicron_2" calcext:value-type="string">
            <text:p>gamma_omicron_2</text:p>
          </table:table-cell>
        </table:table-row>
        <table:table-row table:style-name="ro1">
          <table:table-cell office:value-type="string" calcext:value-type="string">
            <text:p>0xE6B8</text:p>
          </table:table-cell>
          <table:table-cell office:value-type="string" calcext:value-type="string">
            <text:p>alpha_psili_sigma_tau</text:p>
          </table:table-cell>
          <table:table-cell table:formula="of:=RIGHT([.A76];4)" office:value-type="string" office:string-value="E6B8" calcext:value-type="string">
            <text:p>E6B8</text:p>
          </table:table-cell>
          <table:table-cell table:formula="of:=UNICHAR(HEX2DEC([.C76]))" office:value-type="string" office:string-value="" calcext:value-type="string">
            <text:p></text:p>
          </table:table-cell>
          <table:table-cell office:value-type="string" calcext:value-type="string">
            <text:p>ἀστ</text:p>
          </table:table-cell>
          <table:table-cell table:style-name="ce12" office:value-type="string" calcext:value-type="string">
            <text:p></text:p>
          </table:table-cell>
          <table:table-cell table:formula="of:=DEC2HEX(UNICODE([.F76]))" office:value-type="string" office:string-value="E6B9" calcext:value-type="string">
            <text:p>E6B9</text:p>
          </table:table-cell>
          <table:table-cell table:formula="of:=CONCATENATE(&quot;0x&quot;;[.G76])" office:value-type="string" office:string-value="0xE6B9" calcext:value-type="string">
            <text:p>0xE6B9</text:p>
          </table:table-cell>
          <table:table-cell table:formula="of:=VLOOKUP([.H76];[$FROMVS_Names.$A$1:$FROMVS_Names.$B$151];2;0)" office:value-type="string" office:string-value="alpha_psili_sigma_tau" calcext:value-type="string">
            <text:p>alpha_psili_sigma_tau</text:p>
          </table:table-cell>
        </table:table-row>
        <table:table-row table:style-name="ro1">
          <table:table-cell office:value-type="string" calcext:value-type="string">
            <text:p>0xE6B7</text:p>
          </table:table-cell>
          <table:table-cell office:value-type="string" calcext:value-type="string">
            <text:p>alpha_sigma_tau</text:p>
          </table:table-cell>
          <table:table-cell table:formula="of:=RIGHT([.A77];4)" office:value-type="string" office:string-value="E6B7" calcext:value-type="string">
            <text:p>E6B7</text:p>
          </table:table-cell>
          <table:table-cell table:formula="of:=UNICHAR(HEX2DEC([.C77]))" office:value-type="string" office:string-value="" calcext:value-type="string">
            <text:p></text:p>
          </table:table-cell>
          <table:table-cell office:value-type="string" calcext:value-type="string">
            <text:p>αστ</text:p>
          </table:table-cell>
          <table:table-cell table:style-name="ce12" office:value-type="string" calcext:value-type="string">
            <text:p></text:p>
          </table:table-cell>
          <table:table-cell table:formula="of:=DEC2HEX(UNICODE([.F77]))" office:value-type="string" office:string-value="E6B8" calcext:value-type="string">
            <text:p>E6B8</text:p>
          </table:table-cell>
          <table:table-cell table:formula="of:=CONCATENATE(&quot;0x&quot;;[.G77])" office:value-type="string" office:string-value="0xE6B8" calcext:value-type="string">
            <text:p>0xE6B8</text:p>
          </table:table-cell>
          <table:table-cell table:formula="of:=VLOOKUP([.H77];[$FROMVS_Names.$A$1:$FROMVS_Names.$B$151];2;0)" office:value-type="string" office:string-value="alpha_sigma_tau" calcext:value-type="string">
            <text:p>alpha_sigma_tau</text:p>
          </table:table-cell>
        </table:table-row>
        <table:table-row table:style-name="ro1">
          <table:table-cell office:value-type="string" calcext:value-type="string">
            <text:p>0xE833</text:p>
          </table:table-cell>
          <table:table-cell office:value-type="string" calcext:value-type="string">
            <text:p>alpha_rho</text:p>
          </table:table-cell>
          <table:table-cell table:formula="of:=RIGHT([.A78];4)" office:value-type="string" office:string-value="E833" calcext:value-type="string">
            <text:p>E833</text:p>
          </table:table-cell>
          <table:table-cell table:formula="of:=UNICHAR(HEX2DEC([.C78]))" office:value-type="string" office:string-value="" calcext:value-type="string">
            <text:p></text:p>
          </table:table-cell>
          <table:table-cell office:value-type="string" calcext:value-type="string">
            <text:p>αρ</text:p>
          </table:table-cell>
          <table:table-cell table:style-name="ce16" office:value-type="string" calcext:value-type="string">
            <text:p></text:p>
          </table:table-cell>
          <table:table-cell table:formula="of:=DEC2HEX(UNICODE([.F78]))" office:value-type="string" office:string-value="E6B7" calcext:value-type="string">
            <text:p>E6B7</text:p>
          </table:table-cell>
          <table:table-cell table:formula="of:=CONCATENATE(&quot;0x&quot;;[.G78])" office:value-type="string" office:string-value="0xE6B7" calcext:value-type="string">
            <text:p>0xE6B7</text:p>
          </table:table-cell>
          <table:table-cell table:formula="of:=VLOOKUP([.H78];[$FROMVS_Names.$A$1:$FROMVS_Names.$B$151];2;0)" office:value-type="string" office:string-value="alpha_rho" calcext:value-type="string">
            <text:p>alpha_rho</text:p>
          </table:table-cell>
        </table:table-row>
        <table:table-row table:style-name="ro1">
          <table:table-cell office:value-type="string" calcext:value-type="string">
            <text:p>0xE7A0</text:p>
          </table:table-cell>
          <table:table-cell office:value-type="string" calcext:value-type="string">
            <text:p>pi_1</text:p>
          </table:table-cell>
          <table:table-cell table:formula="of:=RIGHT([.A79];4)" office:value-type="string" office:string-value="E7A0" calcext:value-type="string">
            <text:p>E7A0</text:p>
          </table:table-cell>
          <table:table-cell table:formula="of:=UNICHAR(HEX2DEC([.C79]))" office:value-type="string" office:string-value="" calcext:value-type="string">
            <text:p>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ϖ</text:p>
          </table:table-cell>
          <table:table-cell table:style-name="ce19" table:formula="of:=DEC2HEX(UNICODE([.F79]))" office:value-type="string" office:string-value="3D6" calcext:value-type="string">
            <text:p>3D6</text:p>
          </table:table-cell>
          <table:table-cell table:formula="of:=CONCATENATE(&quot;0x&quot;;[.G79])" office:value-type="string" office:string-value="0x3D6" calcext:value-type="string">
            <text:p>0x3D6</text:p>
          </table:table-cell>
          <table:table-cell office:value-type="string" calcext:value-type="string">
            <text:p>pi_symbol</text:p>
          </table:table-cell>
        </table:table-row>
        <table:table-row table:style-name="ro1">
          <table:table-cell office:value-type="string" calcext:value-type="string">
            <text:p>0xE720</text:p>
          </table:table-cell>
          <table:table-cell office:value-type="string" calcext:value-type="string">
            <text:p>theta_1</text:p>
          </table:table-cell>
          <table:table-cell table:formula="of:=RIGHT([.A80];4)" office:value-type="string" office:string-value="E720" calcext:value-type="string">
            <text:p>E720</text:p>
          </table:table-cell>
          <table:table-cell table:formula="of:=UNICHAR(HEX2DEC([.C80]))" office:value-type="string" office:string-value="" calcext:value-type="string">
            <text:p></text:p>
          </table:table-cell>
          <table:table-cell office:value-type="string" calcext:value-type="string">
            <text:p>θ</text:p>
          </table:table-cell>
          <table:table-cell table:style-name="ce18" office:value-type="string" calcext:value-type="string">
            <text:p>ϑ</text:p>
          </table:table-cell>
          <table:table-cell table:formula="of:=DEC2HEX(UNICODE([.F80]))" office:value-type="string" office:string-value="3D1" calcext:value-type="string">
            <text:p>3D1</text:p>
          </table:table-cell>
          <table:table-cell table:formula="of:=CONCATENATE(&quot;0x&quot;;[.G80])" office:value-type="string" office:string-value="0x3D1" calcext:value-type="string">
            <text:p>0x3D1</text:p>
          </table:table-cell>
          <table:table-cell office:value-type="string" calcext:value-type="string">
            <text:p>theta_symbol</text:p>
          </table:table-cell>
        </table:table-row>
        <table:table-row table:style-name="ro1">
          <table:table-cell office:value-type="string" calcext:value-type="string">
            <text:p>0xE6C0</text:p>
          </table:table-cell>
          <table:table-cell office:value-type="string" calcext:value-type="string">
            <text:p>beta_curly</text:p>
          </table:table-cell>
          <table:table-cell table:formula="of:=RIGHT([.A81];4)" office:value-type="string" office:string-value="E6C0" calcext:value-type="string">
            <text:p>E6C0</text:p>
          </table:table-cell>
          <table:table-cell table:formula="of:=UNICHAR(HEX2DEC([.C81]))" office:value-type="string" office:string-value="" calcext:value-type="string">
            <text:p>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ϐ</text:p>
          </table:table-cell>
          <table:table-cell table:formula="of:=DEC2HEX(UNICODE([.F81]))" office:value-type="string" office:string-value="3D0" calcext:value-type="string">
            <text:p>3D0</text:p>
          </table:table-cell>
          <table:table-cell table:formula="of:=CONCATENATE(&quot;0x&quot;;[.G81])" office:value-type="string" office:string-value="0x3D0" calcext:value-type="string">
            <text:p>0x3D0</text:p>
          </table:table-cell>
          <table:table-cell office:value-type="string" calcext:value-type="string">
            <text:p>beta_symbol</text:p>
          </table:table-cell>
        </table:table-row>
      </table:table>
      <table:named-expressions/>
      <table:database-ranges>
        <table:database-range table:name="__Anonymous_Sheet_DB__0" table:target-range-address="FROMVS3_0_PUA.A1:FROMVS3_0_PUA.J152" table:display-filter-buttons="true" table:orientation="column"/>
        <table:database-range table:name="__Anonymous_Sheet_DB__1" table:target-range-address="FROMVS2_1_Names.A1:FROMVS2_1_Names.B15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FROMVS1" svg:font-family="FROMVS"/>
    <style:font-face style:name="FROMVS3_01" svg:font-family="FROMVS3_0"/>
    <style:font-face style:name="DejaVu Sans2" svg:font-family="'DejaVu Sans'" style:font-family-generic="swiss"/>
    <style:font-face style:name="FROMVS" svg:font-family="FROMVS" style:font-pitch="variable"/>
    <style:font-face style:name="FROMVS3_0" svg:font-family="FROMVS3_0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3" style:language-asian="zh" style:country-asian="CN" style:font-name-complex="DejaVu Sans3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21:00:21.35124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AARCH64 LibreOffice_project/00m0$Build-3</meta:generator>
    <dc:date>2022-02-14T21:31:52.880839408</dc:date>
    <meta:editing-duration>PT5H21M54S</meta:editing-duration>
    <meta:editing-cycles>28</meta:editing-cycles>
    <meta:document-statistic meta:table-count="4" meta:cell-count="2845" meta:object-count="0"/>
  </office:meta>
</office:document-meta>
</file>