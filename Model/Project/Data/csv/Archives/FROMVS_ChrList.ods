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OMVS" svg:font-family="FROMV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OMVS"/>
    </style:style>
  </office:automatic-styles>
  <office:body>
    <office:spreadsheet>
      <table:calculation-settings table:automatic-find-labels="false" table:use-regular-expressions="false" table:use-wildcards="true"/>
      <table:table table:name="FROMVS_Chr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<text:s/>̊</text:p>
          </table:table-cell>
          <table:table-cell table:formula="of:=UNICODE([.A1])" office:value-type="float" office:value="32" calcext:value-type="float">
            <text:p>32</text:p>
          </table:table-cell>
          <table:table-cell table:formula="of:=CONCATENATE(&quot;\u&quot;;[.B1];&quot;?&quot;)" office:value-type="string" office:string-value="\u32?" calcext:value-type="string">
            <text:p>\u3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ʾ</text:p>
          </table:table-cell>
          <table:table-cell table:formula="of:=UNICODE([.A2])" office:value-type="float" office:value="32" calcext:value-type="float">
            <text:p>32</text:p>
          </table:table-cell>
          <table:table-cell table:formula="of:=CONCATENATE(&quot;\u&quot;;[.B2];&quot;?&quot;)" office:value-type="string" office:string-value="\u32?" calcext:value-type="string">
            <text:p>\u3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,</text:p>
          </table:table-cell>
          <table:table-cell table:formula="of:=UNICODE([.A3])" office:value-type="float" office:value="44" calcext:value-type="float">
            <text:p>44</text:p>
          </table:table-cell>
          <table:table-cell table:formula="of:=CONCATENATE(&quot;\u&quot;;[.B3];&quot;?&quot;)" office:value-type="string" office:string-value="\u44?" calcext:value-type="string">
            <text:p>\u4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</text:p>
          </table:table-cell>
          <table:table-cell table:formula="of:=UNICODE([.A4])" office:value-type="float" office:value="46" calcext:value-type="float">
            <text:p>46</text:p>
          </table:table-cell>
          <table:table-cell table:formula="of:=CONCATENATE(&quot;\u&quot;;[.B4];&quot;?&quot;)" office:value-type="string" office:string-value="\u46?" calcext:value-type="string">
            <text:p>\u4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;</text:p>
          </table:table-cell>
          <table:table-cell table:formula="of:=UNICODE([.A5])" office:value-type="float" office:value="59" calcext:value-type="float">
            <text:p>59</text:p>
          </table:table-cell>
          <table:table-cell table:formula="of:=CONCATENATE(&quot;\u&quot;;[.B5];&quot;?&quot;)" office:value-type="string" office:string-value="\u59?" calcext:value-type="string">
            <text:p>\u5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·</text:p>
          </table:table-cell>
          <table:table-cell table:formula="of:=UNICODE([.A6])" office:value-type="float" office:value="183" calcext:value-type="float">
            <text:p>183</text:p>
          </table:table-cell>
          <table:table-cell table:formula="of:=CONCATENATE(&quot;\u&quot;;[.B6];&quot;?&quot;)" office:value-type="string" office:string-value="\u183?" calcext:value-type="string">
            <text:p>\u18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ʼ</text:p>
          </table:table-cell>
          <table:table-cell table:formula="of:=UNICODE([.A7])" office:value-type="float" office:value="700" calcext:value-type="float">
            <text:p>700</text:p>
          </table:table-cell>
          <table:table-cell table:formula="of:=CONCATENATE(&quot;\u&quot;;[.B7];&quot;?&quot;)" office:value-type="string" office:string-value="\u700?" calcext:value-type="string">
            <text:p>\u70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Α</text:p>
          </table:table-cell>
          <table:table-cell table:formula="of:=UNICODE([.A8])" office:value-type="float" office:value="913" calcext:value-type="float">
            <text:p>913</text:p>
          </table:table-cell>
          <table:table-cell table:formula="of:=CONCATENATE(&quot;\u&quot;;[.B8];&quot;?&quot;)" office:value-type="string" office:string-value="\u913?" calcext:value-type="string">
            <text:p>\u91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Β</text:p>
          </table:table-cell>
          <table:table-cell table:formula="of:=UNICODE([.A9])" office:value-type="float" office:value="914" calcext:value-type="float">
            <text:p>914</text:p>
          </table:table-cell>
          <table:table-cell table:formula="of:=CONCATENATE(&quot;\u&quot;;[.B9];&quot;?&quot;)" office:value-type="string" office:string-value="\u914?" calcext:value-type="string">
            <text:p>\u91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Γ</text:p>
          </table:table-cell>
          <table:table-cell table:formula="of:=UNICODE([.A10])" office:value-type="float" office:value="915" calcext:value-type="float">
            <text:p>915</text:p>
          </table:table-cell>
          <table:table-cell table:formula="of:=CONCATENATE(&quot;\u&quot;;[.B10];&quot;?&quot;)" office:value-type="string" office:string-value="\u915?" calcext:value-type="string">
            <text:p>\u91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Δ</text:p>
          </table:table-cell>
          <table:table-cell table:formula="of:=UNICODE([.A11])" office:value-type="float" office:value="916" calcext:value-type="float">
            <text:p>916</text:p>
          </table:table-cell>
          <table:table-cell table:formula="of:=CONCATENATE(&quot;\u&quot;;[.B11];&quot;?&quot;)" office:value-type="string" office:string-value="\u916?" calcext:value-type="string">
            <text:p>\u91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Ε</text:p>
          </table:table-cell>
          <table:table-cell table:formula="of:=UNICODE([.A12])" office:value-type="float" office:value="917" calcext:value-type="float">
            <text:p>917</text:p>
          </table:table-cell>
          <table:table-cell table:formula="of:=CONCATENATE(&quot;\u&quot;;[.B12];&quot;?&quot;)" office:value-type="string" office:string-value="\u917?" calcext:value-type="string">
            <text:p>\u91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Ζ</text:p>
          </table:table-cell>
          <table:table-cell table:formula="of:=UNICODE([.A13])" office:value-type="float" office:value="918" calcext:value-type="float">
            <text:p>918</text:p>
          </table:table-cell>
          <table:table-cell table:formula="of:=CONCATENATE(&quot;\u&quot;;[.B13];&quot;?&quot;)" office:value-type="string" office:string-value="\u918?" calcext:value-type="string">
            <text:p>\u91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Η</text:p>
          </table:table-cell>
          <table:table-cell table:formula="of:=UNICODE([.A14])" office:value-type="float" office:value="919" calcext:value-type="float">
            <text:p>919</text:p>
          </table:table-cell>
          <table:table-cell table:formula="of:=CONCATENATE(&quot;\u&quot;;[.B14];&quot;?&quot;)" office:value-type="string" office:string-value="\u919?" calcext:value-type="string">
            <text:p>\u91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Θ</text:p>
          </table:table-cell>
          <table:table-cell table:formula="of:=UNICODE([.A15])" office:value-type="float" office:value="920" calcext:value-type="float">
            <text:p>920</text:p>
          </table:table-cell>
          <table:table-cell table:formula="of:=CONCATENATE(&quot;\u&quot;;[.B15];&quot;?&quot;)" office:value-type="string" office:string-value="\u920?" calcext:value-type="string">
            <text:p>\u92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Ι</text:p>
          </table:table-cell>
          <table:table-cell table:formula="of:=UNICODE([.A16])" office:value-type="float" office:value="921" calcext:value-type="float">
            <text:p>921</text:p>
          </table:table-cell>
          <table:table-cell table:formula="of:=CONCATENATE(&quot;\u&quot;;[.B16];&quot;?&quot;)" office:value-type="string" office:string-value="\u921?" calcext:value-type="string">
            <text:p>\u92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table:formula="of:=UNICODE([.A17])" office:value-type="float" office:value="73" calcext:value-type="float">
            <text:p>73</text:p>
          </table:table-cell>
          <table:table-cell table:formula="of:=CONCATENATE(&quot;\u&quot;;[.B16];&quot;?&quot;)" office:value-type="string" office:string-value="\u921?" calcext:value-type="string">
            <text:p>\u92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Κ</text:p>
          </table:table-cell>
          <table:table-cell table:formula="of:=UNICODE([.A18])" office:value-type="float" office:value="922" calcext:value-type="float">
            <text:p>922</text:p>
          </table:table-cell>
          <table:table-cell table:formula="of:=CONCATENATE(&quot;\u&quot;;[.B18];&quot;?&quot;)" office:value-type="string" office:string-value="\u922?" calcext:value-type="string">
            <text:p>\u92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Λ</text:p>
          </table:table-cell>
          <table:table-cell table:formula="of:=UNICODE([.A19])" office:value-type="float" office:value="923" calcext:value-type="float">
            <text:p>923</text:p>
          </table:table-cell>
          <table:table-cell table:formula="of:=CONCATENATE(&quot;\u&quot;;[.B19];&quot;?&quot;)" office:value-type="string" office:string-value="\u923?" calcext:value-type="string">
            <text:p>\u92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Μ</text:p>
          </table:table-cell>
          <table:table-cell table:formula="of:=UNICODE([.A20])" office:value-type="float" office:value="924" calcext:value-type="float">
            <text:p>924</text:p>
          </table:table-cell>
          <table:table-cell table:formula="of:=CONCATENATE(&quot;\u&quot;;[.B20];&quot;?&quot;)" office:value-type="string" office:string-value="\u924?" calcext:value-type="string">
            <text:p>\u92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Ν</text:p>
          </table:table-cell>
          <table:table-cell table:formula="of:=UNICODE([.A21])" office:value-type="float" office:value="925" calcext:value-type="float">
            <text:p>925</text:p>
          </table:table-cell>
          <table:table-cell table:formula="of:=CONCATENATE(&quot;\u&quot;;[.B21];&quot;?&quot;)" office:value-type="string" office:string-value="\u925?" calcext:value-type="string">
            <text:p>\u92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Ξ</text:p>
          </table:table-cell>
          <table:table-cell table:formula="of:=UNICODE([.A22])" office:value-type="float" office:value="926" calcext:value-type="float">
            <text:p>926</text:p>
          </table:table-cell>
          <table:table-cell table:formula="of:=CONCATENATE(&quot;\u&quot;;[.B22];&quot;?&quot;)" office:value-type="string" office:string-value="\u926?" calcext:value-type="string">
            <text:p>\u92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Ο</text:p>
          </table:table-cell>
          <table:table-cell table:formula="of:=UNICODE([.A23])" office:value-type="float" office:value="927" calcext:value-type="float">
            <text:p>927</text:p>
          </table:table-cell>
          <table:table-cell table:formula="of:=CONCATENATE(&quot;\u&quot;;[.B23];&quot;?&quot;)" office:value-type="string" office:string-value="\u927?" calcext:value-type="string">
            <text:p>\u92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Π</text:p>
          </table:table-cell>
          <table:table-cell table:formula="of:=UNICODE([.A24])" office:value-type="float" office:value="928" calcext:value-type="float">
            <text:p>928</text:p>
          </table:table-cell>
          <table:table-cell table:formula="of:=CONCATENATE(&quot;\u&quot;;[.B24];&quot;?&quot;)" office:value-type="string" office:string-value="\u928?" calcext:value-type="string">
            <text:p>\u92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Ρ</text:p>
          </table:table-cell>
          <table:table-cell table:formula="of:=UNICODE([.A25])" office:value-type="float" office:value="929" calcext:value-type="float">
            <text:p>929</text:p>
          </table:table-cell>
          <table:table-cell table:formula="of:=CONCATENATE(&quot;\u&quot;;[.B25];&quot;?&quot;)" office:value-type="string" office:string-value="\u929?" calcext:value-type="string">
            <text:p>\u92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Σ</text:p>
          </table:table-cell>
          <table:table-cell table:formula="of:=UNICODE([.A26])" office:value-type="float" office:value="931" calcext:value-type="float">
            <text:p>931</text:p>
          </table:table-cell>
          <table:table-cell table:formula="of:=CONCATENATE(&quot;\u&quot;;[.B26];&quot;?&quot;)" office:value-type="string" office:string-value="\u931?" calcext:value-type="string">
            <text:p>\u93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Τ</text:p>
          </table:table-cell>
          <table:table-cell table:formula="of:=UNICODE([.A27])" office:value-type="float" office:value="932" calcext:value-type="float">
            <text:p>932</text:p>
          </table:table-cell>
          <table:table-cell table:formula="of:=CONCATENATE(&quot;\u&quot;;[.B27];&quot;?&quot;)" office:value-type="string" office:string-value="\u932?" calcext:value-type="string">
            <text:p>\u93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Υ</text:p>
          </table:table-cell>
          <table:table-cell table:formula="of:=UNICODE([.A28])" office:value-type="float" office:value="933" calcext:value-type="float">
            <text:p>933</text:p>
          </table:table-cell>
          <table:table-cell table:formula="of:=CONCATENATE(&quot;\u&quot;;[.B28];&quot;?&quot;)" office:value-type="string" office:string-value="\u933?" calcext:value-type="string">
            <text:p>\u93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Φ</text:p>
          </table:table-cell>
          <table:table-cell table:formula="of:=UNICODE([.A29])" office:value-type="float" office:value="934" calcext:value-type="float">
            <text:p>934</text:p>
          </table:table-cell>
          <table:table-cell table:formula="of:=CONCATENATE(&quot;\u&quot;;[.B29];&quot;?&quot;)" office:value-type="string" office:string-value="\u934?" calcext:value-type="string">
            <text:p>\u93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Χ</text:p>
          </table:table-cell>
          <table:table-cell table:formula="of:=UNICODE([.A30])" office:value-type="float" office:value="935" calcext:value-type="float">
            <text:p>935</text:p>
          </table:table-cell>
          <table:table-cell table:formula="of:=CONCATENATE(&quot;\u&quot;;[.B30];&quot;?&quot;)" office:value-type="string" office:string-value="\u935?" calcext:value-type="string">
            <text:p>\u93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Ψ</text:p>
          </table:table-cell>
          <table:table-cell table:formula="of:=UNICODE([.A31])" office:value-type="float" office:value="936" calcext:value-type="float">
            <text:p>936</text:p>
          </table:table-cell>
          <table:table-cell table:formula="of:=CONCATENATE(&quot;\u&quot;;[.B31];&quot;?&quot;)" office:value-type="string" office:string-value="\u936?" calcext:value-type="string">
            <text:p>\u93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Ω</text:p>
          </table:table-cell>
          <table:table-cell table:formula="of:=UNICODE([.A32])" office:value-type="float" office:value="937" calcext:value-type="float">
            <text:p>937</text:p>
          </table:table-cell>
          <table:table-cell table:formula="of:=CONCATENATE(&quot;\u&quot;;[.B32];&quot;?&quot;)" office:value-type="string" office:string-value="\u937?" calcext:value-type="string">
            <text:p>\u93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Ϊ</text:p>
          </table:table-cell>
          <table:table-cell table:formula="of:=UNICODE([.A33])" office:value-type="float" office:value="938" calcext:value-type="float">
            <text:p>938</text:p>
          </table:table-cell>
          <table:table-cell table:formula="of:=CONCATENATE(&quot;\u&quot;;[.B33];&quot;?&quot;)" office:value-type="string" office:string-value="\u938?" calcext:value-type="string">
            <text:p>\u93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Ϋ</text:p>
          </table:table-cell>
          <table:table-cell table:formula="of:=UNICODE([.A34])" office:value-type="float" office:value="939" calcext:value-type="float">
            <text:p>939</text:p>
          </table:table-cell>
          <table:table-cell table:formula="of:=CONCATENATE(&quot;\u&quot;;[.B34];&quot;?&quot;)" office:value-type="string" office:string-value="\u939?" calcext:value-type="string">
            <text:p>\u93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ά</text:p>
          </table:table-cell>
          <table:table-cell table:formula="of:=UNICODE([.A35])" office:value-type="float" office:value="940" calcext:value-type="float">
            <text:p>940</text:p>
          </table:table-cell>
          <table:table-cell table:formula="of:=CONCATENATE(&quot;\u&quot;;[.B35];&quot;?&quot;)" office:value-type="string" office:string-value="\u940?" calcext:value-type="string">
            <text:p>\u94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έ</text:p>
          </table:table-cell>
          <table:table-cell table:formula="of:=UNICODE([.A36])" office:value-type="float" office:value="941" calcext:value-type="float">
            <text:p>941</text:p>
          </table:table-cell>
          <table:table-cell table:formula="of:=CONCATENATE(&quot;\u&quot;;[.B36];&quot;?&quot;)" office:value-type="string" office:string-value="\u941?" calcext:value-type="string">
            <text:p>\u94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ή</text:p>
          </table:table-cell>
          <table:table-cell table:formula="of:=UNICODE([.A37])" office:value-type="float" office:value="942" calcext:value-type="float">
            <text:p>942</text:p>
          </table:table-cell>
          <table:table-cell table:formula="of:=CONCATENATE(&quot;\u&quot;;[.B37];&quot;?&quot;)" office:value-type="string" office:string-value="\u942?" calcext:value-type="string">
            <text:p>\u94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ί</text:p>
          </table:table-cell>
          <table:table-cell table:formula="of:=UNICODE([.A38])" office:value-type="float" office:value="943" calcext:value-type="float">
            <text:p>943</text:p>
          </table:table-cell>
          <table:table-cell table:formula="of:=CONCATENATE(&quot;\u&quot;;[.B38];&quot;?&quot;)" office:value-type="string" office:string-value="\u943?" calcext:value-type="string">
            <text:p>\u94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ΰ</text:p>
          </table:table-cell>
          <table:table-cell table:formula="of:=UNICODE([.A39])" office:value-type="float" office:value="944" calcext:value-type="float">
            <text:p>944</text:p>
          </table:table-cell>
          <table:table-cell table:formula="of:=CONCATENATE(&quot;\u&quot;;[.B39];&quot;?&quot;)" office:value-type="string" office:string-value="\u944?" calcext:value-type="string">
            <text:p>\u94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α</text:p>
          </table:table-cell>
          <table:table-cell table:formula="of:=UNICODE([.A40])" office:value-type="float" office:value="945" calcext:value-type="float">
            <text:p>945</text:p>
          </table:table-cell>
          <table:table-cell table:formula="of:=CONCATENATE(&quot;\u&quot;;[.B40];&quot;?&quot;)" office:value-type="string" office:string-value="\u945?" calcext:value-type="string">
            <text:p>\u94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β</text:p>
          </table:table-cell>
          <table:table-cell table:formula="of:=UNICODE([.A41])" office:value-type="float" office:value="946" calcext:value-type="float">
            <text:p>946</text:p>
          </table:table-cell>
          <table:table-cell table:formula="of:=CONCATENATE(&quot;\u&quot;;[.B41];&quot;?&quot;)" office:value-type="string" office:string-value="\u946?" calcext:value-type="string">
            <text:p>\u94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γ</text:p>
          </table:table-cell>
          <table:table-cell table:formula="of:=UNICODE([.A42])" office:value-type="float" office:value="947" calcext:value-type="float">
            <text:p>947</text:p>
          </table:table-cell>
          <table:table-cell table:formula="of:=CONCATENATE(&quot;\u&quot;;[.B42];&quot;?&quot;)" office:value-type="string" office:string-value="\u947?" calcext:value-type="string">
            <text:p>\u94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δ</text:p>
          </table:table-cell>
          <table:table-cell table:formula="of:=UNICODE([.A43])" office:value-type="float" office:value="948" calcext:value-type="float">
            <text:p>948</text:p>
          </table:table-cell>
          <table:table-cell table:formula="of:=CONCATENATE(&quot;\u&quot;;[.B43];&quot;?&quot;)" office:value-type="string" office:string-value="\u948?" calcext:value-type="string">
            <text:p>\u94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ε</text:p>
          </table:table-cell>
          <table:table-cell table:formula="of:=UNICODE([.A44])" office:value-type="float" office:value="949" calcext:value-type="float">
            <text:p>949</text:p>
          </table:table-cell>
          <table:table-cell table:formula="of:=CONCATENATE(&quot;\u&quot;;[.B44];&quot;?&quot;)" office:value-type="string" office:string-value="\u949?" calcext:value-type="string">
            <text:p>\u94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ζ</text:p>
          </table:table-cell>
          <table:table-cell table:formula="of:=UNICODE([.A45])" office:value-type="float" office:value="950" calcext:value-type="float">
            <text:p>950</text:p>
          </table:table-cell>
          <table:table-cell table:formula="of:=CONCATENATE(&quot;\u&quot;;[.B45];&quot;?&quot;)" office:value-type="string" office:string-value="\u950?" calcext:value-type="string">
            <text:p>\u95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η</text:p>
          </table:table-cell>
          <table:table-cell table:formula="of:=UNICODE([.A46])" office:value-type="float" office:value="951" calcext:value-type="float">
            <text:p>951</text:p>
          </table:table-cell>
          <table:table-cell table:formula="of:=CONCATENATE(&quot;\u&quot;;[.B46];&quot;?&quot;)" office:value-type="string" office:string-value="\u951?" calcext:value-type="string">
            <text:p>\u95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θ</text:p>
          </table:table-cell>
          <table:table-cell table:formula="of:=UNICODE([.A47])" office:value-type="float" office:value="952" calcext:value-type="float">
            <text:p>952</text:p>
          </table:table-cell>
          <table:table-cell table:formula="of:=CONCATENATE(&quot;\u&quot;;[.B47];&quot;?&quot;)" office:value-type="string" office:string-value="\u952?" calcext:value-type="string">
            <text:p>\u95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ι</text:p>
          </table:table-cell>
          <table:table-cell table:formula="of:=UNICODE([.A48])" office:value-type="float" office:value="953" calcext:value-type="float">
            <text:p>953</text:p>
          </table:table-cell>
          <table:table-cell table:formula="of:=CONCATENATE(&quot;\u&quot;;[.B48];&quot;?&quot;)" office:value-type="string" office:string-value="\u953?" calcext:value-type="string">
            <text:p>\u95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κ</text:p>
          </table:table-cell>
          <table:table-cell table:formula="of:=UNICODE([.A49])" office:value-type="float" office:value="954" calcext:value-type="float">
            <text:p>954</text:p>
          </table:table-cell>
          <table:table-cell table:formula="of:=CONCATENATE(&quot;\u&quot;;[.B49];&quot;?&quot;)" office:value-type="string" office:string-value="\u954?" calcext:value-type="string">
            <text:p>\u95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λ</text:p>
          </table:table-cell>
          <table:table-cell table:formula="of:=UNICODE([.A50])" office:value-type="float" office:value="955" calcext:value-type="float">
            <text:p>955</text:p>
          </table:table-cell>
          <table:table-cell table:formula="of:=CONCATENATE(&quot;\u&quot;;[.B50];&quot;?&quot;)" office:value-type="string" office:string-value="\u955?" calcext:value-type="string">
            <text:p>\u95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μ</text:p>
          </table:table-cell>
          <table:table-cell table:formula="of:=UNICODE([.A51])" office:value-type="float" office:value="956" calcext:value-type="float">
            <text:p>956</text:p>
          </table:table-cell>
          <table:table-cell table:formula="of:=CONCATENATE(&quot;\u&quot;;[.B51];&quot;?&quot;)" office:value-type="string" office:string-value="\u956?" calcext:value-type="string">
            <text:p>\u95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ν</text:p>
          </table:table-cell>
          <table:table-cell table:formula="of:=UNICODE([.A52])" office:value-type="float" office:value="957" calcext:value-type="float">
            <text:p>957</text:p>
          </table:table-cell>
          <table:table-cell table:formula="of:=CONCATENATE(&quot;\u&quot;;[.B52];&quot;?&quot;)" office:value-type="string" office:string-value="\u957?" calcext:value-type="string">
            <text:p>\u95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ξ</text:p>
          </table:table-cell>
          <table:table-cell table:formula="of:=UNICODE([.A53])" office:value-type="float" office:value="958" calcext:value-type="float">
            <text:p>958</text:p>
          </table:table-cell>
          <table:table-cell table:formula="of:=CONCATENATE(&quot;\u&quot;;[.B53];&quot;?&quot;)" office:value-type="string" office:string-value="\u958?" calcext:value-type="string">
            <text:p>\u95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ο</text:p>
          </table:table-cell>
          <table:table-cell table:formula="of:=UNICODE([.A54])" office:value-type="float" office:value="959" calcext:value-type="float">
            <text:p>959</text:p>
          </table:table-cell>
          <table:table-cell table:formula="of:=CONCATENATE(&quot;\u&quot;;[.B54];&quot;?&quot;)" office:value-type="string" office:string-value="\u959?" calcext:value-type="string">
            <text:p>\u95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π</text:p>
          </table:table-cell>
          <table:table-cell table:formula="of:=UNICODE([.A55])" office:value-type="float" office:value="960" calcext:value-type="float">
            <text:p>960</text:p>
          </table:table-cell>
          <table:table-cell table:formula="of:=CONCATENATE(&quot;\u&quot;;[.B55];&quot;?&quot;)" office:value-type="string" office:string-value="\u960?" calcext:value-type="string">
            <text:p>\u96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ρ</text:p>
          </table:table-cell>
          <table:table-cell table:formula="of:=UNICODE([.A56])" office:value-type="float" office:value="961" calcext:value-type="float">
            <text:p>961</text:p>
          </table:table-cell>
          <table:table-cell table:formula="of:=CONCATENATE(&quot;\u&quot;;[.B56];&quot;?&quot;)" office:value-type="string" office:string-value="\u961?" calcext:value-type="string">
            <text:p>\u96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ς</text:p>
          </table:table-cell>
          <table:table-cell table:formula="of:=UNICODE([.A57])" office:value-type="float" office:value="962" calcext:value-type="float">
            <text:p>962</text:p>
          </table:table-cell>
          <table:table-cell table:formula="of:=CONCATENATE(&quot;\u&quot;;[.B57];&quot;?&quot;)" office:value-type="string" office:string-value="\u962?" calcext:value-type="string">
            <text:p>\u96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ς</text:p>
          </table:table-cell>
          <table:table-cell table:formula="of:=UNICODE([.A58])" office:value-type="float" office:value="962" calcext:value-type="float">
            <text:p>962</text:p>
          </table:table-cell>
          <table:table-cell table:formula="of:=CONCATENATE(&quot;\u&quot;;[.B58];&quot;?&quot;)" office:value-type="string" office:string-value="\u962?" calcext:value-type="string">
            <text:p>\u96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σ</text:p>
          </table:table-cell>
          <table:table-cell table:formula="of:=UNICODE([.A59])" office:value-type="float" office:value="963" calcext:value-type="float">
            <text:p>963</text:p>
          </table:table-cell>
          <table:table-cell table:formula="of:=CONCATENATE(&quot;\u&quot;;[.B59];&quot;?&quot;)" office:value-type="string" office:string-value="\u963?" calcext:value-type="string">
            <text:p>\u96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τ</text:p>
          </table:table-cell>
          <table:table-cell table:formula="of:=UNICODE([.A60])" office:value-type="float" office:value="964" calcext:value-type="float">
            <text:p>964</text:p>
          </table:table-cell>
          <table:table-cell table:formula="of:=CONCATENATE(&quot;\u&quot;;[.B60];&quot;?&quot;)" office:value-type="string" office:string-value="\u964?" calcext:value-type="string">
            <text:p>\u96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τ̊</text:p>
          </table:table-cell>
          <table:table-cell table:formula="of:=UNICODE([.A61])" office:value-type="float" office:value="964" calcext:value-type="float">
            <text:p>964</text:p>
          </table:table-cell>
          <table:table-cell table:formula="of:=CONCATENATE(&quot;\u&quot;;[.B61];&quot;?&quot;)" office:value-type="string" office:string-value="\u964?" calcext:value-type="string">
            <text:p>\u96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υ</text:p>
          </table:table-cell>
          <table:table-cell table:formula="of:=UNICODE([.A62])" office:value-type="float" office:value="965" calcext:value-type="float">
            <text:p>965</text:p>
          </table:table-cell>
          <table:table-cell table:formula="of:=CONCATENATE(&quot;\u&quot;;[.B62];&quot;?&quot;)" office:value-type="string" office:string-value="\u965?" calcext:value-type="string">
            <text:p>\u96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φ</text:p>
          </table:table-cell>
          <table:table-cell table:formula="of:=UNICODE([.A63])" office:value-type="float" office:value="966" calcext:value-type="float">
            <text:p>966</text:p>
          </table:table-cell>
          <table:table-cell table:formula="of:=CONCATENATE(&quot;\u&quot;;[.B63];&quot;?&quot;)" office:value-type="string" office:string-value="\u966?" calcext:value-type="string">
            <text:p>\u96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χ</text:p>
          </table:table-cell>
          <table:table-cell table:formula="of:=UNICODE([.A64])" office:value-type="float" office:value="967" calcext:value-type="float">
            <text:p>967</text:p>
          </table:table-cell>
          <table:table-cell table:formula="of:=CONCATENATE(&quot;\u&quot;;[.B64];&quot;?&quot;)" office:value-type="string" office:string-value="\u967?" calcext:value-type="string">
            <text:p>\u96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ψ</text:p>
          </table:table-cell>
          <table:table-cell table:formula="of:=UNICODE([.A65])" office:value-type="float" office:value="968" calcext:value-type="float">
            <text:p>968</text:p>
          </table:table-cell>
          <table:table-cell table:formula="of:=CONCATENATE(&quot;\u&quot;;[.B65];&quot;?&quot;)" office:value-type="string" office:string-value="\u968?" calcext:value-type="string">
            <text:p>\u96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ω</text:p>
          </table:table-cell>
          <table:table-cell table:formula="of:=UNICODE([.A66])" office:value-type="float" office:value="969" calcext:value-type="float">
            <text:p>969</text:p>
          </table:table-cell>
          <table:table-cell table:formula="of:=CONCATENATE(&quot;\u&quot;;[.B66];&quot;?&quot;)" office:value-type="string" office:string-value="\u969?" calcext:value-type="string">
            <text:p>\u96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ϊ</text:p>
          </table:table-cell>
          <table:table-cell table:formula="of:=UNICODE([.A67])" office:value-type="float" office:value="970" calcext:value-type="float">
            <text:p>970</text:p>
          </table:table-cell>
          <table:table-cell table:formula="of:=CONCATENATE(&quot;\u&quot;;[.B67];&quot;?&quot;)" office:value-type="string" office:string-value="\u970?" calcext:value-type="string">
            <text:p>\u97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ϋ</text:p>
          </table:table-cell>
          <table:table-cell table:formula="of:=UNICODE([.A68])" office:value-type="float" office:value="971" calcext:value-type="float">
            <text:p>971</text:p>
          </table:table-cell>
          <table:table-cell table:formula="of:=CONCATENATE(&quot;\u&quot;;[.B68];&quot;?&quot;)" office:value-type="string" office:string-value="\u971?" calcext:value-type="string">
            <text:p>\u97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ό</text:p>
          </table:table-cell>
          <table:table-cell table:formula="of:=UNICODE([.A69])" office:value-type="float" office:value="972" calcext:value-type="float">
            <text:p>972</text:p>
          </table:table-cell>
          <table:table-cell table:formula="of:=CONCATENATE(&quot;\u&quot;;[.B69];&quot;?&quot;)" office:value-type="string" office:string-value="\u972?" calcext:value-type="string">
            <text:p>\u97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ύ</text:p>
          </table:table-cell>
          <table:table-cell table:formula="of:=UNICODE([.A70])" office:value-type="float" office:value="973" calcext:value-type="float">
            <text:p>973</text:p>
          </table:table-cell>
          <table:table-cell table:formula="of:=CONCATENATE(&quot;\u&quot;;[.B70];&quot;?&quot;)" office:value-type="string" office:string-value="\u973?" calcext:value-type="string">
            <text:p>\u97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ώ</text:p>
          </table:table-cell>
          <table:table-cell table:formula="of:=UNICODE([.A71])" office:value-type="float" office:value="974" calcext:value-type="float">
            <text:p>974</text:p>
          </table:table-cell>
          <table:table-cell table:formula="of:=CONCATENATE(&quot;\u&quot;;[.B71];&quot;?&quot;)" office:value-type="string" office:string-value="\u974?" calcext:value-type="string">
            <text:p>\u97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ϐ</text:p>
          </table:table-cell>
          <table:table-cell table:formula="of:=UNICODE([.A72])" office:value-type="float" office:value="976" calcext:value-type="float">
            <text:p>976</text:p>
          </table:table-cell>
          <table:table-cell table:formula="of:=CONCATENATE(&quot;\u&quot;;[.B72];&quot;?&quot;)" office:value-type="string" office:string-value="\u976?" calcext:value-type="string">
            <text:p>\u97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ϑ</text:p>
          </table:table-cell>
          <table:table-cell table:formula="of:=UNICODE([.A73])" office:value-type="float" office:value="977" calcext:value-type="float">
            <text:p>977</text:p>
          </table:table-cell>
          <table:table-cell table:formula="of:=CONCATENATE(&quot;\u&quot;;[.B73];&quot;?&quot;)" office:value-type="string" office:string-value="\u977?" calcext:value-type="string">
            <text:p>\u97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ϕ</text:p>
          </table:table-cell>
          <table:table-cell table:formula="of:=UNICODE([.A74])" office:value-type="float" office:value="981" calcext:value-type="float">
            <text:p>981</text:p>
          </table:table-cell>
          <table:table-cell table:formula="of:=CONCATENATE(&quot;\u&quot;;[.B74];&quot;?&quot;)" office:value-type="string" office:string-value="\u981?" calcext:value-type="string">
            <text:p>\u98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ϖ</text:p>
          </table:table-cell>
          <table:table-cell table:formula="of:=UNICODE([.A75])" office:value-type="float" office:value="982" calcext:value-type="float">
            <text:p>982</text:p>
          </table:table-cell>
          <table:table-cell table:formula="of:=CONCATENATE(&quot;\u&quot;;[.B75];&quot;?&quot;)" office:value-type="string" office:string-value="\u982?" calcext:value-type="string">
            <text:p>\u98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ϗ</text:p>
          </table:table-cell>
          <table:table-cell table:formula="of:=UNICODE([.A76])" office:value-type="float" office:value="983" calcext:value-type="float">
            <text:p>983</text:p>
          </table:table-cell>
          <table:table-cell table:formula="of:=CONCATENATE(&quot;\u&quot;;[.B76];&quot;?&quot;)" office:value-type="string" office:string-value="\u983?" calcext:value-type="string">
            <text:p>\u98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ἀ</text:p>
          </table:table-cell>
          <table:table-cell table:formula="of:=UNICODE([.A77])" office:value-type="float" office:value="7936" calcext:value-type="float">
            <text:p>7936</text:p>
          </table:table-cell>
          <table:table-cell table:formula="of:=CONCATENATE(&quot;\u&quot;;[.B77];&quot;?&quot;)" office:value-type="string" office:string-value="\u7936?" calcext:value-type="string">
            <text:p>\u793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ἁ</text:p>
          </table:table-cell>
          <table:table-cell table:formula="of:=UNICODE([.A78])" office:value-type="float" office:value="7937" calcext:value-type="float">
            <text:p>7937</text:p>
          </table:table-cell>
          <table:table-cell table:formula="of:=CONCATENATE(&quot;\u&quot;;[.B78];&quot;?&quot;)" office:value-type="string" office:string-value="\u7937?" calcext:value-type="string">
            <text:p>\u793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ἂ</text:p>
          </table:table-cell>
          <table:table-cell table:formula="of:=UNICODE([.A79])" office:value-type="float" office:value="7938" calcext:value-type="float">
            <text:p>7938</text:p>
          </table:table-cell>
          <table:table-cell table:formula="of:=CONCATENATE(&quot;\u&quot;;[.B79];&quot;?&quot;)" office:value-type="string" office:string-value="\u7938?" calcext:value-type="string">
            <text:p>\u793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ἃ</text:p>
          </table:table-cell>
          <table:table-cell table:formula="of:=UNICODE([.A80])" office:value-type="float" office:value="7939" calcext:value-type="float">
            <text:p>7939</text:p>
          </table:table-cell>
          <table:table-cell table:formula="of:=CONCATENATE(&quot;\u&quot;;[.B80];&quot;?&quot;)" office:value-type="string" office:string-value="\u7939?" calcext:value-type="string">
            <text:p>\u793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ἄ</text:p>
          </table:table-cell>
          <table:table-cell table:formula="of:=UNICODE([.A81])" office:value-type="float" office:value="7940" calcext:value-type="float">
            <text:p>7940</text:p>
          </table:table-cell>
          <table:table-cell table:formula="of:=CONCATENATE(&quot;\u&quot;;[.B81];&quot;?&quot;)" office:value-type="string" office:string-value="\u7940?" calcext:value-type="string">
            <text:p>\u794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ἅ</text:p>
          </table:table-cell>
          <table:table-cell table:formula="of:=UNICODE([.A82])" office:value-type="float" office:value="7941" calcext:value-type="float">
            <text:p>7941</text:p>
          </table:table-cell>
          <table:table-cell table:formula="of:=CONCATENATE(&quot;\u&quot;;[.B82];&quot;?&quot;)" office:value-type="string" office:string-value="\u7941?" calcext:value-type="string">
            <text:p>\u794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ἆ</text:p>
          </table:table-cell>
          <table:table-cell table:formula="of:=UNICODE([.A83])" office:value-type="float" office:value="7942" calcext:value-type="float">
            <text:p>7942</text:p>
          </table:table-cell>
          <table:table-cell table:formula="of:=CONCATENATE(&quot;\u&quot;;[.B83];&quot;?&quot;)" office:value-type="string" office:string-value="\u7942?" calcext:value-type="string">
            <text:p>\u794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ἇ</text:p>
          </table:table-cell>
          <table:table-cell table:formula="of:=UNICODE([.A84])" office:value-type="float" office:value="7943" calcext:value-type="float">
            <text:p>7943</text:p>
          </table:table-cell>
          <table:table-cell table:formula="of:=CONCATENATE(&quot;\u&quot;;[.B84];&quot;?&quot;)" office:value-type="string" office:string-value="\u7943?" calcext:value-type="string">
            <text:p>\u794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Ἀ</text:p>
          </table:table-cell>
          <table:table-cell table:formula="of:=UNICODE([.A85])" office:value-type="float" office:value="7944" calcext:value-type="float">
            <text:p>7944</text:p>
          </table:table-cell>
          <table:table-cell table:formula="of:=CONCATENATE(&quot;\u&quot;;[.B85];&quot;?&quot;)" office:value-type="string" office:string-value="\u7944?" calcext:value-type="string">
            <text:p>\u794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Ἁ</text:p>
          </table:table-cell>
          <table:table-cell table:formula="of:=UNICODE([.A86])" office:value-type="float" office:value="7945" calcext:value-type="float">
            <text:p>7945</text:p>
          </table:table-cell>
          <table:table-cell table:formula="of:=CONCATENATE(&quot;\u&quot;;[.B86];&quot;?&quot;)" office:value-type="string" office:string-value="\u7945?" calcext:value-type="string">
            <text:p>\u794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Ἂ</text:p>
          </table:table-cell>
          <table:table-cell table:formula="of:=UNICODE([.A87])" office:value-type="float" office:value="7946" calcext:value-type="float">
            <text:p>7946</text:p>
          </table:table-cell>
          <table:table-cell table:formula="of:=CONCATENATE(&quot;\u&quot;;[.B87];&quot;?&quot;)" office:value-type="string" office:string-value="\u7946?" calcext:value-type="string">
            <text:p>\u794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Ἃ</text:p>
          </table:table-cell>
          <table:table-cell table:formula="of:=UNICODE([.A88])" office:value-type="float" office:value="7947" calcext:value-type="float">
            <text:p>7947</text:p>
          </table:table-cell>
          <table:table-cell table:formula="of:=CONCATENATE(&quot;\u&quot;;[.B88];&quot;?&quot;)" office:value-type="string" office:string-value="\u7947?" calcext:value-type="string">
            <text:p>\u794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Ἄ</text:p>
          </table:table-cell>
          <table:table-cell table:formula="of:=UNICODE([.A89])" office:value-type="float" office:value="7948" calcext:value-type="float">
            <text:p>7948</text:p>
          </table:table-cell>
          <table:table-cell table:formula="of:=CONCATENATE(&quot;\u&quot;;[.B89];&quot;?&quot;)" office:value-type="string" office:string-value="\u7948?" calcext:value-type="string">
            <text:p>\u794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Ἅ</text:p>
          </table:table-cell>
          <table:table-cell table:formula="of:=UNICODE([.A90])" office:value-type="float" office:value="7949" calcext:value-type="float">
            <text:p>7949</text:p>
          </table:table-cell>
          <table:table-cell table:formula="of:=CONCATENATE(&quot;\u&quot;;[.B90];&quot;?&quot;)" office:value-type="string" office:string-value="\u7949?" calcext:value-type="string">
            <text:p>\u794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Ἆ</text:p>
          </table:table-cell>
          <table:table-cell table:formula="of:=UNICODE([.A91])" office:value-type="float" office:value="7950" calcext:value-type="float">
            <text:p>7950</text:p>
          </table:table-cell>
          <table:table-cell table:formula="of:=CONCATENATE(&quot;\u&quot;;[.B91];&quot;?&quot;)" office:value-type="string" office:string-value="\u7950?" calcext:value-type="string">
            <text:p>\u795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Ἇ</text:p>
          </table:table-cell>
          <table:table-cell table:formula="of:=UNICODE([.A92])" office:value-type="float" office:value="7951" calcext:value-type="float">
            <text:p>7951</text:p>
          </table:table-cell>
          <table:table-cell table:formula="of:=CONCATENATE(&quot;\u&quot;;[.B92];&quot;?&quot;)" office:value-type="string" office:string-value="\u7951?" calcext:value-type="string">
            <text:p>\u795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ἐ</text:p>
          </table:table-cell>
          <table:table-cell table:formula="of:=UNICODE([.A93])" office:value-type="float" office:value="7952" calcext:value-type="float">
            <text:p>7952</text:p>
          </table:table-cell>
          <table:table-cell table:formula="of:=CONCATENATE(&quot;\u&quot;;[.B93];&quot;?&quot;)" office:value-type="string" office:string-value="\u7952?" calcext:value-type="string">
            <text:p>\u795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ἑ</text:p>
          </table:table-cell>
          <table:table-cell table:formula="of:=UNICODE([.A94])" office:value-type="float" office:value="7953" calcext:value-type="float">
            <text:p>7953</text:p>
          </table:table-cell>
          <table:table-cell table:formula="of:=CONCATENATE(&quot;\u&quot;;[.B94];&quot;?&quot;)" office:value-type="string" office:string-value="\u7953?" calcext:value-type="string">
            <text:p>\u795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ἒ</text:p>
          </table:table-cell>
          <table:table-cell table:formula="of:=UNICODE([.A95])" office:value-type="float" office:value="7954" calcext:value-type="float">
            <text:p>7954</text:p>
          </table:table-cell>
          <table:table-cell table:formula="of:=CONCATENATE(&quot;\u&quot;;[.B95];&quot;?&quot;)" office:value-type="string" office:string-value="\u7954?" calcext:value-type="string">
            <text:p>\u795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ἓ</text:p>
          </table:table-cell>
          <table:table-cell table:formula="of:=UNICODE([.A96])" office:value-type="float" office:value="7955" calcext:value-type="float">
            <text:p>7955</text:p>
          </table:table-cell>
          <table:table-cell table:formula="of:=CONCATENATE(&quot;\u&quot;;[.B96];&quot;?&quot;)" office:value-type="string" office:string-value="\u7955?" calcext:value-type="string">
            <text:p>\u795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ἔ</text:p>
          </table:table-cell>
          <table:table-cell table:formula="of:=UNICODE([.A97])" office:value-type="float" office:value="7956" calcext:value-type="float">
            <text:p>7956</text:p>
          </table:table-cell>
          <table:table-cell table:formula="of:=CONCATENATE(&quot;\u&quot;;[.B97];&quot;?&quot;)" office:value-type="string" office:string-value="\u7956?" calcext:value-type="string">
            <text:p>\u795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ἕ</text:p>
          </table:table-cell>
          <table:table-cell table:formula="of:=UNICODE([.A98])" office:value-type="float" office:value="7957" calcext:value-type="float">
            <text:p>7957</text:p>
          </table:table-cell>
          <table:table-cell table:formula="of:=CONCATENATE(&quot;\u&quot;;[.B98];&quot;?&quot;)" office:value-type="string" office:string-value="\u7957?" calcext:value-type="string">
            <text:p>\u795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἖</text:p>
          </table:table-cell>
          <table:table-cell table:formula="of:=UNICODE([.A99])" office:value-type="float" office:value="7958" calcext:value-type="float">
            <text:p>7958</text:p>
          </table:table-cell>
          <table:table-cell table:formula="of:=CONCATENATE(&quot;\u&quot;;[.B99];&quot;?&quot;)" office:value-type="string" office:string-value="\u7958?" calcext:value-type="string">
            <text:p>\u795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Ἐ</text:p>
          </table:table-cell>
          <table:table-cell table:formula="of:=UNICODE([.A100])" office:value-type="float" office:value="7960" calcext:value-type="float">
            <text:p>7960</text:p>
          </table:table-cell>
          <table:table-cell table:formula="of:=CONCATENATE(&quot;\u&quot;;[.B100];&quot;?&quot;)" office:value-type="string" office:string-value="\u7960?" calcext:value-type="string">
            <text:p>\u796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Ἑ</text:p>
          </table:table-cell>
          <table:table-cell table:formula="of:=UNICODE([.A101])" office:value-type="float" office:value="7961" calcext:value-type="float">
            <text:p>7961</text:p>
          </table:table-cell>
          <table:table-cell table:formula="of:=CONCATENATE(&quot;\u&quot;;[.B101];&quot;?&quot;)" office:value-type="string" office:string-value="\u7961?" calcext:value-type="string">
            <text:p>\u796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Ἒ</text:p>
          </table:table-cell>
          <table:table-cell table:formula="of:=UNICODE([.A102])" office:value-type="float" office:value="7962" calcext:value-type="float">
            <text:p>7962</text:p>
          </table:table-cell>
          <table:table-cell table:formula="of:=CONCATENATE(&quot;\u&quot;;[.B102];&quot;?&quot;)" office:value-type="string" office:string-value="\u7962?" calcext:value-type="string">
            <text:p>\u796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Ἓ</text:p>
          </table:table-cell>
          <table:table-cell table:formula="of:=UNICODE([.A103])" office:value-type="float" office:value="7963" calcext:value-type="float">
            <text:p>7963</text:p>
          </table:table-cell>
          <table:table-cell table:formula="of:=CONCATENATE(&quot;\u&quot;;[.B103];&quot;?&quot;)" office:value-type="string" office:string-value="\u7963?" calcext:value-type="string">
            <text:p>\u796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Ἔ</text:p>
          </table:table-cell>
          <table:table-cell table:formula="of:=UNICODE([.A104])" office:value-type="float" office:value="7964" calcext:value-type="float">
            <text:p>7964</text:p>
          </table:table-cell>
          <table:table-cell table:formula="of:=CONCATENATE(&quot;\u&quot;;[.B104];&quot;?&quot;)" office:value-type="string" office:string-value="\u7964?" calcext:value-type="string">
            <text:p>\u796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Ἕ</text:p>
          </table:table-cell>
          <table:table-cell table:formula="of:=UNICODE([.A105])" office:value-type="float" office:value="7965" calcext:value-type="float">
            <text:p>7965</text:p>
          </table:table-cell>
          <table:table-cell table:formula="of:=CONCATENATE(&quot;\u&quot;;[.B105];&quot;?&quot;)" office:value-type="string" office:string-value="\u7965?" calcext:value-type="string">
            <text:p>\u796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ἠ</text:p>
          </table:table-cell>
          <table:table-cell table:formula="of:=UNICODE([.A106])" office:value-type="float" office:value="7968" calcext:value-type="float">
            <text:p>7968</text:p>
          </table:table-cell>
          <table:table-cell table:formula="of:=CONCATENATE(&quot;\u&quot;;[.B106];&quot;?&quot;)" office:value-type="string" office:string-value="\u7968?" calcext:value-type="string">
            <text:p>\u796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ἡ</text:p>
          </table:table-cell>
          <table:table-cell table:formula="of:=UNICODE([.A107])" office:value-type="float" office:value="7969" calcext:value-type="float">
            <text:p>7969</text:p>
          </table:table-cell>
          <table:table-cell table:formula="of:=CONCATENATE(&quot;\u&quot;;[.B107];&quot;?&quot;)" office:value-type="string" office:string-value="\u7969?" calcext:value-type="string">
            <text:p>\u796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ἢ</text:p>
          </table:table-cell>
          <table:table-cell table:formula="of:=UNICODE([.A108])" office:value-type="float" office:value="7970" calcext:value-type="float">
            <text:p>7970</text:p>
          </table:table-cell>
          <table:table-cell table:formula="of:=CONCATENATE(&quot;\u&quot;;[.B108];&quot;?&quot;)" office:value-type="string" office:string-value="\u7970?" calcext:value-type="string">
            <text:p>\u797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ἣ</text:p>
          </table:table-cell>
          <table:table-cell table:formula="of:=UNICODE([.A109])" office:value-type="float" office:value="7971" calcext:value-type="float">
            <text:p>7971</text:p>
          </table:table-cell>
          <table:table-cell table:formula="of:=CONCATENATE(&quot;\u&quot;;[.B109];&quot;?&quot;)" office:value-type="string" office:string-value="\u7971?" calcext:value-type="string">
            <text:p>\u797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ἤ</text:p>
          </table:table-cell>
          <table:table-cell table:formula="of:=UNICODE([.A110])" office:value-type="float" office:value="7972" calcext:value-type="float">
            <text:p>7972</text:p>
          </table:table-cell>
          <table:table-cell table:formula="of:=CONCATENATE(&quot;\u&quot;;[.B110];&quot;?&quot;)" office:value-type="string" office:string-value="\u7972?" calcext:value-type="string">
            <text:p>\u797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ἥ</text:p>
          </table:table-cell>
          <table:table-cell table:formula="of:=UNICODE([.A111])" office:value-type="float" office:value="7973" calcext:value-type="float">
            <text:p>7973</text:p>
          </table:table-cell>
          <table:table-cell table:formula="of:=CONCATENATE(&quot;\u&quot;;[.B111];&quot;?&quot;)" office:value-type="string" office:string-value="\u7973?" calcext:value-type="string">
            <text:p>\u797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ἦ</text:p>
          </table:table-cell>
          <table:table-cell table:formula="of:=UNICODE([.A112])" office:value-type="float" office:value="7974" calcext:value-type="float">
            <text:p>7974</text:p>
          </table:table-cell>
          <table:table-cell table:formula="of:=CONCATENATE(&quot;\u&quot;;[.B112];&quot;?&quot;)" office:value-type="string" office:string-value="\u7974?" calcext:value-type="string">
            <text:p>\u797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ἧ</text:p>
          </table:table-cell>
          <table:table-cell table:formula="of:=UNICODE([.A113])" office:value-type="float" office:value="7975" calcext:value-type="float">
            <text:p>7975</text:p>
          </table:table-cell>
          <table:table-cell table:formula="of:=CONCATENATE(&quot;\u&quot;;[.B113];&quot;?&quot;)" office:value-type="string" office:string-value="\u7975?" calcext:value-type="string">
            <text:p>\u797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Ἠ</text:p>
          </table:table-cell>
          <table:table-cell table:formula="of:=UNICODE([.A114])" office:value-type="float" office:value="7976" calcext:value-type="float">
            <text:p>7976</text:p>
          </table:table-cell>
          <table:table-cell table:formula="of:=CONCATENATE(&quot;\u&quot;;[.B114];&quot;?&quot;)" office:value-type="string" office:string-value="\u7976?" calcext:value-type="string">
            <text:p>\u797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Ἡ</text:p>
          </table:table-cell>
          <table:table-cell table:formula="of:=UNICODE([.A115])" office:value-type="float" office:value="7977" calcext:value-type="float">
            <text:p>7977</text:p>
          </table:table-cell>
          <table:table-cell table:formula="of:=CONCATENATE(&quot;\u&quot;;[.B115];&quot;?&quot;)" office:value-type="string" office:string-value="\u7977?" calcext:value-type="string">
            <text:p>\u797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Ἢ</text:p>
          </table:table-cell>
          <table:table-cell table:formula="of:=UNICODE([.A116])" office:value-type="float" office:value="7978" calcext:value-type="float">
            <text:p>7978</text:p>
          </table:table-cell>
          <table:table-cell table:formula="of:=CONCATENATE(&quot;\u&quot;;[.B116];&quot;?&quot;)" office:value-type="string" office:string-value="\u7978?" calcext:value-type="string">
            <text:p>\u797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Ἣ</text:p>
          </table:table-cell>
          <table:table-cell table:formula="of:=UNICODE([.A117])" office:value-type="float" office:value="7979" calcext:value-type="float">
            <text:p>7979</text:p>
          </table:table-cell>
          <table:table-cell table:formula="of:=CONCATENATE(&quot;\u&quot;;[.B117];&quot;?&quot;)" office:value-type="string" office:string-value="\u7979?" calcext:value-type="string">
            <text:p>\u797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Ἤ</text:p>
          </table:table-cell>
          <table:table-cell table:formula="of:=UNICODE([.A118])" office:value-type="float" office:value="7980" calcext:value-type="float">
            <text:p>7980</text:p>
          </table:table-cell>
          <table:table-cell table:formula="of:=CONCATENATE(&quot;\u&quot;;[.B118];&quot;?&quot;)" office:value-type="string" office:string-value="\u7980?" calcext:value-type="string">
            <text:p>\u798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Ἥ</text:p>
          </table:table-cell>
          <table:table-cell table:formula="of:=UNICODE([.A119])" office:value-type="float" office:value="7981" calcext:value-type="float">
            <text:p>7981</text:p>
          </table:table-cell>
          <table:table-cell table:formula="of:=CONCATENATE(&quot;\u&quot;;[.B119];&quot;?&quot;)" office:value-type="string" office:string-value="\u7981?" calcext:value-type="string">
            <text:p>\u798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Ἦ</text:p>
          </table:table-cell>
          <table:table-cell table:formula="of:=UNICODE([.A120])" office:value-type="float" office:value="7982" calcext:value-type="float">
            <text:p>7982</text:p>
          </table:table-cell>
          <table:table-cell table:formula="of:=CONCATENATE(&quot;\u&quot;;[.B120];&quot;?&quot;)" office:value-type="string" office:string-value="\u7982?" calcext:value-type="string">
            <text:p>\u798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Ἧ</text:p>
          </table:table-cell>
          <table:table-cell table:formula="of:=UNICODE([.A121])" office:value-type="float" office:value="7983" calcext:value-type="float">
            <text:p>7983</text:p>
          </table:table-cell>
          <table:table-cell table:formula="of:=CONCATENATE(&quot;\u&quot;;[.B121];&quot;?&quot;)" office:value-type="string" office:string-value="\u7983?" calcext:value-type="string">
            <text:p>\u798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ἰ</text:p>
          </table:table-cell>
          <table:table-cell table:formula="of:=UNICODE([.A122])" office:value-type="float" office:value="7984" calcext:value-type="float">
            <text:p>7984</text:p>
          </table:table-cell>
          <table:table-cell table:formula="of:=CONCATENATE(&quot;\u&quot;;[.B122];&quot;?&quot;)" office:value-type="string" office:string-value="\u7984?" calcext:value-type="string">
            <text:p>\u798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ἱ</text:p>
          </table:table-cell>
          <table:table-cell table:formula="of:=UNICODE([.A123])" office:value-type="float" office:value="7985" calcext:value-type="float">
            <text:p>7985</text:p>
          </table:table-cell>
          <table:table-cell table:formula="of:=CONCATENATE(&quot;\u&quot;;[.B123];&quot;?&quot;)" office:value-type="string" office:string-value="\u7985?" calcext:value-type="string">
            <text:p>\u798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ἲ</text:p>
          </table:table-cell>
          <table:table-cell table:formula="of:=UNICODE([.A124])" office:value-type="float" office:value="7986" calcext:value-type="float">
            <text:p>7986</text:p>
          </table:table-cell>
          <table:table-cell table:formula="of:=CONCATENATE(&quot;\u&quot;;[.B124];&quot;?&quot;)" office:value-type="string" office:string-value="\u7986?" calcext:value-type="string">
            <text:p>\u798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ἳ</text:p>
          </table:table-cell>
          <table:table-cell table:formula="of:=UNICODE([.A125])" office:value-type="float" office:value="7987" calcext:value-type="float">
            <text:p>7987</text:p>
          </table:table-cell>
          <table:table-cell table:formula="of:=CONCATENATE(&quot;\u&quot;;[.B125];&quot;?&quot;)" office:value-type="string" office:string-value="\u7987?" calcext:value-type="string">
            <text:p>\u798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ἴ</text:p>
          </table:table-cell>
          <table:table-cell table:formula="of:=UNICODE([.A126])" office:value-type="float" office:value="7988" calcext:value-type="float">
            <text:p>7988</text:p>
          </table:table-cell>
          <table:table-cell table:formula="of:=CONCATENATE(&quot;\u&quot;;[.B126];&quot;?&quot;)" office:value-type="string" office:string-value="\u7988?" calcext:value-type="string">
            <text:p>\u798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ἵ</text:p>
          </table:table-cell>
          <table:table-cell table:formula="of:=UNICODE([.A127])" office:value-type="float" office:value="7989" calcext:value-type="float">
            <text:p>7989</text:p>
          </table:table-cell>
          <table:table-cell table:formula="of:=CONCATENATE(&quot;\u&quot;;[.B127];&quot;?&quot;)" office:value-type="string" office:string-value="\u7989?" calcext:value-type="string">
            <text:p>\u798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ἶ</text:p>
          </table:table-cell>
          <table:table-cell table:formula="of:=UNICODE([.A128])" office:value-type="float" office:value="7990" calcext:value-type="float">
            <text:p>7990</text:p>
          </table:table-cell>
          <table:table-cell table:formula="of:=CONCATENATE(&quot;\u&quot;;[.B128];&quot;?&quot;)" office:value-type="string" office:string-value="\u7990?" calcext:value-type="string">
            <text:p>\u799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ἷ</text:p>
          </table:table-cell>
          <table:table-cell table:formula="of:=UNICODE([.A129])" office:value-type="float" office:value="7991" calcext:value-type="float">
            <text:p>7991</text:p>
          </table:table-cell>
          <table:table-cell table:formula="of:=CONCATENATE(&quot;\u&quot;;[.B129];&quot;?&quot;)" office:value-type="string" office:string-value="\u7991?" calcext:value-type="string">
            <text:p>\u799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Ἰ</text:p>
          </table:table-cell>
          <table:table-cell table:formula="of:=UNICODE([.A130])" office:value-type="float" office:value="7992" calcext:value-type="float">
            <text:p>7992</text:p>
          </table:table-cell>
          <table:table-cell table:formula="of:=CONCATENATE(&quot;\u&quot;;[.B130];&quot;?&quot;)" office:value-type="string" office:string-value="\u7992?" calcext:value-type="string">
            <text:p>\u799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Ἱ</text:p>
          </table:table-cell>
          <table:table-cell table:formula="of:=UNICODE([.A131])" office:value-type="float" office:value="7993" calcext:value-type="float">
            <text:p>7993</text:p>
          </table:table-cell>
          <table:table-cell table:formula="of:=CONCATENATE(&quot;\u&quot;;[.B131];&quot;?&quot;)" office:value-type="string" office:string-value="\u7993?" calcext:value-type="string">
            <text:p>\u799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Ἲ</text:p>
          </table:table-cell>
          <table:table-cell table:formula="of:=UNICODE([.A132])" office:value-type="float" office:value="7994" calcext:value-type="float">
            <text:p>7994</text:p>
          </table:table-cell>
          <table:table-cell table:formula="of:=CONCATENATE(&quot;\u&quot;;[.B132];&quot;?&quot;)" office:value-type="string" office:string-value="\u7994?" calcext:value-type="string">
            <text:p>\u799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Ἳ</text:p>
          </table:table-cell>
          <table:table-cell table:formula="of:=UNICODE([.A133])" office:value-type="float" office:value="7995" calcext:value-type="float">
            <text:p>7995</text:p>
          </table:table-cell>
          <table:table-cell table:formula="of:=CONCATENATE(&quot;\u&quot;;[.B133];&quot;?&quot;)" office:value-type="string" office:string-value="\u7995?" calcext:value-type="string">
            <text:p>\u799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Ἴ</text:p>
          </table:table-cell>
          <table:table-cell table:formula="of:=UNICODE([.A134])" office:value-type="float" office:value="7996" calcext:value-type="float">
            <text:p>7996</text:p>
          </table:table-cell>
          <table:table-cell table:formula="of:=CONCATENATE(&quot;\u&quot;;[.B134];&quot;?&quot;)" office:value-type="string" office:string-value="\u7996?" calcext:value-type="string">
            <text:p>\u799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Ἵ</text:p>
          </table:table-cell>
          <table:table-cell table:formula="of:=UNICODE([.A135])" office:value-type="float" office:value="7997" calcext:value-type="float">
            <text:p>7997</text:p>
          </table:table-cell>
          <table:table-cell table:formula="of:=CONCATENATE(&quot;\u&quot;;[.B135];&quot;?&quot;)" office:value-type="string" office:string-value="\u7997?" calcext:value-type="string">
            <text:p>\u799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Ἶ</text:p>
          </table:table-cell>
          <table:table-cell table:formula="of:=UNICODE([.A136])" office:value-type="float" office:value="7998" calcext:value-type="float">
            <text:p>7998</text:p>
          </table:table-cell>
          <table:table-cell table:formula="of:=CONCATENATE(&quot;\u&quot;;[.B136];&quot;?&quot;)" office:value-type="string" office:string-value="\u7998?" calcext:value-type="string">
            <text:p>\u799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Ἷ</text:p>
          </table:table-cell>
          <table:table-cell table:formula="of:=UNICODE([.A137])" office:value-type="float" office:value="7999" calcext:value-type="float">
            <text:p>7999</text:p>
          </table:table-cell>
          <table:table-cell table:formula="of:=CONCATENATE(&quot;\u&quot;;[.B137];&quot;?&quot;)" office:value-type="string" office:string-value="\u7999?" calcext:value-type="string">
            <text:p>\u799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ὀ</text:p>
          </table:table-cell>
          <table:table-cell table:formula="of:=UNICODE([.A138])" office:value-type="float" office:value="8000" calcext:value-type="float">
            <text:p>8000</text:p>
          </table:table-cell>
          <table:table-cell table:formula="of:=CONCATENATE(&quot;\u&quot;;[.B138];&quot;?&quot;)" office:value-type="string" office:string-value="\u8000?" calcext:value-type="string">
            <text:p>\u800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ὁ</text:p>
          </table:table-cell>
          <table:table-cell table:formula="of:=UNICODE([.A139])" office:value-type="float" office:value="8001" calcext:value-type="float">
            <text:p>8001</text:p>
          </table:table-cell>
          <table:table-cell table:formula="of:=CONCATENATE(&quot;\u&quot;;[.B139];&quot;?&quot;)" office:value-type="string" office:string-value="\u8001?" calcext:value-type="string">
            <text:p>\u800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ὂ</text:p>
          </table:table-cell>
          <table:table-cell table:formula="of:=UNICODE([.A140])" office:value-type="float" office:value="8002" calcext:value-type="float">
            <text:p>8002</text:p>
          </table:table-cell>
          <table:table-cell table:formula="of:=CONCATENATE(&quot;\u&quot;;[.B140];&quot;?&quot;)" office:value-type="string" office:string-value="\u8002?" calcext:value-type="string">
            <text:p>\u800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ὃ</text:p>
          </table:table-cell>
          <table:table-cell table:formula="of:=UNICODE([.A141])" office:value-type="float" office:value="8003" calcext:value-type="float">
            <text:p>8003</text:p>
          </table:table-cell>
          <table:table-cell table:formula="of:=CONCATENATE(&quot;\u&quot;;[.B141];&quot;?&quot;)" office:value-type="string" office:string-value="\u8003?" calcext:value-type="string">
            <text:p>\u800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ὄ</text:p>
          </table:table-cell>
          <table:table-cell table:formula="of:=UNICODE([.A142])" office:value-type="float" office:value="8004" calcext:value-type="float">
            <text:p>8004</text:p>
          </table:table-cell>
          <table:table-cell table:formula="of:=CONCATENATE(&quot;\u&quot;;[.B142];&quot;?&quot;)" office:value-type="string" office:string-value="\u8004?" calcext:value-type="string">
            <text:p>\u800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ὅ</text:p>
          </table:table-cell>
          <table:table-cell table:formula="of:=UNICODE([.A143])" office:value-type="float" office:value="8005" calcext:value-type="float">
            <text:p>8005</text:p>
          </table:table-cell>
          <table:table-cell table:formula="of:=CONCATENATE(&quot;\u&quot;;[.B143];&quot;?&quot;)" office:value-type="string" office:string-value="\u8005?" calcext:value-type="string">
            <text:p>\u800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Ὀ</text:p>
          </table:table-cell>
          <table:table-cell table:formula="of:=UNICODE([.A144])" office:value-type="float" office:value="8008" calcext:value-type="float">
            <text:p>8008</text:p>
          </table:table-cell>
          <table:table-cell table:formula="of:=CONCATENATE(&quot;\u&quot;;[.B144];&quot;?&quot;)" office:value-type="string" office:string-value="\u8008?" calcext:value-type="string">
            <text:p>\u800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Ὁ</text:p>
          </table:table-cell>
          <table:table-cell table:formula="of:=UNICODE([.A145])" office:value-type="float" office:value="8009" calcext:value-type="float">
            <text:p>8009</text:p>
          </table:table-cell>
          <table:table-cell table:formula="of:=CONCATENATE(&quot;\u&quot;;[.B145];&quot;?&quot;)" office:value-type="string" office:string-value="\u8009?" calcext:value-type="string">
            <text:p>\u800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Ὂ</text:p>
          </table:table-cell>
          <table:table-cell table:formula="of:=UNICODE([.A146])" office:value-type="float" office:value="8010" calcext:value-type="float">
            <text:p>8010</text:p>
          </table:table-cell>
          <table:table-cell table:formula="of:=CONCATENATE(&quot;\u&quot;;[.B146];&quot;?&quot;)" office:value-type="string" office:string-value="\u8010?" calcext:value-type="string">
            <text:p>\u801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Ὃ</text:p>
          </table:table-cell>
          <table:table-cell table:formula="of:=UNICODE([.A147])" office:value-type="float" office:value="8011" calcext:value-type="float">
            <text:p>8011</text:p>
          </table:table-cell>
          <table:table-cell table:formula="of:=CONCATENATE(&quot;\u&quot;;[.B147];&quot;?&quot;)" office:value-type="string" office:string-value="\u8011?" calcext:value-type="string">
            <text:p>\u801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Ὄ</text:p>
          </table:table-cell>
          <table:table-cell table:formula="of:=UNICODE([.A148])" office:value-type="float" office:value="8012" calcext:value-type="float">
            <text:p>8012</text:p>
          </table:table-cell>
          <table:table-cell table:formula="of:=CONCATENATE(&quot;\u&quot;;[.B148];&quot;?&quot;)" office:value-type="string" office:string-value="\u8012?" calcext:value-type="string">
            <text:p>\u801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Ὅ</text:p>
          </table:table-cell>
          <table:table-cell table:formula="of:=UNICODE([.A149])" office:value-type="float" office:value="8013" calcext:value-type="float">
            <text:p>8013</text:p>
          </table:table-cell>
          <table:table-cell table:formula="of:=CONCATENATE(&quot;\u&quot;;[.B149];&quot;?&quot;)" office:value-type="string" office:string-value="\u8013?" calcext:value-type="string">
            <text:p>\u801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ὐ</text:p>
          </table:table-cell>
          <table:table-cell table:formula="of:=UNICODE([.A150])" office:value-type="float" office:value="8016" calcext:value-type="float">
            <text:p>8016</text:p>
          </table:table-cell>
          <table:table-cell table:formula="of:=CONCATENATE(&quot;\u&quot;;[.B150];&quot;?&quot;)" office:value-type="string" office:string-value="\u8016?" calcext:value-type="string">
            <text:p>\u801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ὑ</text:p>
          </table:table-cell>
          <table:table-cell table:formula="of:=UNICODE([.A151])" office:value-type="float" office:value="8017" calcext:value-type="float">
            <text:p>8017</text:p>
          </table:table-cell>
          <table:table-cell table:formula="of:=CONCATENATE(&quot;\u&quot;;[.B151];&quot;?&quot;)" office:value-type="string" office:string-value="\u8017?" calcext:value-type="string">
            <text:p>\u801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ὒ</text:p>
          </table:table-cell>
          <table:table-cell table:formula="of:=UNICODE([.A152])" office:value-type="float" office:value="8018" calcext:value-type="float">
            <text:p>8018</text:p>
          </table:table-cell>
          <table:table-cell table:formula="of:=CONCATENATE(&quot;\u&quot;;[.B152];&quot;?&quot;)" office:value-type="string" office:string-value="\u8018?" calcext:value-type="string">
            <text:p>\u801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ὓ</text:p>
          </table:table-cell>
          <table:table-cell table:formula="of:=UNICODE([.A153])" office:value-type="float" office:value="8019" calcext:value-type="float">
            <text:p>8019</text:p>
          </table:table-cell>
          <table:table-cell table:formula="of:=CONCATENATE(&quot;\u&quot;;[.B153];&quot;?&quot;)" office:value-type="string" office:string-value="\u8019?" calcext:value-type="string">
            <text:p>\u801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ὔ</text:p>
          </table:table-cell>
          <table:table-cell table:formula="of:=UNICODE([.A154])" office:value-type="float" office:value="8020" calcext:value-type="float">
            <text:p>8020</text:p>
          </table:table-cell>
          <table:table-cell table:formula="of:=CONCATENATE(&quot;\u&quot;;[.B154];&quot;?&quot;)" office:value-type="string" office:string-value="\u8020?" calcext:value-type="string">
            <text:p>\u802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ὕ</text:p>
          </table:table-cell>
          <table:table-cell table:formula="of:=UNICODE([.A155])" office:value-type="float" office:value="8021" calcext:value-type="float">
            <text:p>8021</text:p>
          </table:table-cell>
          <table:table-cell table:formula="of:=CONCATENATE(&quot;\u&quot;;[.B155];&quot;?&quot;)" office:value-type="string" office:string-value="\u8021?" calcext:value-type="string">
            <text:p>\u802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ὖ</text:p>
          </table:table-cell>
          <table:table-cell table:formula="of:=UNICODE([.A156])" office:value-type="float" office:value="8022" calcext:value-type="float">
            <text:p>8022</text:p>
          </table:table-cell>
          <table:table-cell table:formula="of:=CONCATENATE(&quot;\u&quot;;[.B156];&quot;?&quot;)" office:value-type="string" office:string-value="\u8022?" calcext:value-type="string">
            <text:p>\u802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ὗ</text:p>
          </table:table-cell>
          <table:table-cell table:formula="of:=UNICODE([.A157])" office:value-type="float" office:value="8023" calcext:value-type="float">
            <text:p>8023</text:p>
          </table:table-cell>
          <table:table-cell table:formula="of:=CONCATENATE(&quot;\u&quot;;[.B157];&quot;?&quot;)" office:value-type="string" office:string-value="\u8023?" calcext:value-type="string">
            <text:p>\u802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Ὑ</text:p>
          </table:table-cell>
          <table:table-cell table:formula="of:=UNICODE([.A158])" office:value-type="float" office:value="8025" calcext:value-type="float">
            <text:p>8025</text:p>
          </table:table-cell>
          <table:table-cell table:formula="of:=CONCATENATE(&quot;\u&quot;;[.B158];&quot;?&quot;)" office:value-type="string" office:string-value="\u8025?" calcext:value-type="string">
            <text:p>\u802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Ὓ</text:p>
          </table:table-cell>
          <table:table-cell table:formula="of:=UNICODE([.A159])" office:value-type="float" office:value="8027" calcext:value-type="float">
            <text:p>8027</text:p>
          </table:table-cell>
          <table:table-cell table:formula="of:=CONCATENATE(&quot;\u&quot;;[.B159];&quot;?&quot;)" office:value-type="string" office:string-value="\u8027?" calcext:value-type="string">
            <text:p>\u802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Ὕ</text:p>
          </table:table-cell>
          <table:table-cell table:formula="of:=UNICODE([.A160])" office:value-type="float" office:value="8029" calcext:value-type="float">
            <text:p>8029</text:p>
          </table:table-cell>
          <table:table-cell table:formula="of:=CONCATENATE(&quot;\u&quot;;[.B160];&quot;?&quot;)" office:value-type="string" office:string-value="\u8029?" calcext:value-type="string">
            <text:p>\u802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Ὗ</text:p>
          </table:table-cell>
          <table:table-cell table:formula="of:=UNICODE([.A161])" office:value-type="float" office:value="8031" calcext:value-type="float">
            <text:p>8031</text:p>
          </table:table-cell>
          <table:table-cell table:formula="of:=CONCATENATE(&quot;\u&quot;;[.B161];&quot;?&quot;)" office:value-type="string" office:string-value="\u8031?" calcext:value-type="string">
            <text:p>\u803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ὠ</text:p>
          </table:table-cell>
          <table:table-cell table:formula="of:=UNICODE([.A162])" office:value-type="float" office:value="8032" calcext:value-type="float">
            <text:p>8032</text:p>
          </table:table-cell>
          <table:table-cell table:formula="of:=CONCATENATE(&quot;\u&quot;;[.B162];&quot;?&quot;)" office:value-type="string" office:string-value="\u8032?" calcext:value-type="string">
            <text:p>\u803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ὡ</text:p>
          </table:table-cell>
          <table:table-cell table:formula="of:=UNICODE([.A163])" office:value-type="float" office:value="8033" calcext:value-type="float">
            <text:p>8033</text:p>
          </table:table-cell>
          <table:table-cell table:formula="of:=CONCATENATE(&quot;\u&quot;;[.B163];&quot;?&quot;)" office:value-type="string" office:string-value="\u8033?" calcext:value-type="string">
            <text:p>\u803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ὢ</text:p>
          </table:table-cell>
          <table:table-cell table:formula="of:=UNICODE([.A164])" office:value-type="float" office:value="8034" calcext:value-type="float">
            <text:p>8034</text:p>
          </table:table-cell>
          <table:table-cell table:formula="of:=CONCATENATE(&quot;\u&quot;;[.B164];&quot;?&quot;)" office:value-type="string" office:string-value="\u8034?" calcext:value-type="string">
            <text:p>\u803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ὣ</text:p>
          </table:table-cell>
          <table:table-cell table:formula="of:=UNICODE([.A165])" office:value-type="float" office:value="8035" calcext:value-type="float">
            <text:p>8035</text:p>
          </table:table-cell>
          <table:table-cell table:formula="of:=CONCATENATE(&quot;\u&quot;;[.B165];&quot;?&quot;)" office:value-type="string" office:string-value="\u8035?" calcext:value-type="string">
            <text:p>\u803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ὤ</text:p>
          </table:table-cell>
          <table:table-cell table:formula="of:=UNICODE([.A166])" office:value-type="float" office:value="8036" calcext:value-type="float">
            <text:p>8036</text:p>
          </table:table-cell>
          <table:table-cell table:formula="of:=CONCATENATE(&quot;\u&quot;;[.B166];&quot;?&quot;)" office:value-type="string" office:string-value="\u8036?" calcext:value-type="string">
            <text:p>\u803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ὥ</text:p>
          </table:table-cell>
          <table:table-cell table:formula="of:=UNICODE([.A167])" office:value-type="float" office:value="8037" calcext:value-type="float">
            <text:p>8037</text:p>
          </table:table-cell>
          <table:table-cell table:formula="of:=CONCATENATE(&quot;\u&quot;;[.B167];&quot;?&quot;)" office:value-type="string" office:string-value="\u8037?" calcext:value-type="string">
            <text:p>\u803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ὦ</text:p>
          </table:table-cell>
          <table:table-cell table:formula="of:=UNICODE([.A168])" office:value-type="float" office:value="8038" calcext:value-type="float">
            <text:p>8038</text:p>
          </table:table-cell>
          <table:table-cell table:formula="of:=CONCATENATE(&quot;\u&quot;;[.B168];&quot;?&quot;)" office:value-type="string" office:string-value="\u8038?" calcext:value-type="string">
            <text:p>\u803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ὧ</text:p>
          </table:table-cell>
          <table:table-cell table:formula="of:=UNICODE([.A169])" office:value-type="float" office:value="8039" calcext:value-type="float">
            <text:p>8039</text:p>
          </table:table-cell>
          <table:table-cell table:formula="of:=CONCATENATE(&quot;\u&quot;;[.B169];&quot;?&quot;)" office:value-type="string" office:string-value="\u8039?" calcext:value-type="string">
            <text:p>\u803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Ὠ</text:p>
          </table:table-cell>
          <table:table-cell table:formula="of:=UNICODE([.A170])" office:value-type="float" office:value="8040" calcext:value-type="float">
            <text:p>8040</text:p>
          </table:table-cell>
          <table:table-cell table:formula="of:=CONCATENATE(&quot;\u&quot;;[.B170];&quot;?&quot;)" office:value-type="string" office:string-value="\u8040?" calcext:value-type="string">
            <text:p>\u804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Ὡ</text:p>
          </table:table-cell>
          <table:table-cell table:formula="of:=UNICODE([.A171])" office:value-type="float" office:value="8041" calcext:value-type="float">
            <text:p>8041</text:p>
          </table:table-cell>
          <table:table-cell table:formula="of:=CONCATENATE(&quot;\u&quot;;[.B171];&quot;?&quot;)" office:value-type="string" office:string-value="\u8041?" calcext:value-type="string">
            <text:p>\u804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Ὢ</text:p>
          </table:table-cell>
          <table:table-cell table:formula="of:=UNICODE([.A172])" office:value-type="float" office:value="8042" calcext:value-type="float">
            <text:p>8042</text:p>
          </table:table-cell>
          <table:table-cell table:formula="of:=CONCATENATE(&quot;\u&quot;;[.B172];&quot;?&quot;)" office:value-type="string" office:string-value="\u8042?" calcext:value-type="string">
            <text:p>\u804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Ὣ</text:p>
          </table:table-cell>
          <table:table-cell table:formula="of:=UNICODE([.A173])" office:value-type="float" office:value="8043" calcext:value-type="float">
            <text:p>8043</text:p>
          </table:table-cell>
          <table:table-cell table:formula="of:=CONCATENATE(&quot;\u&quot;;[.B173];&quot;?&quot;)" office:value-type="string" office:string-value="\u8043?" calcext:value-type="string">
            <text:p>\u804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Ὤ</text:p>
          </table:table-cell>
          <table:table-cell table:formula="of:=UNICODE([.A174])" office:value-type="float" office:value="8044" calcext:value-type="float">
            <text:p>8044</text:p>
          </table:table-cell>
          <table:table-cell table:formula="of:=CONCATENATE(&quot;\u&quot;;[.B174];&quot;?&quot;)" office:value-type="string" office:string-value="\u8044?" calcext:value-type="string">
            <text:p>\u804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Ὥ</text:p>
          </table:table-cell>
          <table:table-cell table:formula="of:=UNICODE([.A175])" office:value-type="float" office:value="8045" calcext:value-type="float">
            <text:p>8045</text:p>
          </table:table-cell>
          <table:table-cell table:formula="of:=CONCATENATE(&quot;\u&quot;;[.B175];&quot;?&quot;)" office:value-type="string" office:string-value="\u8045?" calcext:value-type="string">
            <text:p>\u804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Ὦ</text:p>
          </table:table-cell>
          <table:table-cell table:formula="of:=UNICODE([.A176])" office:value-type="float" office:value="8046" calcext:value-type="float">
            <text:p>8046</text:p>
          </table:table-cell>
          <table:table-cell table:formula="of:=CONCATENATE(&quot;\u&quot;;[.B176];&quot;?&quot;)" office:value-type="string" office:string-value="\u8046?" calcext:value-type="string">
            <text:p>\u804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Ὧ</text:p>
          </table:table-cell>
          <table:table-cell table:formula="of:=UNICODE([.A177])" office:value-type="float" office:value="8047" calcext:value-type="float">
            <text:p>8047</text:p>
          </table:table-cell>
          <table:table-cell table:formula="of:=CONCATENATE(&quot;\u&quot;;[.B177];&quot;?&quot;)" office:value-type="string" office:string-value="\u8047?" calcext:value-type="string">
            <text:p>\u804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ὰ</text:p>
          </table:table-cell>
          <table:table-cell table:formula="of:=UNICODE([.A178])" office:value-type="float" office:value="8048" calcext:value-type="float">
            <text:p>8048</text:p>
          </table:table-cell>
          <table:table-cell table:formula="of:=CONCATENATE(&quot;\u&quot;;[.B178];&quot;?&quot;)" office:value-type="string" office:string-value="\u8048?" calcext:value-type="string">
            <text:p>\u804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ά</text:p>
          </table:table-cell>
          <table:table-cell table:formula="of:=UNICODE([.A179])" office:value-type="float" office:value="8049" calcext:value-type="float">
            <text:p>8049</text:p>
          </table:table-cell>
          <table:table-cell table:formula="of:=CONCATENATE(&quot;\u&quot;;[.B179];&quot;?&quot;)" office:value-type="string" office:string-value="\u8049?" calcext:value-type="string">
            <text:p>\u804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ὲ</text:p>
          </table:table-cell>
          <table:table-cell table:formula="of:=UNICODE([.A180])" office:value-type="float" office:value="8050" calcext:value-type="float">
            <text:p>8050</text:p>
          </table:table-cell>
          <table:table-cell table:formula="of:=CONCATENATE(&quot;\u&quot;;[.B180];&quot;?&quot;)" office:value-type="string" office:string-value="\u8050?" calcext:value-type="string">
            <text:p>\u805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έ</text:p>
          </table:table-cell>
          <table:table-cell table:formula="of:=UNICODE([.A181])" office:value-type="float" office:value="8051" calcext:value-type="float">
            <text:p>8051</text:p>
          </table:table-cell>
          <table:table-cell table:formula="of:=CONCATENATE(&quot;\u&quot;;[.B181];&quot;?&quot;)" office:value-type="string" office:string-value="\u8051?" calcext:value-type="string">
            <text:p>\u805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ὴ</text:p>
          </table:table-cell>
          <table:table-cell table:formula="of:=UNICODE([.A182])" office:value-type="float" office:value="8052" calcext:value-type="float">
            <text:p>8052</text:p>
          </table:table-cell>
          <table:table-cell table:formula="of:=CONCATENATE(&quot;\u&quot;;[.B182];&quot;?&quot;)" office:value-type="string" office:string-value="\u8052?" calcext:value-type="string">
            <text:p>\u805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ή</text:p>
          </table:table-cell>
          <table:table-cell table:formula="of:=UNICODE([.A183])" office:value-type="float" office:value="8053" calcext:value-type="float">
            <text:p>8053</text:p>
          </table:table-cell>
          <table:table-cell table:formula="of:=CONCATENATE(&quot;\u&quot;;[.B183];&quot;?&quot;)" office:value-type="string" office:string-value="\u8053?" calcext:value-type="string">
            <text:p>\u805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ὶ</text:p>
          </table:table-cell>
          <table:table-cell table:formula="of:=UNICODE([.A184])" office:value-type="float" office:value="8054" calcext:value-type="float">
            <text:p>8054</text:p>
          </table:table-cell>
          <table:table-cell table:formula="of:=CONCATENATE(&quot;\u&quot;;[.B184];&quot;?&quot;)" office:value-type="string" office:string-value="\u8054?" calcext:value-type="string">
            <text:p>\u805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ί</text:p>
          </table:table-cell>
          <table:table-cell table:formula="of:=UNICODE([.A185])" office:value-type="float" office:value="8055" calcext:value-type="float">
            <text:p>8055</text:p>
          </table:table-cell>
          <table:table-cell table:formula="of:=CONCATENATE(&quot;\u&quot;;[.B185];&quot;?&quot;)" office:value-type="string" office:string-value="\u8055?" calcext:value-type="string">
            <text:p>\u805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ὸ</text:p>
          </table:table-cell>
          <table:table-cell table:formula="of:=UNICODE([.A186])" office:value-type="float" office:value="8056" calcext:value-type="float">
            <text:p>8056</text:p>
          </table:table-cell>
          <table:table-cell table:formula="of:=CONCATENATE(&quot;\u&quot;;[.B186];&quot;?&quot;)" office:value-type="string" office:string-value="\u8056?" calcext:value-type="string">
            <text:p>\u805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ό</text:p>
          </table:table-cell>
          <table:table-cell table:formula="of:=UNICODE([.A187])" office:value-type="float" office:value="8057" calcext:value-type="float">
            <text:p>8057</text:p>
          </table:table-cell>
          <table:table-cell table:formula="of:=CONCATENATE(&quot;\u&quot;;[.B187];&quot;?&quot;)" office:value-type="string" office:string-value="\u8057?" calcext:value-type="string">
            <text:p>\u805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ὺ</text:p>
          </table:table-cell>
          <table:table-cell table:formula="of:=UNICODE([.A188])" office:value-type="float" office:value="8058" calcext:value-type="float">
            <text:p>8058</text:p>
          </table:table-cell>
          <table:table-cell table:formula="of:=CONCATENATE(&quot;\u&quot;;[.B188];&quot;?&quot;)" office:value-type="string" office:string-value="\u8058?" calcext:value-type="string">
            <text:p>\u805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ύ</text:p>
          </table:table-cell>
          <table:table-cell table:formula="of:=UNICODE([.A189])" office:value-type="float" office:value="8059" calcext:value-type="float">
            <text:p>8059</text:p>
          </table:table-cell>
          <table:table-cell table:formula="of:=CONCATENATE(&quot;\u&quot;;[.B189];&quot;?&quot;)" office:value-type="string" office:string-value="\u8059?" calcext:value-type="string">
            <text:p>\u805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ὼ</text:p>
          </table:table-cell>
          <table:table-cell table:formula="of:=UNICODE([.A190])" office:value-type="float" office:value="8060" calcext:value-type="float">
            <text:p>8060</text:p>
          </table:table-cell>
          <table:table-cell table:formula="of:=CONCATENATE(&quot;\u&quot;;[.B190];&quot;?&quot;)" office:value-type="string" office:string-value="\u8060?" calcext:value-type="string">
            <text:p>\u806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ώ</text:p>
          </table:table-cell>
          <table:table-cell table:formula="of:=UNICODE([.A191])" office:value-type="float" office:value="8061" calcext:value-type="float">
            <text:p>8061</text:p>
          </table:table-cell>
          <table:table-cell table:formula="of:=CONCATENATE(&quot;\u&quot;;[.B191];&quot;?&quot;)" office:value-type="string" office:string-value="\u8061?" calcext:value-type="string">
            <text:p>\u806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ᾀ</text:p>
          </table:table-cell>
          <table:table-cell table:formula="of:=UNICODE([.A192])" office:value-type="float" office:value="8064" calcext:value-type="float">
            <text:p>8064</text:p>
          </table:table-cell>
          <table:table-cell table:formula="of:=CONCATENATE(&quot;\u&quot;;[.B192];&quot;?&quot;)" office:value-type="string" office:string-value="\u8064?" calcext:value-type="string">
            <text:p>\u806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ᾁ</text:p>
          </table:table-cell>
          <table:table-cell table:formula="of:=UNICODE([.A193])" office:value-type="float" office:value="8065" calcext:value-type="float">
            <text:p>8065</text:p>
          </table:table-cell>
          <table:table-cell table:formula="of:=CONCATENATE(&quot;\u&quot;;[.B193];&quot;?&quot;)" office:value-type="string" office:string-value="\u8065?" calcext:value-type="string">
            <text:p>\u806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ᾂ</text:p>
          </table:table-cell>
          <table:table-cell table:formula="of:=UNICODE([.A194])" office:value-type="float" office:value="8066" calcext:value-type="float">
            <text:p>8066</text:p>
          </table:table-cell>
          <table:table-cell table:formula="of:=CONCATENATE(&quot;\u&quot;;[.B194];&quot;?&quot;)" office:value-type="string" office:string-value="\u8066?" calcext:value-type="string">
            <text:p>\u806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ᾃ</text:p>
          </table:table-cell>
          <table:table-cell table:formula="of:=UNICODE([.A195])" office:value-type="float" office:value="8067" calcext:value-type="float">
            <text:p>8067</text:p>
          </table:table-cell>
          <table:table-cell table:formula="of:=CONCATENATE(&quot;\u&quot;;[.B195];&quot;?&quot;)" office:value-type="string" office:string-value="\u8067?" calcext:value-type="string">
            <text:p>\u806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ᾄ</text:p>
          </table:table-cell>
          <table:table-cell table:formula="of:=UNICODE([.A196])" office:value-type="float" office:value="8068" calcext:value-type="float">
            <text:p>8068</text:p>
          </table:table-cell>
          <table:table-cell table:formula="of:=CONCATENATE(&quot;\u&quot;;[.B196];&quot;?&quot;)" office:value-type="string" office:string-value="\u8068?" calcext:value-type="string">
            <text:p>\u806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ᾅ</text:p>
          </table:table-cell>
          <table:table-cell table:formula="of:=UNICODE([.A197])" office:value-type="float" office:value="8069" calcext:value-type="float">
            <text:p>8069</text:p>
          </table:table-cell>
          <table:table-cell table:formula="of:=CONCATENATE(&quot;\u&quot;;[.B197];&quot;?&quot;)" office:value-type="string" office:string-value="\u8069?" calcext:value-type="string">
            <text:p>\u806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ᾆ</text:p>
          </table:table-cell>
          <table:table-cell table:formula="of:=UNICODE([.A198])" office:value-type="float" office:value="8070" calcext:value-type="float">
            <text:p>8070</text:p>
          </table:table-cell>
          <table:table-cell table:formula="of:=CONCATENATE(&quot;\u&quot;;[.B198];&quot;?&quot;)" office:value-type="string" office:string-value="\u8070?" calcext:value-type="string">
            <text:p>\u807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ᾇ</text:p>
          </table:table-cell>
          <table:table-cell table:formula="of:=UNICODE([.A199])" office:value-type="float" office:value="8071" calcext:value-type="float">
            <text:p>8071</text:p>
          </table:table-cell>
          <table:table-cell table:formula="of:=CONCATENATE(&quot;\u&quot;;[.B199];&quot;?&quot;)" office:value-type="string" office:string-value="\u8071?" calcext:value-type="string">
            <text:p>\u807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ᾈ</text:p>
          </table:table-cell>
          <table:table-cell table:formula="of:=UNICODE([.A200])" office:value-type="float" office:value="8072" calcext:value-type="float">
            <text:p>8072</text:p>
          </table:table-cell>
          <table:table-cell table:formula="of:=CONCATENATE(&quot;\u&quot;;[.B200];&quot;?&quot;)" office:value-type="string" office:string-value="\u8072?" calcext:value-type="string">
            <text:p>\u807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ᾉ</text:p>
          </table:table-cell>
          <table:table-cell table:formula="of:=UNICODE([.A201])" office:value-type="float" office:value="8073" calcext:value-type="float">
            <text:p>8073</text:p>
          </table:table-cell>
          <table:table-cell table:formula="of:=CONCATENATE(&quot;\u&quot;;[.B201];&quot;?&quot;)" office:value-type="string" office:string-value="\u8073?" calcext:value-type="string">
            <text:p>\u807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ᾊ</text:p>
          </table:table-cell>
          <table:table-cell table:formula="of:=UNICODE([.A202])" office:value-type="float" office:value="8074" calcext:value-type="float">
            <text:p>8074</text:p>
          </table:table-cell>
          <table:table-cell table:formula="of:=CONCATENATE(&quot;\u&quot;;[.B202];&quot;?&quot;)" office:value-type="string" office:string-value="\u8074?" calcext:value-type="string">
            <text:p>\u807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ᾋ</text:p>
          </table:table-cell>
          <table:table-cell table:formula="of:=UNICODE([.A203])" office:value-type="float" office:value="8075" calcext:value-type="float">
            <text:p>8075</text:p>
          </table:table-cell>
          <table:table-cell table:formula="of:=CONCATENATE(&quot;\u&quot;;[.B203];&quot;?&quot;)" office:value-type="string" office:string-value="\u8075?" calcext:value-type="string">
            <text:p>\u807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ᾌ</text:p>
          </table:table-cell>
          <table:table-cell table:formula="of:=UNICODE([.A204])" office:value-type="float" office:value="8076" calcext:value-type="float">
            <text:p>8076</text:p>
          </table:table-cell>
          <table:table-cell table:formula="of:=CONCATENATE(&quot;\u&quot;;[.B204];&quot;?&quot;)" office:value-type="string" office:string-value="\u8076?" calcext:value-type="string">
            <text:p>\u807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ᾍ</text:p>
          </table:table-cell>
          <table:table-cell table:formula="of:=UNICODE([.A205])" office:value-type="float" office:value="8077" calcext:value-type="float">
            <text:p>8077</text:p>
          </table:table-cell>
          <table:table-cell table:formula="of:=CONCATENATE(&quot;\u&quot;;[.B205];&quot;?&quot;)" office:value-type="string" office:string-value="\u8077?" calcext:value-type="string">
            <text:p>\u807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ᾎ</text:p>
          </table:table-cell>
          <table:table-cell table:formula="of:=UNICODE([.A206])" office:value-type="float" office:value="8078" calcext:value-type="float">
            <text:p>8078</text:p>
          </table:table-cell>
          <table:table-cell table:formula="of:=CONCATENATE(&quot;\u&quot;;[.B206];&quot;?&quot;)" office:value-type="string" office:string-value="\u8078?" calcext:value-type="string">
            <text:p>\u807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ᾏ</text:p>
          </table:table-cell>
          <table:table-cell table:formula="of:=UNICODE([.A207])" office:value-type="float" office:value="8079" calcext:value-type="float">
            <text:p>8079</text:p>
          </table:table-cell>
          <table:table-cell table:formula="of:=CONCATENATE(&quot;\u&quot;;[.B207];&quot;?&quot;)" office:value-type="string" office:string-value="\u8079?" calcext:value-type="string">
            <text:p>\u807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ᾐ</text:p>
          </table:table-cell>
          <table:table-cell table:formula="of:=UNICODE([.A208])" office:value-type="float" office:value="8080" calcext:value-type="float">
            <text:p>8080</text:p>
          </table:table-cell>
          <table:table-cell table:formula="of:=CONCATENATE(&quot;\u&quot;;[.B208];&quot;?&quot;)" office:value-type="string" office:string-value="\u8080?" calcext:value-type="string">
            <text:p>\u808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ᾑ</text:p>
          </table:table-cell>
          <table:table-cell table:formula="of:=UNICODE([.A209])" office:value-type="float" office:value="8081" calcext:value-type="float">
            <text:p>8081</text:p>
          </table:table-cell>
          <table:table-cell table:formula="of:=CONCATENATE(&quot;\u&quot;;[.B209];&quot;?&quot;)" office:value-type="string" office:string-value="\u8081?" calcext:value-type="string">
            <text:p>\u808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ᾒ</text:p>
          </table:table-cell>
          <table:table-cell table:formula="of:=UNICODE([.A210])" office:value-type="float" office:value="8082" calcext:value-type="float">
            <text:p>8082</text:p>
          </table:table-cell>
          <table:table-cell table:formula="of:=CONCATENATE(&quot;\u&quot;;[.B210];&quot;?&quot;)" office:value-type="string" office:string-value="\u8082?" calcext:value-type="string">
            <text:p>\u808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ᾓ</text:p>
          </table:table-cell>
          <table:table-cell table:formula="of:=UNICODE([.A211])" office:value-type="float" office:value="8083" calcext:value-type="float">
            <text:p>8083</text:p>
          </table:table-cell>
          <table:table-cell table:formula="of:=CONCATENATE(&quot;\u&quot;;[.B211];&quot;?&quot;)" office:value-type="string" office:string-value="\u8083?" calcext:value-type="string">
            <text:p>\u808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ᾔ</text:p>
          </table:table-cell>
          <table:table-cell table:formula="of:=UNICODE([.A212])" office:value-type="float" office:value="8084" calcext:value-type="float">
            <text:p>8084</text:p>
          </table:table-cell>
          <table:table-cell table:formula="of:=CONCATENATE(&quot;\u&quot;;[.B212];&quot;?&quot;)" office:value-type="string" office:string-value="\u8084?" calcext:value-type="string">
            <text:p>\u808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ᾕ</text:p>
          </table:table-cell>
          <table:table-cell table:formula="of:=UNICODE([.A213])" office:value-type="float" office:value="8085" calcext:value-type="float">
            <text:p>8085</text:p>
          </table:table-cell>
          <table:table-cell table:formula="of:=CONCATENATE(&quot;\u&quot;;[.B213];&quot;?&quot;)" office:value-type="string" office:string-value="\u8085?" calcext:value-type="string">
            <text:p>\u808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ᾖ</text:p>
          </table:table-cell>
          <table:table-cell table:formula="of:=UNICODE([.A214])" office:value-type="float" office:value="8086" calcext:value-type="float">
            <text:p>8086</text:p>
          </table:table-cell>
          <table:table-cell table:formula="of:=CONCATENATE(&quot;\u&quot;;[.B214];&quot;?&quot;)" office:value-type="string" office:string-value="\u8086?" calcext:value-type="string">
            <text:p>\u808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ᾗ</text:p>
          </table:table-cell>
          <table:table-cell table:formula="of:=UNICODE([.A215])" office:value-type="float" office:value="8087" calcext:value-type="float">
            <text:p>8087</text:p>
          </table:table-cell>
          <table:table-cell table:formula="of:=CONCATENATE(&quot;\u&quot;;[.B215];&quot;?&quot;)" office:value-type="string" office:string-value="\u8087?" calcext:value-type="string">
            <text:p>\u808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ᾘ</text:p>
          </table:table-cell>
          <table:table-cell table:formula="of:=UNICODE([.A216])" office:value-type="float" office:value="8088" calcext:value-type="float">
            <text:p>8088</text:p>
          </table:table-cell>
          <table:table-cell table:formula="of:=CONCATENATE(&quot;\u&quot;;[.B216];&quot;?&quot;)" office:value-type="string" office:string-value="\u8088?" calcext:value-type="string">
            <text:p>\u808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ᾙ</text:p>
          </table:table-cell>
          <table:table-cell table:formula="of:=UNICODE([.A217])" office:value-type="float" office:value="8089" calcext:value-type="float">
            <text:p>8089</text:p>
          </table:table-cell>
          <table:table-cell table:formula="of:=CONCATENATE(&quot;\u&quot;;[.B217];&quot;?&quot;)" office:value-type="string" office:string-value="\u8089?" calcext:value-type="string">
            <text:p>\u808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ᾚ</text:p>
          </table:table-cell>
          <table:table-cell table:formula="of:=UNICODE([.A218])" office:value-type="float" office:value="8090" calcext:value-type="float">
            <text:p>8090</text:p>
          </table:table-cell>
          <table:table-cell table:formula="of:=CONCATENATE(&quot;\u&quot;;[.B218];&quot;?&quot;)" office:value-type="string" office:string-value="\u8090?" calcext:value-type="string">
            <text:p>\u809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ᾛ</text:p>
          </table:table-cell>
          <table:table-cell table:formula="of:=UNICODE([.A219])" office:value-type="float" office:value="8091" calcext:value-type="float">
            <text:p>8091</text:p>
          </table:table-cell>
          <table:table-cell table:formula="of:=CONCATENATE(&quot;\u&quot;;[.B219];&quot;?&quot;)" office:value-type="string" office:string-value="\u8091?" calcext:value-type="string">
            <text:p>\u809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ᾜ</text:p>
          </table:table-cell>
          <table:table-cell table:formula="of:=UNICODE([.A220])" office:value-type="float" office:value="8092" calcext:value-type="float">
            <text:p>8092</text:p>
          </table:table-cell>
          <table:table-cell table:formula="of:=CONCATENATE(&quot;\u&quot;;[.B220];&quot;?&quot;)" office:value-type="string" office:string-value="\u8092?" calcext:value-type="string">
            <text:p>\u809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ᾝ</text:p>
          </table:table-cell>
          <table:table-cell table:formula="of:=UNICODE([.A221])" office:value-type="float" office:value="8093" calcext:value-type="float">
            <text:p>8093</text:p>
          </table:table-cell>
          <table:table-cell table:formula="of:=CONCATENATE(&quot;\u&quot;;[.B221];&quot;?&quot;)" office:value-type="string" office:string-value="\u8093?" calcext:value-type="string">
            <text:p>\u809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ᾠ</text:p>
          </table:table-cell>
          <table:table-cell table:formula="of:=UNICODE([.A222])" office:value-type="float" office:value="8096" calcext:value-type="float">
            <text:p>8096</text:p>
          </table:table-cell>
          <table:table-cell table:formula="of:=CONCATENATE(&quot;\u&quot;;[.B222];&quot;?&quot;)" office:value-type="string" office:string-value="\u8096?" calcext:value-type="string">
            <text:p>\u809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ᾡ</text:p>
          </table:table-cell>
          <table:table-cell table:formula="of:=UNICODE([.A223])" office:value-type="float" office:value="8097" calcext:value-type="float">
            <text:p>8097</text:p>
          </table:table-cell>
          <table:table-cell table:formula="of:=CONCATENATE(&quot;\u&quot;;[.B223];&quot;?&quot;)" office:value-type="string" office:string-value="\u8097?" calcext:value-type="string">
            <text:p>\u809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ᾢ</text:p>
          </table:table-cell>
          <table:table-cell table:formula="of:=UNICODE([.A224])" office:value-type="float" office:value="8098" calcext:value-type="float">
            <text:p>8098</text:p>
          </table:table-cell>
          <table:table-cell table:formula="of:=CONCATENATE(&quot;\u&quot;;[.B224];&quot;?&quot;)" office:value-type="string" office:string-value="\u8098?" calcext:value-type="string">
            <text:p>\u809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ᾣ</text:p>
          </table:table-cell>
          <table:table-cell table:formula="of:=UNICODE([.A225])" office:value-type="float" office:value="8099" calcext:value-type="float">
            <text:p>8099</text:p>
          </table:table-cell>
          <table:table-cell table:formula="of:=CONCATENATE(&quot;\u&quot;;[.B225];&quot;?&quot;)" office:value-type="string" office:string-value="\u8099?" calcext:value-type="string">
            <text:p>\u809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ᾤ</text:p>
          </table:table-cell>
          <table:table-cell table:formula="of:=UNICODE([.A226])" office:value-type="float" office:value="8100" calcext:value-type="float">
            <text:p>8100</text:p>
          </table:table-cell>
          <table:table-cell table:formula="of:=CONCATENATE(&quot;\u&quot;;[.B226];&quot;?&quot;)" office:value-type="string" office:string-value="\u8100?" calcext:value-type="string">
            <text:p>\u810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ᾥ</text:p>
          </table:table-cell>
          <table:table-cell table:formula="of:=UNICODE([.A227])" office:value-type="float" office:value="8101" calcext:value-type="float">
            <text:p>8101</text:p>
          </table:table-cell>
          <table:table-cell table:formula="of:=CONCATENATE(&quot;\u&quot;;[.B227];&quot;?&quot;)" office:value-type="string" office:string-value="\u8101?" calcext:value-type="string">
            <text:p>\u810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ᾦ</text:p>
          </table:table-cell>
          <table:table-cell table:formula="of:=UNICODE([.A228])" office:value-type="float" office:value="8102" calcext:value-type="float">
            <text:p>8102</text:p>
          </table:table-cell>
          <table:table-cell table:formula="of:=CONCATENATE(&quot;\u&quot;;[.B228];&quot;?&quot;)" office:value-type="string" office:string-value="\u8102?" calcext:value-type="string">
            <text:p>\u810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ᾧ</text:p>
          </table:table-cell>
          <table:table-cell table:formula="of:=UNICODE([.A229])" office:value-type="float" office:value="8103" calcext:value-type="float">
            <text:p>8103</text:p>
          </table:table-cell>
          <table:table-cell table:formula="of:=CONCATENATE(&quot;\u&quot;;[.B229];&quot;?&quot;)" office:value-type="string" office:string-value="\u8103?" calcext:value-type="string">
            <text:p>\u810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ᾨ</text:p>
          </table:table-cell>
          <table:table-cell table:formula="of:=UNICODE([.A230])" office:value-type="float" office:value="8104" calcext:value-type="float">
            <text:p>8104</text:p>
          </table:table-cell>
          <table:table-cell table:formula="of:=CONCATENATE(&quot;\u&quot;;[.B230];&quot;?&quot;)" office:value-type="string" office:string-value="\u8104?" calcext:value-type="string">
            <text:p>\u810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ᾩ</text:p>
          </table:table-cell>
          <table:table-cell table:formula="of:=UNICODE([.A231])" office:value-type="float" office:value="8105" calcext:value-type="float">
            <text:p>8105</text:p>
          </table:table-cell>
          <table:table-cell table:formula="of:=CONCATENATE(&quot;\u&quot;;[.B231];&quot;?&quot;)" office:value-type="string" office:string-value="\u8105?" calcext:value-type="string">
            <text:p>\u810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ᾪ</text:p>
          </table:table-cell>
          <table:table-cell table:formula="of:=UNICODE([.A232])" office:value-type="float" office:value="8106" calcext:value-type="float">
            <text:p>8106</text:p>
          </table:table-cell>
          <table:table-cell table:formula="of:=CONCATENATE(&quot;\u&quot;;[.B232];&quot;?&quot;)" office:value-type="string" office:string-value="\u8106?" calcext:value-type="string">
            <text:p>\u810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ᾫ</text:p>
          </table:table-cell>
          <table:table-cell table:formula="of:=UNICODE([.A233])" office:value-type="float" office:value="8107" calcext:value-type="float">
            <text:p>8107</text:p>
          </table:table-cell>
          <table:table-cell table:formula="of:=CONCATENATE(&quot;\u&quot;;[.B233];&quot;?&quot;)" office:value-type="string" office:string-value="\u8107?" calcext:value-type="string">
            <text:p>\u810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ᾬ</text:p>
          </table:table-cell>
          <table:table-cell table:formula="of:=UNICODE([.A234])" office:value-type="float" office:value="8108" calcext:value-type="float">
            <text:p>8108</text:p>
          </table:table-cell>
          <table:table-cell table:formula="of:=CONCATENATE(&quot;\u&quot;;[.B234];&quot;?&quot;)" office:value-type="string" office:string-value="\u8108?" calcext:value-type="string">
            <text:p>\u810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ᾭ</text:p>
          </table:table-cell>
          <table:table-cell table:formula="of:=UNICODE([.A235])" office:value-type="float" office:value="8109" calcext:value-type="float">
            <text:p>8109</text:p>
          </table:table-cell>
          <table:table-cell table:formula="of:=CONCATENATE(&quot;\u&quot;;[.B235];&quot;?&quot;)" office:value-type="string" office:string-value="\u8109?" calcext:value-type="string">
            <text:p>\u810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ᾮ</text:p>
          </table:table-cell>
          <table:table-cell table:formula="of:=UNICODE([.A236])" office:value-type="float" office:value="8110" calcext:value-type="float">
            <text:p>8110</text:p>
          </table:table-cell>
          <table:table-cell table:formula="of:=CONCATENATE(&quot;\u&quot;;[.B236];&quot;?&quot;)" office:value-type="string" office:string-value="\u8110?" calcext:value-type="string">
            <text:p>\u811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ᾯ</text:p>
          </table:table-cell>
          <table:table-cell table:formula="of:=UNICODE([.A237])" office:value-type="float" office:value="8111" calcext:value-type="float">
            <text:p>8111</text:p>
          </table:table-cell>
          <table:table-cell table:formula="of:=CONCATENATE(&quot;\u&quot;;[.B237];&quot;?&quot;)" office:value-type="string" office:string-value="\u8111?" calcext:value-type="string">
            <text:p>\u811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ᾰ</text:p>
          </table:table-cell>
          <table:table-cell table:formula="of:=UNICODE([.A238])" office:value-type="float" office:value="8112" calcext:value-type="float">
            <text:p>8112</text:p>
          </table:table-cell>
          <table:table-cell table:formula="of:=CONCATENATE(&quot;\u&quot;;[.B238];&quot;?&quot;)" office:value-type="string" office:string-value="\u8112?" calcext:value-type="string">
            <text:p>\u811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ᾱ</text:p>
          </table:table-cell>
          <table:table-cell table:formula="of:=UNICODE([.A239])" office:value-type="float" office:value="8113" calcext:value-type="float">
            <text:p>8113</text:p>
          </table:table-cell>
          <table:table-cell table:formula="of:=CONCATENATE(&quot;\u&quot;;[.B239];&quot;?&quot;)" office:value-type="string" office:string-value="\u8113?" calcext:value-type="string">
            <text:p>\u811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ᾲ</text:p>
          </table:table-cell>
          <table:table-cell table:formula="of:=UNICODE([.A240])" office:value-type="float" office:value="8114" calcext:value-type="float">
            <text:p>8114</text:p>
          </table:table-cell>
          <table:table-cell table:formula="of:=CONCATENATE(&quot;\u&quot;;[.B240];&quot;?&quot;)" office:value-type="string" office:string-value="\u8114?" calcext:value-type="string">
            <text:p>\u811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ᾳ</text:p>
          </table:table-cell>
          <table:table-cell table:formula="of:=UNICODE([.A241])" office:value-type="float" office:value="8115" calcext:value-type="float">
            <text:p>8115</text:p>
          </table:table-cell>
          <table:table-cell table:formula="of:=CONCATENATE(&quot;\u&quot;;[.B241];&quot;?&quot;)" office:value-type="string" office:string-value="\u8115?" calcext:value-type="string">
            <text:p>\u811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ᾴ</text:p>
          </table:table-cell>
          <table:table-cell table:formula="of:=UNICODE([.A242])" office:value-type="float" office:value="8116" calcext:value-type="float">
            <text:p>8116</text:p>
          </table:table-cell>
          <table:table-cell table:formula="of:=CONCATENATE(&quot;\u&quot;;[.B242];&quot;?&quot;)" office:value-type="string" office:string-value="\u8116?" calcext:value-type="string">
            <text:p>\u811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ᾶ</text:p>
          </table:table-cell>
          <table:table-cell table:formula="of:=UNICODE([.A243])" office:value-type="float" office:value="8118" calcext:value-type="float">
            <text:p>8118</text:p>
          </table:table-cell>
          <table:table-cell table:formula="of:=CONCATENATE(&quot;\u&quot;;[.B243];&quot;?&quot;)" office:value-type="string" office:string-value="\u8118?" calcext:value-type="string">
            <text:p>\u811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ᾷ</text:p>
          </table:table-cell>
          <table:table-cell table:formula="of:=UNICODE([.A244])" office:value-type="float" office:value="8119" calcext:value-type="float">
            <text:p>8119</text:p>
          </table:table-cell>
          <table:table-cell table:formula="of:=CONCATENATE(&quot;\u&quot;;[.B244];&quot;?&quot;)" office:value-type="string" office:string-value="\u8119?" calcext:value-type="string">
            <text:p>\u811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῀</text:p>
          </table:table-cell>
          <table:table-cell table:formula="of:=UNICODE([.A245])" office:value-type="float" office:value="8128" calcext:value-type="float">
            <text:p>8128</text:p>
          </table:table-cell>
          <table:table-cell table:formula="of:=CONCATENATE(&quot;\u&quot;;[.B245];&quot;?&quot;)" office:value-type="string" office:string-value="\u8128?" calcext:value-type="string">
            <text:p>\u812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ῂ</text:p>
          </table:table-cell>
          <table:table-cell table:formula="of:=UNICODE([.A246])" office:value-type="float" office:value="8130" calcext:value-type="float">
            <text:p>8130</text:p>
          </table:table-cell>
          <table:table-cell table:formula="of:=CONCATENATE(&quot;\u&quot;;[.B246];&quot;?&quot;)" office:value-type="string" office:string-value="\u8130?" calcext:value-type="string">
            <text:p>\u813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ῃ</text:p>
          </table:table-cell>
          <table:table-cell table:formula="of:=UNICODE([.A247])" office:value-type="float" office:value="8131" calcext:value-type="float">
            <text:p>8131</text:p>
          </table:table-cell>
          <table:table-cell table:formula="of:=CONCATENATE(&quot;\u&quot;;[.B247];&quot;?&quot;)" office:value-type="string" office:string-value="\u8131?" calcext:value-type="string">
            <text:p>\u813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ῄ</text:p>
          </table:table-cell>
          <table:table-cell table:formula="of:=UNICODE([.A248])" office:value-type="float" office:value="8132" calcext:value-type="float">
            <text:p>8132</text:p>
          </table:table-cell>
          <table:table-cell table:formula="of:=CONCATENATE(&quot;\u&quot;;[.B248];&quot;?&quot;)" office:value-type="string" office:string-value="\u8132?" calcext:value-type="string">
            <text:p>\u813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ῆ</text:p>
          </table:table-cell>
          <table:table-cell table:formula="of:=UNICODE([.A249])" office:value-type="float" office:value="8134" calcext:value-type="float">
            <text:p>8134</text:p>
          </table:table-cell>
          <table:table-cell table:formula="of:=CONCATENATE(&quot;\u&quot;;[.B249];&quot;?&quot;)" office:value-type="string" office:string-value="\u8134?" calcext:value-type="string">
            <text:p>\u813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ῇ</text:p>
          </table:table-cell>
          <table:table-cell table:formula="of:=UNICODE([.A250])" office:value-type="float" office:value="8135" calcext:value-type="float">
            <text:p>8135</text:p>
          </table:table-cell>
          <table:table-cell table:formula="of:=CONCATENATE(&quot;\u&quot;;[.B250];&quot;?&quot;)" office:value-type="string" office:string-value="\u8135?" calcext:value-type="string">
            <text:p>\u813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Ὲ</text:p>
          </table:table-cell>
          <table:table-cell table:formula="of:=UNICODE([.A251])" office:value-type="float" office:value="8136" calcext:value-type="float">
            <text:p>8136</text:p>
          </table:table-cell>
          <table:table-cell table:formula="of:=CONCATENATE(&quot;\u&quot;;[.B251];&quot;?&quot;)" office:value-type="string" office:string-value="\u8136?" calcext:value-type="string">
            <text:p>\u813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Έ</text:p>
          </table:table-cell>
          <table:table-cell table:formula="of:=UNICODE([.A252])" office:value-type="float" office:value="8137" calcext:value-type="float">
            <text:p>8137</text:p>
          </table:table-cell>
          <table:table-cell table:formula="of:=CONCATENATE(&quot;\u&quot;;[.B252];&quot;?&quot;)" office:value-type="string" office:string-value="\u8137?" calcext:value-type="string">
            <text:p>\u813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ῐ</text:p>
          </table:table-cell>
          <table:table-cell table:formula="of:=UNICODE([.A253])" office:value-type="float" office:value="8144" calcext:value-type="float">
            <text:p>8144</text:p>
          </table:table-cell>
          <table:table-cell table:formula="of:=CONCATENATE(&quot;\u&quot;;[.B253];&quot;?&quot;)" office:value-type="string" office:string-value="\u8144?" calcext:value-type="string">
            <text:p>\u814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ῑ</text:p>
          </table:table-cell>
          <table:table-cell table:formula="of:=UNICODE([.A254])" office:value-type="float" office:value="8145" calcext:value-type="float">
            <text:p>8145</text:p>
          </table:table-cell>
          <table:table-cell table:formula="of:=CONCATENATE(&quot;\u&quot;;[.B254];&quot;?&quot;)" office:value-type="string" office:string-value="\u8145?" calcext:value-type="string">
            <text:p>\u814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ῒ</text:p>
          </table:table-cell>
          <table:table-cell table:formula="of:=UNICODE([.A255])" office:value-type="float" office:value="8146" calcext:value-type="float">
            <text:p>8146</text:p>
          </table:table-cell>
          <table:table-cell table:formula="of:=CONCATENATE(&quot;\u&quot;;[.B255];&quot;?&quot;)" office:value-type="string" office:string-value="\u8146?" calcext:value-type="string">
            <text:p>\u814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ΐ</text:p>
          </table:table-cell>
          <table:table-cell table:formula="of:=UNICODE([.A256])" office:value-type="float" office:value="8147" calcext:value-type="float">
            <text:p>8147</text:p>
          </table:table-cell>
          <table:table-cell table:formula="of:=CONCATENATE(&quot;\u&quot;;[.B256];&quot;?&quot;)" office:value-type="string" office:string-value="\u8147?" calcext:value-type="string">
            <text:p>\u814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ῖ</text:p>
          </table:table-cell>
          <table:table-cell table:formula="of:=UNICODE([.A257])" office:value-type="float" office:value="8150" calcext:value-type="float">
            <text:p>8150</text:p>
          </table:table-cell>
          <table:table-cell table:formula="of:=CONCATENATE(&quot;\u&quot;;[.B257];&quot;?&quot;)" office:value-type="string" office:string-value="\u8150?" calcext:value-type="string">
            <text:p>\u815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ῗ </text:p>
          </table:table-cell>
          <table:table-cell table:formula="of:=UNICODE([.A258])" office:value-type="float" office:value="8151" calcext:value-type="float">
            <text:p>8151</text:p>
          </table:table-cell>
          <table:table-cell table:formula="of:=CONCATENATE(&quot;\u&quot;;[.B258];&quot;?&quot;)" office:value-type="string" office:string-value="\u8151?" calcext:value-type="string">
            <text:p>\u815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Ῐ</text:p>
          </table:table-cell>
          <table:table-cell table:formula="of:=UNICODE([.A259])" office:value-type="float" office:value="8152" calcext:value-type="float">
            <text:p>8152</text:p>
          </table:table-cell>
          <table:table-cell table:formula="of:=CONCATENATE(&quot;\u&quot;;[.B259];&quot;?&quot;)" office:value-type="string" office:string-value="\u8152?" calcext:value-type="string">
            <text:p>\u815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Ῑ</text:p>
          </table:table-cell>
          <table:table-cell table:formula="of:=UNICODE([.A260])" office:value-type="float" office:value="8153" calcext:value-type="float">
            <text:p>8153</text:p>
          </table:table-cell>
          <table:table-cell table:formula="of:=CONCATENATE(&quot;\u&quot;;[.B260];&quot;?&quot;)" office:value-type="string" office:string-value="\u8153?" calcext:value-type="string">
            <text:p>\u815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Ὶ</text:p>
          </table:table-cell>
          <table:table-cell table:formula="of:=UNICODE([.A261])" office:value-type="float" office:value="8154" calcext:value-type="float">
            <text:p>8154</text:p>
          </table:table-cell>
          <table:table-cell table:formula="of:=CONCATENATE(&quot;\u&quot;;[.B261];&quot;?&quot;)" office:value-type="string" office:string-value="\u8154?" calcext:value-type="string">
            <text:p>\u815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Ί</text:p>
          </table:table-cell>
          <table:table-cell table:formula="of:=UNICODE([.A262])" office:value-type="float" office:value="8155" calcext:value-type="float">
            <text:p>8155</text:p>
          </table:table-cell>
          <table:table-cell table:formula="of:=CONCATENATE(&quot;\u&quot;;[.B262];&quot;?&quot;)" office:value-type="string" office:string-value="\u8155?" calcext:value-type="string">
            <text:p>\u815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ῠ</text:p>
          </table:table-cell>
          <table:table-cell table:formula="of:=UNICODE([.A263])" office:value-type="float" office:value="8160" calcext:value-type="float">
            <text:p>8160</text:p>
          </table:table-cell>
          <table:table-cell table:formula="of:=CONCATENATE(&quot;\u&quot;;[.B263];&quot;?&quot;)" office:value-type="string" office:string-value="\u8160?" calcext:value-type="string">
            <text:p>\u816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ῡ</text:p>
          </table:table-cell>
          <table:table-cell table:formula="of:=UNICODE([.A264])" office:value-type="float" office:value="8161" calcext:value-type="float">
            <text:p>8161</text:p>
          </table:table-cell>
          <table:table-cell table:formula="of:=CONCATENATE(&quot;\u&quot;;[.B264];&quot;?&quot;)" office:value-type="string" office:string-value="\u8161?" calcext:value-type="string">
            <text:p>\u816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ῢ</text:p>
          </table:table-cell>
          <table:table-cell table:formula="of:=UNICODE([.A265])" office:value-type="float" office:value="8162" calcext:value-type="float">
            <text:p>8162</text:p>
          </table:table-cell>
          <table:table-cell table:formula="of:=CONCATENATE(&quot;\u&quot;;[.B265];&quot;?&quot;)" office:value-type="string" office:string-value="\u8162?" calcext:value-type="string">
            <text:p>\u816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ῢ</text:p>
          </table:table-cell>
          <table:table-cell table:formula="of:=UNICODE([.A266])" office:value-type="float" office:value="8162" calcext:value-type="float">
            <text:p>8162</text:p>
          </table:table-cell>
          <table:table-cell table:formula="of:=CONCATENATE(&quot;\u&quot;;[.B266];&quot;?&quot;)" office:value-type="string" office:string-value="\u8162?" calcext:value-type="string">
            <text:p>\u816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ΰ</text:p>
          </table:table-cell>
          <table:table-cell table:formula="of:=UNICODE([.A267])" office:value-type="float" office:value="8163" calcext:value-type="float">
            <text:p>8163</text:p>
          </table:table-cell>
          <table:table-cell table:formula="of:=CONCATENATE(&quot;\u&quot;;[.B267];&quot;?&quot;)" office:value-type="string" office:string-value="\u8163?" calcext:value-type="string">
            <text:p>\u816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ΰ</text:p>
          </table:table-cell>
          <table:table-cell table:formula="of:=UNICODE([.A268])" office:value-type="float" office:value="8163" calcext:value-type="float">
            <text:p>8163</text:p>
          </table:table-cell>
          <table:table-cell table:formula="of:=CONCATENATE(&quot;\u&quot;;[.B268];&quot;?&quot;)" office:value-type="string" office:string-value="\u8163?" calcext:value-type="string">
            <text:p>\u816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ῤ</text:p>
          </table:table-cell>
          <table:table-cell table:formula="of:=UNICODE([.A269])" office:value-type="float" office:value="8164" calcext:value-type="float">
            <text:p>8164</text:p>
          </table:table-cell>
          <table:table-cell table:formula="of:=CONCATENATE(&quot;\u&quot;;[.B269];&quot;?&quot;)" office:value-type="string" office:string-value="\u8164?" calcext:value-type="string">
            <text:p>\u816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ῥ </text:p>
          </table:table-cell>
          <table:table-cell table:formula="of:=UNICODE([.A270])" office:value-type="float" office:value="8165" calcext:value-type="float">
            <text:p>8165</text:p>
          </table:table-cell>
          <table:table-cell table:formula="of:=CONCATENATE(&quot;\u&quot;;[.B270];&quot;?&quot;)" office:value-type="string" office:string-value="\u8165?" calcext:value-type="string">
            <text:p>\u816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ῦ</text:p>
          </table:table-cell>
          <table:table-cell table:formula="of:=UNICODE([.A271])" office:value-type="float" office:value="8166" calcext:value-type="float">
            <text:p>8166</text:p>
          </table:table-cell>
          <table:table-cell table:formula="of:=CONCATENATE(&quot;\u&quot;;[.B271];&quot;?&quot;)" office:value-type="string" office:string-value="\u8166?" calcext:value-type="string">
            <text:p>\u816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ῧ</text:p>
          </table:table-cell>
          <table:table-cell table:formula="of:=UNICODE([.A272])" office:value-type="float" office:value="8167" calcext:value-type="float">
            <text:p>8167</text:p>
          </table:table-cell>
          <table:table-cell table:formula="of:=CONCATENATE(&quot;\u&quot;;[.B272];&quot;?&quot;)" office:value-type="string" office:string-value="\u8167?" calcext:value-type="string">
            <text:p>\u816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Ῥ</text:p>
          </table:table-cell>
          <table:table-cell table:formula="of:=UNICODE([.A273])" office:value-type="float" office:value="8172" calcext:value-type="float">
            <text:p>8172</text:p>
          </table:table-cell>
          <table:table-cell table:formula="of:=CONCATENATE(&quot;\u&quot;;[.B273];&quot;?&quot;)" office:value-type="string" office:string-value="\u8172?" calcext:value-type="string">
            <text:p>\u817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ῲ</text:p>
          </table:table-cell>
          <table:table-cell table:formula="of:=UNICODE([.A274])" office:value-type="float" office:value="8178" calcext:value-type="float">
            <text:p>8178</text:p>
          </table:table-cell>
          <table:table-cell table:formula="of:=CONCATENATE(&quot;\u&quot;;[.B274];&quot;?&quot;)" office:value-type="string" office:string-value="\u8178?" calcext:value-type="string">
            <text:p>\u817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ῳ</text:p>
          </table:table-cell>
          <table:table-cell table:formula="of:=UNICODE([.A275])" office:value-type="float" office:value="8179" calcext:value-type="float">
            <text:p>8179</text:p>
          </table:table-cell>
          <table:table-cell table:formula="of:=CONCATENATE(&quot;\u&quot;;[.B275];&quot;?&quot;)" office:value-type="string" office:string-value="\u8179?" calcext:value-type="string">
            <text:p>\u817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ῴ</text:p>
          </table:table-cell>
          <table:table-cell table:formula="of:=UNICODE([.A276])" office:value-type="float" office:value="8180" calcext:value-type="float">
            <text:p>8180</text:p>
          </table:table-cell>
          <table:table-cell table:formula="of:=CONCATENATE(&quot;\u&quot;;[.B276];&quot;?&quot;)" office:value-type="string" office:string-value="\u8180?" calcext:value-type="string">
            <text:p>\u818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ῶ</text:p>
          </table:table-cell>
          <table:table-cell table:formula="of:=UNICODE([.A277])" office:value-type="float" office:value="8182" calcext:value-type="float">
            <text:p>8182</text:p>
          </table:table-cell>
          <table:table-cell table:formula="of:=CONCATENATE(&quot;\u&quot;;[.B277];&quot;?&quot;)" office:value-type="string" office:string-value="\u8182?" calcext:value-type="string">
            <text:p>\u818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ῷ</text:p>
          </table:table-cell>
          <table:table-cell table:formula="of:=UNICODE([.A278])" office:value-type="float" office:value="8183" calcext:value-type="float">
            <text:p>8183</text:p>
          </table:table-cell>
          <table:table-cell table:formula="of:=CONCATENATE(&quot;\u&quot;;[.B278];&quot;?&quot;)" office:value-type="string" office:string-value="\u8183?" calcext:value-type="string">
            <text:p>\u818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Ὼ</text:p>
          </table:table-cell>
          <table:table-cell table:formula="of:=UNICODE([.A279])" office:value-type="float" office:value="8186" calcext:value-type="float">
            <text:p>8186</text:p>
          </table:table-cell>
          <table:table-cell table:formula="of:=CONCATENATE(&quot;\u&quot;;[.B279];&quot;?&quot;)" office:value-type="string" office:string-value="\u8186?" calcext:value-type="string">
            <text:p>\u818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Ώ</text:p>
          </table:table-cell>
          <table:table-cell table:formula="of:=UNICODE([.A280])" office:value-type="float" office:value="8187" calcext:value-type="float">
            <text:p>8187</text:p>
          </table:table-cell>
          <table:table-cell table:formula="of:=CONCATENATE(&quot;\u&quot;;[.B280];&quot;?&quot;)" office:value-type="string" office:string-value="\u8187?" calcext:value-type="string">
            <text:p>\u818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ῼ</text:p>
          </table:table-cell>
          <table:table-cell table:formula="of:=UNICODE([.A281])" office:value-type="float" office:value="8188" calcext:value-type="float">
            <text:p>8188</text:p>
          </table:table-cell>
          <table:table-cell table:formula="of:=CONCATENATE(&quot;\u&quot;;[.B281];&quot;?&quot;)" office:value-type="string" office:string-value="\u8188?" calcext:value-type="string">
            <text:p>\u818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</text:p>
          </table:table-cell>
          <table:table-cell table:formula="of:=UNICODE([.A282])" office:value-type="float" office:value="59057" calcext:value-type="float">
            <text:p>59057</text:p>
          </table:table-cell>
          <table:table-cell table:formula="of:=CONCATENATE(&quot;\u&quot;;[.B282];&quot;?&quot;)" office:value-type="string" office:string-value="\u59057?" calcext:value-type="string">
            <text:p>\u5905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</text:p>
          </table:table-cell>
          <table:table-cell table:formula="of:=UNICODE([.A283])" office:value-type="float" office:value="59058" calcext:value-type="float">
            <text:p>59058</text:p>
          </table:table-cell>
          <table:table-cell table:formula="of:=CONCATENATE(&quot;\u&quot;;[.B283];&quot;?&quot;)" office:value-type="string" office:string-value="\u59058?" calcext:value-type="string">
            <text:p>\u5905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</text:p>
          </table:table-cell>
          <table:table-cell table:formula="of:=UNICODE([.A284])" office:value-type="float" office:value="59059" calcext:value-type="float">
            <text:p>59059</text:p>
          </table:table-cell>
          <table:table-cell table:formula="of:=CONCATENATE(&quot;\u&quot;;[.B284];&quot;?&quot;)" office:value-type="string" office:string-value="\u59059?" calcext:value-type="string">
            <text:p>\u5905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</text:p>
          </table:table-cell>
          <table:table-cell table:formula="of:=UNICODE([.A285])" office:value-type="float" office:value="59060" calcext:value-type="float">
            <text:p>59060</text:p>
          </table:table-cell>
          <table:table-cell table:formula="of:=CONCATENATE(&quot;\u&quot;;[.B285];&quot;?&quot;)" office:value-type="string" office:string-value="\u59060?" calcext:value-type="string">
            <text:p>\u5906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</text:p>
          </table:table-cell>
          <table:table-cell table:formula="of:=UNICODE([.A286])" office:value-type="float" office:value="59061" calcext:value-type="float">
            <text:p>59061</text:p>
          </table:table-cell>
          <table:table-cell table:formula="of:=CONCATENATE(&quot;\u&quot;;[.B286];&quot;?&quot;)" office:value-type="string" office:string-value="\u59061?" calcext:value-type="string">
            <text:p>\u5906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</text:p>
          </table:table-cell>
          <table:table-cell table:formula="of:=UNICODE([.A287])" office:value-type="float" office:value="59062" calcext:value-type="float">
            <text:p>59062</text:p>
          </table:table-cell>
          <table:table-cell table:formula="of:=CONCATENATE(&quot;\u&quot;;[.B287];&quot;?&quot;)" office:value-type="string" office:string-value="\u59062?" calcext:value-type="string">
            <text:p>\u5906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</text:p>
          </table:table-cell>
          <table:table-cell table:formula="of:=UNICODE([.A288])" office:value-type="float" office:value="59063" calcext:value-type="float">
            <text:p>59063</text:p>
          </table:table-cell>
          <table:table-cell table:formula="of:=CONCATENATE(&quot;\u&quot;;[.B288];&quot;?&quot;)" office:value-type="string" office:string-value="\u59063?" calcext:value-type="string">
            <text:p>\u5906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</text:p>
          </table:table-cell>
          <table:table-cell table:formula="of:=UNICODE([.A289])" office:value-type="float" office:value="59064" calcext:value-type="float">
            <text:p>59064</text:p>
          </table:table-cell>
          <table:table-cell table:formula="of:=CONCATENATE(&quot;\u&quot;;[.B289];&quot;?&quot;)" office:value-type="string" office:string-value="\u59064?" calcext:value-type="string">
            <text:p>\u5906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</text:p>
          </table:table-cell>
          <table:table-cell table:formula="of:=UNICODE([.A290])" office:value-type="float" office:value="59072" calcext:value-type="float">
            <text:p>59072</text:p>
          </table:table-cell>
          <table:table-cell table:formula="of:=CONCATENATE(&quot;\u&quot;;[.B290];&quot;?&quot;)" office:value-type="string" office:string-value="\u59072?" calcext:value-type="string">
            <text:p>\u5907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</text:p>
          </table:table-cell>
          <table:table-cell table:formula="of:=UNICODE([.A291])" office:value-type="float" office:value="59088" calcext:value-type="float">
            <text:p>59088</text:p>
          </table:table-cell>
          <table:table-cell table:formula="of:=CONCATENATE(&quot;\u&quot;;[.B291];&quot;?&quot;)" office:value-type="string" office:string-value="\u59088?" calcext:value-type="string">
            <text:p>\u5908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</text:p>
          </table:table-cell>
          <table:table-cell table:formula="of:=UNICODE([.A292])" office:value-type="float" office:value="59089" calcext:value-type="float">
            <text:p>59089</text:p>
          </table:table-cell>
          <table:table-cell table:formula="of:=CONCATENATE(&quot;\u&quot;;[.B292];&quot;?&quot;)" office:value-type="string" office:string-value="\u59089?" calcext:value-type="string">
            <text:p>\u5908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</text:p>
          </table:table-cell>
          <table:table-cell table:formula="of:=UNICODE([.A293])" office:value-type="float" office:value="59090" calcext:value-type="float">
            <text:p>59090</text:p>
          </table:table-cell>
          <table:table-cell table:formula="of:=CONCATENATE(&quot;\u&quot;;[.B293];&quot;?&quot;)" office:value-type="string" office:string-value="\u59090?" calcext:value-type="string">
            <text:p>\u5909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</text:p>
          </table:table-cell>
          <table:table-cell table:formula="of:=UNICODE([.A294])" office:value-type="float" office:value="59091" calcext:value-type="float">
            <text:p>59091</text:p>
          </table:table-cell>
          <table:table-cell table:formula="of:=CONCATENATE(&quot;\u&quot;;[.B294];&quot;?&quot;)" office:value-type="string" office:string-value="\u59091?" calcext:value-type="string">
            <text:p>\u5909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</text:p>
          </table:table-cell>
          <table:table-cell table:formula="of:=UNICODE([.A295])" office:value-type="float" office:value="59092" calcext:value-type="float">
            <text:p>59092</text:p>
          </table:table-cell>
          <table:table-cell table:formula="of:=CONCATENATE(&quot;\u&quot;;[.B295];&quot;?&quot;)" office:value-type="string" office:string-value="\u59092?" calcext:value-type="string">
            <text:p>\u5909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</text:p>
          </table:table-cell>
          <table:table-cell table:formula="of:=UNICODE([.A296])" office:value-type="float" office:value="59093" calcext:value-type="float">
            <text:p>59093</text:p>
          </table:table-cell>
          <table:table-cell table:formula="of:=CONCATENATE(&quot;\u&quot;;[.B296];&quot;?&quot;)" office:value-type="string" office:string-value="\u59093?" calcext:value-type="string">
            <text:p>\u5909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</text:p>
          </table:table-cell>
          <table:table-cell table:formula="of:=UNICODE([.A297])" office:value-type="float" office:value="59094" calcext:value-type="float">
            <text:p>59094</text:p>
          </table:table-cell>
          <table:table-cell table:formula="of:=CONCATENATE(&quot;\u&quot;;[.B297];&quot;?&quot;)" office:value-type="string" office:string-value="\u59094?" calcext:value-type="string">
            <text:p>\u5909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</text:p>
          </table:table-cell>
          <table:table-cell table:formula="of:=UNICODE([.A298])" office:value-type="float" office:value="59095" calcext:value-type="float">
            <text:p>59095</text:p>
          </table:table-cell>
          <table:table-cell table:formula="of:=CONCATENATE(&quot;\u&quot;;[.B298];&quot;?&quot;)" office:value-type="string" office:string-value="\u59095?" calcext:value-type="string">
            <text:p>\u5909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</text:p>
          </table:table-cell>
          <table:table-cell table:formula="of:=UNICODE([.A299])" office:value-type="float" office:value="59096" calcext:value-type="float">
            <text:p>59096</text:p>
          </table:table-cell>
          <table:table-cell table:formula="of:=CONCATENATE(&quot;\u&quot;;[.B299];&quot;?&quot;)" office:value-type="string" office:string-value="\u59096?" calcext:value-type="string">
            <text:p>\u5909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</text:p>
          </table:table-cell>
          <table:table-cell table:formula="of:=UNICODE([.A300])" office:value-type="float" office:value="59097" calcext:value-type="float">
            <text:p>59097</text:p>
          </table:table-cell>
          <table:table-cell table:formula="of:=CONCATENATE(&quot;\u&quot;;[.B300];&quot;?&quot;)" office:value-type="string" office:string-value="\u59097?" calcext:value-type="string">
            <text:p>\u5909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</text:p>
          </table:table-cell>
          <table:table-cell table:formula="of:=UNICODE([.A301])" office:value-type="float" office:value="59098" calcext:value-type="float">
            <text:p>59098</text:p>
          </table:table-cell>
          <table:table-cell table:formula="of:=CONCATENATE(&quot;\u&quot;;[.B301];&quot;?&quot;)" office:value-type="string" office:string-value="\u59098?" calcext:value-type="string">
            <text:p>\u5909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</text:p>
          </table:table-cell>
          <table:table-cell table:formula="of:=UNICODE([.A302])" office:value-type="float" office:value="59104" calcext:value-type="float">
            <text:p>59104</text:p>
          </table:table-cell>
          <table:table-cell table:formula="of:=CONCATENATE(&quot;\u&quot;;[.B302];&quot;?&quot;)" office:value-type="string" office:string-value="\u59104?" calcext:value-type="string">
            <text:p>\u5910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</text:p>
          </table:table-cell>
          <table:table-cell table:formula="of:=UNICODE([.A303])" office:value-type="float" office:value="59105" calcext:value-type="float">
            <text:p>59105</text:p>
          </table:table-cell>
          <table:table-cell table:formula="of:=CONCATENATE(&quot;\u&quot;;[.B303];&quot;?&quot;)" office:value-type="string" office:string-value="\u59105?" calcext:value-type="string">
            <text:p>\u5910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</text:p>
          </table:table-cell>
          <table:table-cell table:formula="of:=UNICODE([.A304])" office:value-type="float" office:value="59106" calcext:value-type="float">
            <text:p>59106</text:p>
          </table:table-cell>
          <table:table-cell table:formula="of:=CONCATENATE(&quot;\u&quot;;[.B304];&quot;?&quot;)" office:value-type="string" office:string-value="\u59106?" calcext:value-type="string">
            <text:p>\u5910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</text:p>
          </table:table-cell>
          <table:table-cell table:formula="of:=UNICODE([.A305])" office:value-type="float" office:value="59107" calcext:value-type="float">
            <text:p>59107</text:p>
          </table:table-cell>
          <table:table-cell table:formula="of:=CONCATENATE(&quot;\u&quot;;[.B305];&quot;?&quot;)" office:value-type="string" office:string-value="\u59107?" calcext:value-type="string">
            <text:p>\u5910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</text:p>
          </table:table-cell>
          <table:table-cell table:formula="of:=UNICODE([.A306])" office:value-type="float" office:value="59120" calcext:value-type="float">
            <text:p>59120</text:p>
          </table:table-cell>
          <table:table-cell table:formula="of:=CONCATENATE(&quot;\u&quot;;[.B306];&quot;?&quot;)" office:value-type="string" office:string-value="\u59120?" calcext:value-type="string">
            <text:p>\u5912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</text:p>
          </table:table-cell>
          <table:table-cell table:formula="of:=UNICODE([.A307])" office:value-type="float" office:value="59121" calcext:value-type="float">
            <text:p>59121</text:p>
          </table:table-cell>
          <table:table-cell table:formula="of:=CONCATENATE(&quot;\u&quot;;[.B307];&quot;?&quot;)" office:value-type="string" office:string-value="\u59121?" calcext:value-type="string">
            <text:p>\u5912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</text:p>
          </table:table-cell>
          <table:table-cell table:formula="of:=UNICODE([.A308])" office:value-type="float" office:value="59122" calcext:value-type="float">
            <text:p>59122</text:p>
          </table:table-cell>
          <table:table-cell table:formula="of:=CONCATENATE(&quot;\u&quot;;[.B308];&quot;?&quot;)" office:value-type="string" office:string-value="\u59122?" calcext:value-type="string">
            <text:p>\u5912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</text:p>
          </table:table-cell>
          <table:table-cell table:formula="of:=UNICODE([.A309])" office:value-type="float" office:value="59123" calcext:value-type="float">
            <text:p>59123</text:p>
          </table:table-cell>
          <table:table-cell table:formula="of:=CONCATENATE(&quot;\u&quot;;[.B309];&quot;?&quot;)" office:value-type="string" office:string-value="\u59123?" calcext:value-type="string">
            <text:p>\u5912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</text:p>
          </table:table-cell>
          <table:table-cell table:formula="of:=UNICODE([.A310])" office:value-type="float" office:value="59124" calcext:value-type="float">
            <text:p>59124</text:p>
          </table:table-cell>
          <table:table-cell table:formula="of:=CONCATENATE(&quot;\u&quot;;[.B310];&quot;?&quot;)" office:value-type="string" office:string-value="\u59124?" calcext:value-type="string">
            <text:p>\u5912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</text:p>
          </table:table-cell>
          <table:table-cell table:formula="of:=UNICODE([.A311])" office:value-type="float" office:value="59125" calcext:value-type="float">
            <text:p>59125</text:p>
          </table:table-cell>
          <table:table-cell table:formula="of:=CONCATENATE(&quot;\u&quot;;[.B311];&quot;?&quot;)" office:value-type="string" office:string-value="\u59125?" calcext:value-type="string">
            <text:p>\u5912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</text:p>
          </table:table-cell>
          <table:table-cell table:formula="of:=UNICODE([.A312])" office:value-type="float" office:value="59126" calcext:value-type="float">
            <text:p>59126</text:p>
          </table:table-cell>
          <table:table-cell table:formula="of:=CONCATENATE(&quot;\u&quot;;[.B312];&quot;?&quot;)" office:value-type="string" office:string-value="\u59126?" calcext:value-type="string">
            <text:p>\u5912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</text:p>
          </table:table-cell>
          <table:table-cell table:formula="of:=UNICODE([.A313])" office:value-type="float" office:value="59127" calcext:value-type="float">
            <text:p>59127</text:p>
          </table:table-cell>
          <table:table-cell table:formula="of:=CONCATENATE(&quot;\u&quot;;[.B313];&quot;?&quot;)" office:value-type="string" office:string-value="\u59127?" calcext:value-type="string">
            <text:p>\u5912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</text:p>
          </table:table-cell>
          <table:table-cell table:formula="of:=UNICODE([.A314])" office:value-type="float" office:value="59128" calcext:value-type="float">
            <text:p>59128</text:p>
          </table:table-cell>
          <table:table-cell table:formula="of:=CONCATENATE(&quot;\u&quot;;[.B314];&quot;?&quot;)" office:value-type="string" office:string-value="\u59128?" calcext:value-type="string">
            <text:p>\u5912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</text:p>
          </table:table-cell>
          <table:table-cell table:formula="of:=UNICODE([.A315])" office:value-type="float" office:value="59129" calcext:value-type="float">
            <text:p>59129</text:p>
          </table:table-cell>
          <table:table-cell table:formula="of:=CONCATENATE(&quot;\u&quot;;[.B315];&quot;?&quot;)" office:value-type="string" office:string-value="\u59129?" calcext:value-type="string">
            <text:p>\u5912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</text:p>
          </table:table-cell>
          <table:table-cell table:formula="of:=UNICODE([.A316])" office:value-type="float" office:value="59130" calcext:value-type="float">
            <text:p>59130</text:p>
          </table:table-cell>
          <table:table-cell table:formula="of:=CONCATENATE(&quot;\u&quot;;[.B316];&quot;?&quot;)" office:value-type="string" office:string-value="\u59130?" calcext:value-type="string">
            <text:p>\u5913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</text:p>
          </table:table-cell>
          <table:table-cell table:formula="of:=UNICODE([.A317])" office:value-type="float" office:value="59131" calcext:value-type="float">
            <text:p>59131</text:p>
          </table:table-cell>
          <table:table-cell table:formula="of:=CONCATENATE(&quot;\u&quot;;[.B317];&quot;?&quot;)" office:value-type="string" office:string-value="\u59131?" calcext:value-type="string">
            <text:p>\u5913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</text:p>
          </table:table-cell>
          <table:table-cell table:formula="of:=UNICODE([.A318])" office:value-type="float" office:value="59132" calcext:value-type="float">
            <text:p>59132</text:p>
          </table:table-cell>
          <table:table-cell table:formula="of:=CONCATENATE(&quot;\u&quot;;[.B318];&quot;?&quot;)" office:value-type="string" office:string-value="\u59132?" calcext:value-type="string">
            <text:p>\u5913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</text:p>
          </table:table-cell>
          <table:table-cell table:formula="of:=UNICODE([.A319])" office:value-type="float" office:value="59133" calcext:value-type="float">
            <text:p>59133</text:p>
          </table:table-cell>
          <table:table-cell table:formula="of:=CONCATENATE(&quot;\u&quot;;[.B319];&quot;?&quot;)" office:value-type="string" office:string-value="\u59133?" calcext:value-type="string">
            <text:p>\u5913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</text:p>
          </table:table-cell>
          <table:table-cell table:formula="of:=UNICODE([.A320])" office:value-type="float" office:value="59134" calcext:value-type="float">
            <text:p>59134</text:p>
          </table:table-cell>
          <table:table-cell table:formula="of:=CONCATENATE(&quot;\u&quot;;[.B320];&quot;?&quot;)" office:value-type="string" office:string-value="\u59134?" calcext:value-type="string">
            <text:p>\u5913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</text:p>
          </table:table-cell>
          <table:table-cell table:formula="of:=UNICODE([.A321])" office:value-type="float" office:value="59136" calcext:value-type="float">
            <text:p>59136</text:p>
          </table:table-cell>
          <table:table-cell table:formula="of:=CONCATENATE(&quot;\u&quot;;[.B321];&quot;?&quot;)" office:value-type="string" office:string-value="\u59136?" calcext:value-type="string">
            <text:p>\u5913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</text:p>
          </table:table-cell>
          <table:table-cell table:formula="of:=UNICODE([.A322])" office:value-type="float" office:value="59137" calcext:value-type="float">
            <text:p>59137</text:p>
          </table:table-cell>
          <table:table-cell table:formula="of:=CONCATENATE(&quot;\u&quot;;[.B322];&quot;?&quot;)" office:value-type="string" office:string-value="\u59137?" calcext:value-type="string">
            <text:p>\u5913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</text:p>
          </table:table-cell>
          <table:table-cell table:formula="of:=UNICODE([.A323])" office:value-type="float" office:value="59152" calcext:value-type="float">
            <text:p>59152</text:p>
          </table:table-cell>
          <table:table-cell table:formula="of:=CONCATENATE(&quot;\u&quot;;[.B323];&quot;?&quot;)" office:value-type="string" office:string-value="\u59152?" calcext:value-type="string">
            <text:p>\u5915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</text:p>
          </table:table-cell>
          <table:table-cell table:formula="of:=UNICODE([.A324])" office:value-type="float" office:value="59153" calcext:value-type="float">
            <text:p>59153</text:p>
          </table:table-cell>
          <table:table-cell table:formula="of:=CONCATENATE(&quot;\u&quot;;[.B324];&quot;?&quot;)" office:value-type="string" office:string-value="\u59153?" calcext:value-type="string">
            <text:p>\u5915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</text:p>
          </table:table-cell>
          <table:table-cell table:formula="of:=UNICODE([.A325])" office:value-type="float" office:value="59154" calcext:value-type="float">
            <text:p>59154</text:p>
          </table:table-cell>
          <table:table-cell table:formula="of:=CONCATENATE(&quot;\u&quot;;[.B325];&quot;?&quot;)" office:value-type="string" office:string-value="\u59154?" calcext:value-type="string">
            <text:p>\u5915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</text:p>
          </table:table-cell>
          <table:table-cell table:formula="of:=UNICODE([.A326])" office:value-type="float" office:value="59155" calcext:value-type="float">
            <text:p>59155</text:p>
          </table:table-cell>
          <table:table-cell table:formula="of:=CONCATENATE(&quot;\u&quot;;[.B326];&quot;?&quot;)" office:value-type="string" office:string-value="\u59155?" calcext:value-type="string">
            <text:p>\u5915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</text:p>
          </table:table-cell>
          <table:table-cell table:formula="of:=UNICODE([.A327])" office:value-type="float" office:value="59156" calcext:value-type="float">
            <text:p>59156</text:p>
          </table:table-cell>
          <table:table-cell table:formula="of:=CONCATENATE(&quot;\u&quot;;[.B327];&quot;?&quot;)" office:value-type="string" office:string-value="\u59156?" calcext:value-type="string">
            <text:p>\u5915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</text:p>
          </table:table-cell>
          <table:table-cell table:formula="of:=UNICODE([.A328])" office:value-type="float" office:value="59157" calcext:value-type="float">
            <text:p>59157</text:p>
          </table:table-cell>
          <table:table-cell table:formula="of:=CONCATENATE(&quot;\u&quot;;[.B328];&quot;?&quot;)" office:value-type="string" office:string-value="\u59157?" calcext:value-type="string">
            <text:p>\u5915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</text:p>
          </table:table-cell>
          <table:table-cell table:formula="of:=UNICODE([.A329])" office:value-type="float" office:value="59168" calcext:value-type="float">
            <text:p>59168</text:p>
          </table:table-cell>
          <table:table-cell table:formula="of:=CONCATENATE(&quot;\u&quot;;[.B329];&quot;?&quot;)" office:value-type="string" office:string-value="\u59168?" calcext:value-type="string">
            <text:p>\u5916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</text:p>
          </table:table-cell>
          <table:table-cell table:formula="of:=UNICODE([.A330])" office:value-type="float" office:value="59169" calcext:value-type="float">
            <text:p>59169</text:p>
          </table:table-cell>
          <table:table-cell table:formula="of:=CONCATENATE(&quot;\u&quot;;[.B330];&quot;?&quot;)" office:value-type="string" office:string-value="\u59169?" calcext:value-type="string">
            <text:p>\u5916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</text:p>
          </table:table-cell>
          <table:table-cell table:formula="of:=UNICODE([.A331])" office:value-type="float" office:value="59170" calcext:value-type="float">
            <text:p>59170</text:p>
          </table:table-cell>
          <table:table-cell table:formula="of:=CONCATENATE(&quot;\u&quot;;[.B331];&quot;?&quot;)" office:value-type="string" office:string-value="\u59170?" calcext:value-type="string">
            <text:p>\u5917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</text:p>
          </table:table-cell>
          <table:table-cell table:formula="of:=UNICODE([.A332])" office:value-type="float" office:value="59200" calcext:value-type="float">
            <text:p>59200</text:p>
          </table:table-cell>
          <table:table-cell table:formula="of:=CONCATENATE(&quot;\u&quot;;[.B332];&quot;?&quot;)" office:value-type="string" office:string-value="\u59200?" calcext:value-type="string">
            <text:p>\u5920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</text:p>
          </table:table-cell>
          <table:table-cell table:formula="of:=UNICODE([.A333])" office:value-type="float" office:value="59201" calcext:value-type="float">
            <text:p>59201</text:p>
          </table:table-cell>
          <table:table-cell table:formula="of:=CONCATENATE(&quot;\u&quot;;[.B333];&quot;?&quot;)" office:value-type="string" office:string-value="\u59201?" calcext:value-type="string">
            <text:p>\u5920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</text:p>
          </table:table-cell>
          <table:table-cell table:formula="of:=UNICODE([.A334])" office:value-type="float" office:value="59202" calcext:value-type="float">
            <text:p>59202</text:p>
          </table:table-cell>
          <table:table-cell table:formula="of:=CONCATENATE(&quot;\u&quot;;[.B334];&quot;?&quot;)" office:value-type="string" office:string-value="\u59202?" calcext:value-type="string">
            <text:p>\u5920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</text:p>
          </table:table-cell>
          <table:table-cell table:formula="of:=UNICODE([.A335])" office:value-type="float" office:value="59203" calcext:value-type="float">
            <text:p>59203</text:p>
          </table:table-cell>
          <table:table-cell table:formula="of:=CONCATENATE(&quot;\u&quot;;[.B335];&quot;?&quot;)" office:value-type="string" office:string-value="\u59203?" calcext:value-type="string">
            <text:p>\u5920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</text:p>
          </table:table-cell>
          <table:table-cell table:formula="of:=UNICODE([.A336])" office:value-type="float" office:value="59204" calcext:value-type="float">
            <text:p>59204</text:p>
          </table:table-cell>
          <table:table-cell table:formula="of:=CONCATENATE(&quot;\u&quot;;[.B336];&quot;?&quot;)" office:value-type="string" office:string-value="\u59204?" calcext:value-type="string">
            <text:p>\u5920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</text:p>
          </table:table-cell>
          <table:table-cell table:formula="of:=UNICODE([.A337])" office:value-type="float" office:value="59216" calcext:value-type="float">
            <text:p>59216</text:p>
          </table:table-cell>
          <table:table-cell table:formula="of:=CONCATENATE(&quot;\u&quot;;[.B337];&quot;?&quot;)" office:value-type="string" office:string-value="\u59216?" calcext:value-type="string">
            <text:p>\u5921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</text:p>
          </table:table-cell>
          <table:table-cell table:formula="of:=UNICODE([.A338])" office:value-type="float" office:value="59232" calcext:value-type="float">
            <text:p>59232</text:p>
          </table:table-cell>
          <table:table-cell table:formula="of:=CONCATENATE(&quot;\u&quot;;[.B338];&quot;?&quot;)" office:value-type="string" office:string-value="\u59232?" calcext:value-type="string">
            <text:p>\u5923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</text:p>
          </table:table-cell>
          <table:table-cell table:formula="of:=UNICODE([.A339])" office:value-type="float" office:value="59233" calcext:value-type="float">
            <text:p>59233</text:p>
          </table:table-cell>
          <table:table-cell table:formula="of:=CONCATENATE(&quot;\u&quot;;[.B339];&quot;?&quot;)" office:value-type="string" office:string-value="\u59233?" calcext:value-type="string">
            <text:p>\u5923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</text:p>
          </table:table-cell>
          <table:table-cell table:formula="of:=UNICODE([.A340])" office:value-type="float" office:value="59234" calcext:value-type="float">
            <text:p>59234</text:p>
          </table:table-cell>
          <table:table-cell table:formula="of:=CONCATENATE(&quot;\u&quot;;[.B340];&quot;?&quot;)" office:value-type="string" office:string-value="\u59234?" calcext:value-type="string">
            <text:p>\u5923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</text:p>
          </table:table-cell>
          <table:table-cell table:formula="of:=UNICODE([.A341])" office:value-type="float" office:value="59235" calcext:value-type="float">
            <text:p>59235</text:p>
          </table:table-cell>
          <table:table-cell table:formula="of:=CONCATENATE(&quot;\u&quot;;[.B341];&quot;?&quot;)" office:value-type="string" office:string-value="\u59235?" calcext:value-type="string">
            <text:p>\u5923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</text:p>
          </table:table-cell>
          <table:table-cell table:formula="of:=UNICODE([.A342])" office:value-type="float" office:value="59236" calcext:value-type="float">
            <text:p>59236</text:p>
          </table:table-cell>
          <table:table-cell table:formula="of:=CONCATENATE(&quot;\u&quot;;[.B342];&quot;?&quot;)" office:value-type="string" office:string-value="\u59236?" calcext:value-type="string">
            <text:p>\u5923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</text:p>
          </table:table-cell>
          <table:table-cell table:formula="of:=UNICODE([.A343])" office:value-type="float" office:value="59237" calcext:value-type="float">
            <text:p>59237</text:p>
          </table:table-cell>
          <table:table-cell table:formula="of:=CONCATENATE(&quot;\u&quot;;[.B343];&quot;?&quot;)" office:value-type="string" office:string-value="\u59237?" calcext:value-type="string">
            <text:p>\u5923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</text:p>
          </table:table-cell>
          <table:table-cell table:formula="of:=UNICODE([.A344])" office:value-type="float" office:value="59248" calcext:value-type="float">
            <text:p>59248</text:p>
          </table:table-cell>
          <table:table-cell table:formula="of:=CONCATENATE(&quot;\u&quot;;[.B344];&quot;?&quot;)" office:value-type="string" office:string-value="\u59248?" calcext:value-type="string">
            <text:p>\u5924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</text:p>
          </table:table-cell>
          <table:table-cell table:formula="of:=UNICODE([.A345])" office:value-type="float" office:value="59264" calcext:value-type="float">
            <text:p>59264</text:p>
          </table:table-cell>
          <table:table-cell table:formula="of:=CONCATENATE(&quot;\u&quot;;[.B345];&quot;?&quot;)" office:value-type="string" office:string-value="\u59264?" calcext:value-type="string">
            <text:p>\u5926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</text:p>
          </table:table-cell>
          <table:table-cell table:formula="of:=UNICODE([.A346])" office:value-type="float" office:value="59280" calcext:value-type="float">
            <text:p>59280</text:p>
          </table:table-cell>
          <table:table-cell table:formula="of:=CONCATENATE(&quot;\u&quot;;[.B346];&quot;?&quot;)" office:value-type="string" office:string-value="\u59280?" calcext:value-type="string">
            <text:p>\u5928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</text:p>
          </table:table-cell>
          <table:table-cell table:formula="of:=UNICODE([.A347])" office:value-type="float" office:value="59280" calcext:value-type="float">
            <text:p>59280</text:p>
          </table:table-cell>
          <table:table-cell table:formula="of:=CONCATENATE(&quot;\u&quot;;[.B347];&quot;?&quot;)" office:value-type="string" office:string-value="\u59280?" calcext:value-type="string">
            <text:p>\u5928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</text:p>
          </table:table-cell>
          <table:table-cell table:formula="of:=UNICODE([.A348])" office:value-type="float" office:value="59281" calcext:value-type="float">
            <text:p>59281</text:p>
          </table:table-cell>
          <table:table-cell table:formula="of:=CONCATENATE(&quot;\u&quot;;[.B348];&quot;?&quot;)" office:value-type="string" office:string-value="\u59281?" calcext:value-type="string">
            <text:p>\u5928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</text:p>
          </table:table-cell>
          <table:table-cell table:formula="of:=UNICODE([.A349])" office:value-type="float" office:value="59282" calcext:value-type="float">
            <text:p>59282</text:p>
          </table:table-cell>
          <table:table-cell table:formula="of:=CONCATENATE(&quot;\u&quot;;[.B349];&quot;?&quot;)" office:value-type="string" office:string-value="\u59282?" calcext:value-type="string">
            <text:p>\u5928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</text:p>
          </table:table-cell>
          <table:table-cell table:formula="of:=UNICODE([.A350])" office:value-type="float" office:value="59283" calcext:value-type="float">
            <text:p>59283</text:p>
          </table:table-cell>
          <table:table-cell table:formula="of:=CONCATENATE(&quot;\u&quot;;[.B350];&quot;?&quot;)" office:value-type="string" office:string-value="\u59283?" calcext:value-type="string">
            <text:p>\u5928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</text:p>
          </table:table-cell>
          <table:table-cell table:formula="of:=UNICODE([.A351])" office:value-type="float" office:value="59284" calcext:value-type="float">
            <text:p>59284</text:p>
          </table:table-cell>
          <table:table-cell table:formula="of:=CONCATENATE(&quot;\u&quot;;[.B351];&quot;?&quot;)" office:value-type="string" office:string-value="\u59284?" calcext:value-type="string">
            <text:p>\u5928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</text:p>
          </table:table-cell>
          <table:table-cell table:formula="of:=UNICODE([.A352])" office:value-type="float" office:value="59285" calcext:value-type="float">
            <text:p>59285</text:p>
          </table:table-cell>
          <table:table-cell table:formula="of:=CONCATENATE(&quot;\u&quot;;[.B352];&quot;?&quot;)" office:value-type="string" office:string-value="\u59285?" calcext:value-type="string">
            <text:p>\u5928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</text:p>
          </table:table-cell>
          <table:table-cell table:formula="of:=UNICODE([.A353])" office:value-type="float" office:value="59286" calcext:value-type="float">
            <text:p>59286</text:p>
          </table:table-cell>
          <table:table-cell table:formula="of:=CONCATENATE(&quot;\u&quot;;[.B353];&quot;?&quot;)" office:value-type="string" office:string-value="\u59286?" calcext:value-type="string">
            <text:p>\u5928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</text:p>
          </table:table-cell>
          <table:table-cell table:formula="of:=UNICODE([.A354])" office:value-type="float" office:value="59296" calcext:value-type="float">
            <text:p>59296</text:p>
          </table:table-cell>
          <table:table-cell table:formula="of:=CONCATENATE(&quot;\u&quot;;[.B354];&quot;?&quot;)" office:value-type="string" office:string-value="\u59296?" calcext:value-type="string">
            <text:p>\u5929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</text:p>
          </table:table-cell>
          <table:table-cell table:formula="of:=UNICODE([.A355])" office:value-type="float" office:value="59297" calcext:value-type="float">
            <text:p>59297</text:p>
          </table:table-cell>
          <table:table-cell table:formula="of:=CONCATENATE(&quot;\u&quot;;[.B355];&quot;?&quot;)" office:value-type="string" office:string-value="\u59297?" calcext:value-type="string">
            <text:p>\u5929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</text:p>
          </table:table-cell>
          <table:table-cell table:formula="of:=UNICODE([.A356])" office:value-type="float" office:value="59298" calcext:value-type="float">
            <text:p>59298</text:p>
          </table:table-cell>
          <table:table-cell table:formula="of:=CONCATENATE(&quot;\u&quot;;[.B356];&quot;?&quot;)" office:value-type="string" office:string-value="\u59298?" calcext:value-type="string">
            <text:p>\u5929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</text:p>
          </table:table-cell>
          <table:table-cell table:formula="of:=UNICODE([.A357])" office:value-type="float" office:value="59299" calcext:value-type="float">
            <text:p>59299</text:p>
          </table:table-cell>
          <table:table-cell table:formula="of:=CONCATENATE(&quot;\u&quot;;[.B357];&quot;?&quot;)" office:value-type="string" office:string-value="\u59299?" calcext:value-type="string">
            <text:p>\u5929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</text:p>
          </table:table-cell>
          <table:table-cell table:formula="of:=UNICODE([.A358])" office:value-type="float" office:value="59300" calcext:value-type="float">
            <text:p>59300</text:p>
          </table:table-cell>
          <table:table-cell table:formula="of:=CONCATENATE(&quot;\u&quot;;[.B358];&quot;?&quot;)" office:value-type="string" office:string-value="\u59300?" calcext:value-type="string">
            <text:p>\u5930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</text:p>
          </table:table-cell>
          <table:table-cell table:formula="of:=UNICODE([.A359])" office:value-type="float" office:value="59301" calcext:value-type="float">
            <text:p>59301</text:p>
          </table:table-cell>
          <table:table-cell table:formula="of:=CONCATENATE(&quot;\u&quot;;[.B359];&quot;?&quot;)" office:value-type="string" office:string-value="\u59301?" calcext:value-type="string">
            <text:p>\u5930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</text:p>
          </table:table-cell>
          <table:table-cell table:formula="of:=UNICODE([.A360])" office:value-type="float" office:value="59302" calcext:value-type="float">
            <text:p>59302</text:p>
          </table:table-cell>
          <table:table-cell table:formula="of:=CONCATENATE(&quot;\u&quot;;[.B360];&quot;?&quot;)" office:value-type="string" office:string-value="\u59302?" calcext:value-type="string">
            <text:p>\u5930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</text:p>
          </table:table-cell>
          <table:table-cell table:formula="of:=UNICODE([.A361])" office:value-type="float" office:value="59303" calcext:value-type="float">
            <text:p>59303</text:p>
          </table:table-cell>
          <table:table-cell table:formula="of:=CONCATENATE(&quot;\u&quot;;[.B361];&quot;?&quot;)" office:value-type="string" office:string-value="\u59303?" calcext:value-type="string">
            <text:p>\u5930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</text:p>
          </table:table-cell>
          <table:table-cell table:formula="of:=UNICODE([.A362])" office:value-type="float" office:value="59328" calcext:value-type="float">
            <text:p>59328</text:p>
          </table:table-cell>
          <table:table-cell table:formula="of:=CONCATENATE(&quot;\u&quot;;[.B362];&quot;?&quot;)" office:value-type="string" office:string-value="\u59328?" calcext:value-type="string">
            <text:p>\u5932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</text:p>
          </table:table-cell>
          <table:table-cell table:formula="of:=UNICODE([.A363])" office:value-type="float" office:value="59329" calcext:value-type="float">
            <text:p>59329</text:p>
          </table:table-cell>
          <table:table-cell table:formula="of:=CONCATENATE(&quot;\u&quot;;[.B363];&quot;?&quot;)" office:value-type="string" office:string-value="\u59329?" calcext:value-type="string">
            <text:p>\u5932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</text:p>
          </table:table-cell>
          <table:table-cell table:formula="of:=UNICODE([.A364])" office:value-type="float" office:value="59330" calcext:value-type="float">
            <text:p>59330</text:p>
          </table:table-cell>
          <table:table-cell table:formula="of:=CONCATENATE(&quot;\u&quot;;[.B364];&quot;?&quot;)" office:value-type="string" office:string-value="\u59330?" calcext:value-type="string">
            <text:p>\u5933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</text:p>
          </table:table-cell>
          <table:table-cell table:formula="of:=UNICODE([.A365])" office:value-type="float" office:value="59331" calcext:value-type="float">
            <text:p>59331</text:p>
          </table:table-cell>
          <table:table-cell table:formula="of:=CONCATENATE(&quot;\u&quot;;[.B365];&quot;?&quot;)" office:value-type="string" office:string-value="\u59331?" calcext:value-type="string">
            <text:p>\u5933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</text:p>
          </table:table-cell>
          <table:table-cell table:formula="of:=UNICODE([.A366])" office:value-type="float" office:value="59332" calcext:value-type="float">
            <text:p>59332</text:p>
          </table:table-cell>
          <table:table-cell table:formula="of:=CONCATENATE(&quot;\u&quot;;[.B366];&quot;?&quot;)" office:value-type="string" office:string-value="\u59332?" calcext:value-type="string">
            <text:p>\u5933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</text:p>
          </table:table-cell>
          <table:table-cell table:formula="of:=UNICODE([.A367])" office:value-type="float" office:value="59333" calcext:value-type="float">
            <text:p>59333</text:p>
          </table:table-cell>
          <table:table-cell table:formula="of:=CONCATENATE(&quot;\u&quot;;[.B367];&quot;?&quot;)" office:value-type="string" office:string-value="\u59333?" calcext:value-type="string">
            <text:p>\u5933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</text:p>
          </table:table-cell>
          <table:table-cell table:formula="of:=UNICODE([.A368])" office:value-type="float" office:value="59334" calcext:value-type="float">
            <text:p>59334</text:p>
          </table:table-cell>
          <table:table-cell table:formula="of:=CONCATENATE(&quot;\u&quot;;[.B368];&quot;?&quot;)" office:value-type="string" office:string-value="\u59334?" calcext:value-type="string">
            <text:p>\u5933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</text:p>
          </table:table-cell>
          <table:table-cell table:formula="of:=UNICODE([.A369])" office:value-type="float" office:value="59335" calcext:value-type="float">
            <text:p>59335</text:p>
          </table:table-cell>
          <table:table-cell table:formula="of:=CONCATENATE(&quot;\u&quot;;[.B369];&quot;?&quot;)" office:value-type="string" office:string-value="\u59335?" calcext:value-type="string">
            <text:p>\u5933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</text:p>
          </table:table-cell>
          <table:table-cell table:formula="of:=UNICODE([.A370])" office:value-type="float" office:value="59344" calcext:value-type="float">
            <text:p>59344</text:p>
          </table:table-cell>
          <table:table-cell table:formula="of:=CONCATENATE(&quot;\u&quot;;[.B370];&quot;?&quot;)" office:value-type="string" office:string-value="\u59344?" calcext:value-type="string">
            <text:p>\u5934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</text:p>
          </table:table-cell>
          <table:table-cell table:formula="of:=UNICODE([.A371])" office:value-type="float" office:value="59345" calcext:value-type="float">
            <text:p>59345</text:p>
          </table:table-cell>
          <table:table-cell table:formula="of:=CONCATENATE(&quot;\u&quot;;[.B371];&quot;?&quot;)" office:value-type="string" office:string-value="\u59345?" calcext:value-type="string">
            <text:p>\u5934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</text:p>
          </table:table-cell>
          <table:table-cell table:formula="of:=UNICODE([.A372])" office:value-type="float" office:value="59346" calcext:value-type="float">
            <text:p>59346</text:p>
          </table:table-cell>
          <table:table-cell table:formula="of:=CONCATENATE(&quot;\u&quot;;[.B372];&quot;?&quot;)" office:value-type="string" office:string-value="\u59346?" calcext:value-type="string">
            <text:p>\u5934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</text:p>
          </table:table-cell>
          <table:table-cell table:formula="of:=UNICODE([.A373])" office:value-type="float" office:value="59347" calcext:value-type="float">
            <text:p>59347</text:p>
          </table:table-cell>
          <table:table-cell table:formula="of:=CONCATENATE(&quot;\u&quot;;[.B373];&quot;?&quot;)" office:value-type="string" office:string-value="\u59347?" calcext:value-type="string">
            <text:p>\u5934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</text:p>
          </table:table-cell>
          <table:table-cell table:formula="of:=UNICODE([.A374])" office:value-type="float" office:value="59348" calcext:value-type="float">
            <text:p>59348</text:p>
          </table:table-cell>
          <table:table-cell table:formula="of:=CONCATENATE(&quot;\u&quot;;[.B374];&quot;?&quot;)" office:value-type="string" office:string-value="\u59348?" calcext:value-type="string">
            <text:p>\u5934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</text:p>
          </table:table-cell>
          <table:table-cell table:formula="of:=UNICODE([.A375])" office:value-type="float" office:value="59349" calcext:value-type="float">
            <text:p>59349</text:p>
          </table:table-cell>
          <table:table-cell table:formula="of:=CONCATENATE(&quot;\u&quot;;[.B375];&quot;?&quot;)" office:value-type="string" office:string-value="\u59349?" calcext:value-type="string">
            <text:p>\u5934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</text:p>
          </table:table-cell>
          <table:table-cell table:formula="of:=UNICODE([.A376])" office:value-type="float" office:value="59350" calcext:value-type="float">
            <text:p>59350</text:p>
          </table:table-cell>
          <table:table-cell table:formula="of:=CONCATENATE(&quot;\u&quot;;[.B376];&quot;?&quot;)" office:value-type="string" office:string-value="\u59350?" calcext:value-type="string">
            <text:p>\u5935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</text:p>
          </table:table-cell>
          <table:table-cell table:formula="of:=UNICODE([.A377])" office:value-type="float" office:value="59351" calcext:value-type="float">
            <text:p>59351</text:p>
          </table:table-cell>
          <table:table-cell table:formula="of:=CONCATENATE(&quot;\u&quot;;[.B377];&quot;?&quot;)" office:value-type="string" office:string-value="\u59351?" calcext:value-type="string">
            <text:p>\u5935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</text:p>
          </table:table-cell>
          <table:table-cell table:formula="of:=UNICODE([.A378])" office:value-type="float" office:value="59352" calcext:value-type="float">
            <text:p>59352</text:p>
          </table:table-cell>
          <table:table-cell table:formula="of:=CONCATENATE(&quot;\u&quot;;[.B378];&quot;?&quot;)" office:value-type="string" office:string-value="\u59352?" calcext:value-type="string">
            <text:p>\u5935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</text:p>
          </table:table-cell>
          <table:table-cell table:formula="of:=UNICODE([.A379])" office:value-type="float" office:value="59353" calcext:value-type="float">
            <text:p>59353</text:p>
          </table:table-cell>
          <table:table-cell table:formula="of:=CONCATENATE(&quot;\u&quot;;[.B379];&quot;?&quot;)" office:value-type="string" office:string-value="\u59353?" calcext:value-type="string">
            <text:p>\u5935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</text:p>
          </table:table-cell>
          <table:table-cell table:formula="of:=UNICODE([.A380])" office:value-type="float" office:value="59354" calcext:value-type="float">
            <text:p>59354</text:p>
          </table:table-cell>
          <table:table-cell table:formula="of:=CONCATENATE(&quot;\u&quot;;[.B380];&quot;?&quot;)" office:value-type="string" office:string-value="\u59354?" calcext:value-type="string">
            <text:p>\u5935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</text:p>
          </table:table-cell>
          <table:table-cell table:formula="of:=UNICODE([.A381])" office:value-type="float" office:value="59355" calcext:value-type="float">
            <text:p>59355</text:p>
          </table:table-cell>
          <table:table-cell table:formula="of:=CONCATENATE(&quot;\u&quot;;[.B381];&quot;?&quot;)" office:value-type="string" office:string-value="\u59355?" calcext:value-type="string">
            <text:p>\u5935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</text:p>
          </table:table-cell>
          <table:table-cell table:formula="of:=UNICODE([.A382])" office:value-type="float" office:value="59356" calcext:value-type="float">
            <text:p>59356</text:p>
          </table:table-cell>
          <table:table-cell table:formula="of:=CONCATENATE(&quot;\u&quot;;[.B382];&quot;?&quot;)" office:value-type="string" office:string-value="\u59356?" calcext:value-type="string">
            <text:p>\u5935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</text:p>
          </table:table-cell>
          <table:table-cell table:formula="of:=UNICODE([.A383])" office:value-type="float" office:value="59357" calcext:value-type="float">
            <text:p>59357</text:p>
          </table:table-cell>
          <table:table-cell table:formula="of:=CONCATENATE(&quot;\u&quot;;[.B383];&quot;?&quot;)" office:value-type="string" office:string-value="\u59357?" calcext:value-type="string">
            <text:p>\u5935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</text:p>
          </table:table-cell>
          <table:table-cell table:formula="of:=UNICODE([.A384])" office:value-type="float" office:value="59358" calcext:value-type="float">
            <text:p>59358</text:p>
          </table:table-cell>
          <table:table-cell table:formula="of:=CONCATENATE(&quot;\u&quot;;[.B384];&quot;?&quot;)" office:value-type="string" office:string-value="\u59358?" calcext:value-type="string">
            <text:p>\u5935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</text:p>
          </table:table-cell>
          <table:table-cell table:formula="of:=UNICODE([.A385])" office:value-type="float" office:value="59359" calcext:value-type="float">
            <text:p>59359</text:p>
          </table:table-cell>
          <table:table-cell table:formula="of:=CONCATENATE(&quot;\u&quot;;[.B385];&quot;?&quot;)" office:value-type="string" office:string-value="\u59359?" calcext:value-type="string">
            <text:p>\u5935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</text:p>
          </table:table-cell>
          <table:table-cell table:formula="of:=UNICODE([.A386])" office:value-type="float" office:value="59360" calcext:value-type="float">
            <text:p>59360</text:p>
          </table:table-cell>
          <table:table-cell table:formula="of:=CONCATENATE(&quot;\u&quot;;[.B386];&quot;?&quot;)" office:value-type="string" office:string-value="\u59360?" calcext:value-type="string">
            <text:p>\u5936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</text:p>
          </table:table-cell>
          <table:table-cell table:formula="of:=UNICODE([.A387])" office:value-type="float" office:value="59361" calcext:value-type="float">
            <text:p>59361</text:p>
          </table:table-cell>
          <table:table-cell table:formula="of:=CONCATENATE(&quot;\u&quot;;[.B387];&quot;?&quot;)" office:value-type="string" office:string-value="\u59361?" calcext:value-type="string">
            <text:p>\u5936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</text:p>
          </table:table-cell>
          <table:table-cell table:formula="of:=UNICODE([.A388])" office:value-type="float" office:value="59362" calcext:value-type="float">
            <text:p>59362</text:p>
          </table:table-cell>
          <table:table-cell table:formula="of:=CONCATENATE(&quot;\u&quot;;[.B388];&quot;?&quot;)" office:value-type="string" office:string-value="\u59362?" calcext:value-type="string">
            <text:p>\u5936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</text:p>
          </table:table-cell>
          <table:table-cell table:formula="of:=UNICODE([.A389])" office:value-type="float" office:value="59363" calcext:value-type="float">
            <text:p>59363</text:p>
          </table:table-cell>
          <table:table-cell table:formula="of:=CONCATENATE(&quot;\u&quot;;[.B389];&quot;?&quot;)" office:value-type="string" office:string-value="\u59363?" calcext:value-type="string">
            <text:p>\u5936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</text:p>
          </table:table-cell>
          <table:table-cell table:formula="of:=UNICODE([.A390])" office:value-type="float" office:value="59364" calcext:value-type="float">
            <text:p>59364</text:p>
          </table:table-cell>
          <table:table-cell table:formula="of:=CONCATENATE(&quot;\u&quot;;[.B390];&quot;?&quot;)" office:value-type="string" office:string-value="\u59364?" calcext:value-type="string">
            <text:p>\u5936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</text:p>
          </table:table-cell>
          <table:table-cell table:formula="of:=UNICODE([.A391])" office:value-type="float" office:value="59365" calcext:value-type="float">
            <text:p>59365</text:p>
          </table:table-cell>
          <table:table-cell table:formula="of:=CONCATENATE(&quot;\u&quot;;[.B391];&quot;?&quot;)" office:value-type="string" office:string-value="\u59365?" calcext:value-type="string">
            <text:p>\u5936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</text:p>
          </table:table-cell>
          <table:table-cell table:formula="of:=UNICODE([.A392])" office:value-type="float" office:value="59366" calcext:value-type="float">
            <text:p>59366</text:p>
          </table:table-cell>
          <table:table-cell table:formula="of:=CONCATENATE(&quot;\u&quot;;[.B392];&quot;?&quot;)" office:value-type="string" office:string-value="\u59366?" calcext:value-type="string">
            <text:p>\u5936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</text:p>
          </table:table-cell>
          <table:table-cell table:formula="of:=UNICODE([.A393])" office:value-type="float" office:value="59367" calcext:value-type="float">
            <text:p>59367</text:p>
          </table:table-cell>
          <table:table-cell table:formula="of:=CONCATENATE(&quot;\u&quot;;[.B393];&quot;?&quot;)" office:value-type="string" office:string-value="\u59367?" calcext:value-type="string">
            <text:p>\u5936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</text:p>
          </table:table-cell>
          <table:table-cell table:formula="of:=UNICODE([.A394])" office:value-type="float" office:value="59376" calcext:value-type="float">
            <text:p>59376</text:p>
          </table:table-cell>
          <table:table-cell table:formula="of:=CONCATENATE(&quot;\u&quot;;[.B394];&quot;?&quot;)" office:value-type="string" office:string-value="\u59376?" calcext:value-type="string">
            <text:p>\u5937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</text:p>
          </table:table-cell>
          <table:table-cell table:formula="of:=UNICODE([.A395])" office:value-type="float" office:value="59377" calcext:value-type="float">
            <text:p>59377</text:p>
          </table:table-cell>
          <table:table-cell table:formula="of:=CONCATENATE(&quot;\u&quot;;[.B395];&quot;?&quot;)" office:value-type="string" office:string-value="\u59377?" calcext:value-type="string">
            <text:p>\u5937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</text:p>
          </table:table-cell>
          <table:table-cell table:formula="of:=UNICODE([.A396])" office:value-type="float" office:value="59378" calcext:value-type="float">
            <text:p>59378</text:p>
          </table:table-cell>
          <table:table-cell table:formula="of:=CONCATENATE(&quot;\u&quot;;[.B396];&quot;?&quot;)" office:value-type="string" office:string-value="\u59378?" calcext:value-type="string">
            <text:p>\u5937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</text:p>
          </table:table-cell>
          <table:table-cell table:formula="of:=UNICODE([.A397])" office:value-type="float" office:value="59379" calcext:value-type="float">
            <text:p>59379</text:p>
          </table:table-cell>
          <table:table-cell table:formula="of:=CONCATENATE(&quot;\u&quot;;[.B397];&quot;?&quot;)" office:value-type="string" office:string-value="\u59379?" calcext:value-type="string">
            <text:p>\u59379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</text:p>
          </table:table-cell>
          <table:table-cell table:formula="of:=UNICODE([.A398])" office:value-type="float" office:value="59380" calcext:value-type="float">
            <text:p>59380</text:p>
          </table:table-cell>
          <table:table-cell table:formula="of:=CONCATENATE(&quot;\u&quot;;[.B398];&quot;?&quot;)" office:value-type="string" office:string-value="\u59380?" calcext:value-type="string">
            <text:p>\u5938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</text:p>
          </table:table-cell>
          <table:table-cell table:formula="of:=UNICODE([.A399])" office:value-type="float" office:value="59381" calcext:value-type="float">
            <text:p>59381</text:p>
          </table:table-cell>
          <table:table-cell table:formula="of:=CONCATENATE(&quot;\u&quot;;[.B399];&quot;?&quot;)" office:value-type="string" office:string-value="\u59381?" calcext:value-type="string">
            <text:p>\u5938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</text:p>
          </table:table-cell>
          <table:table-cell table:formula="of:=UNICODE([.A400])" office:value-type="float" office:value="59408" calcext:value-type="float">
            <text:p>59408</text:p>
          </table:table-cell>
          <table:table-cell table:formula="of:=CONCATENATE(&quot;\u&quot;;[.B400];&quot;?&quot;)" office:value-type="string" office:string-value="\u59408?" calcext:value-type="string">
            <text:p>\u5940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</text:p>
          </table:table-cell>
          <table:table-cell table:formula="of:=UNICODE([.A401])" office:value-type="float" office:value="59424" calcext:value-type="float">
            <text:p>59424</text:p>
          </table:table-cell>
          <table:table-cell table:formula="of:=CONCATENATE(&quot;\u&quot;;[.B401];&quot;?&quot;)" office:value-type="string" office:string-value="\u59424?" calcext:value-type="string">
            <text:p>\u59424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</text:p>
          </table:table-cell>
          <table:table-cell table:formula="of:=UNICODE([.A402])" office:value-type="float" office:value="59425" calcext:value-type="float">
            <text:p>59425</text:p>
          </table:table-cell>
          <table:table-cell table:formula="of:=CONCATENATE(&quot;\u&quot;;[.B402];&quot;?&quot;)" office:value-type="string" office:string-value="\u59425?" calcext:value-type="string">
            <text:p>\u59425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</text:p>
          </table:table-cell>
          <table:table-cell table:formula="of:=UNICODE([.A403])" office:value-type="float" office:value="59426" calcext:value-type="float">
            <text:p>59426</text:p>
          </table:table-cell>
          <table:table-cell table:formula="of:=CONCATENATE(&quot;\u&quot;;[.B403];&quot;?&quot;)" office:value-type="string" office:string-value="\u59426?" calcext:value-type="string">
            <text:p>\u59426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</text:p>
          </table:table-cell>
          <table:table-cell table:formula="of:=UNICODE([.A404])" office:value-type="float" office:value="59427" calcext:value-type="float">
            <text:p>59427</text:p>
          </table:table-cell>
          <table:table-cell table:formula="of:=CONCATENATE(&quot;\u&quot;;[.B404];&quot;?&quot;)" office:value-type="string" office:string-value="\u59427?" calcext:value-type="string">
            <text:p>\u59427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</text:p>
          </table:table-cell>
          <table:table-cell table:formula="of:=UNICODE([.A405])" office:value-type="float" office:value="59440" calcext:value-type="float">
            <text:p>59440</text:p>
          </table:table-cell>
          <table:table-cell table:formula="of:=CONCATENATE(&quot;\u&quot;;[.B405];&quot;?&quot;)" office:value-type="string" office:string-value="\u59440?" calcext:value-type="string">
            <text:p>\u59440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</text:p>
          </table:table-cell>
          <table:table-cell table:formula="of:=UNICODE([.A406])" office:value-type="float" office:value="59441" calcext:value-type="float">
            <text:p>59441</text:p>
          </table:table-cell>
          <table:table-cell table:formula="of:=CONCATENATE(&quot;\u&quot;;[.B406];&quot;?&quot;)" office:value-type="string" office:string-value="\u59441?" calcext:value-type="string">
            <text:p>\u59441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</text:p>
          </table:table-cell>
          <table:table-cell table:formula="of:=UNICODE([.A407])" office:value-type="float" office:value="59442" calcext:value-type="float">
            <text:p>59442</text:p>
          </table:table-cell>
          <table:table-cell table:formula="of:=CONCATENATE(&quot;\u&quot;;[.B407];&quot;?&quot;)" office:value-type="string" office:string-value="\u59442?" calcext:value-type="string">
            <text:p>\u59442?</text:p>
          </table:table-cell>
          <table:table-cell table:number-columns-repeated="1019"/>
        </table:table-row>
        <table:table-row table:style-name="ro1" table:number-rows-repeated="104816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OMVS" svg:font-family="FROMV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9T10:26:33.634000667</dc:date>
    <meta:editing-duration>PT9M13S</meta:editing-duration>
    <meta:editing-cycles>1</meta:editing-cycles>
    <meta:document-statistic meta:table-count="1" meta:cell-count="1221" meta:object-count="0"/>
    <meta:generator>LibreOffice/6.0.7.3$Linux_AARCH64 LibreOffice_project/00m0$Build-3</meta:generator>
  </office:meta>
</office:document-meta>
</file>